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sans-serif"/>
    <style:font-face style:name="Google Sans Text" svg:font-family="'Google Sans Text',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Heading_20_2">
      <style:paragraph-properties fo:margin-top="0cm" fo:margin-bottom="0.247cm" style:contextual-spacing="false" fo:line-height="114%"/>
      <style:text-properties style:font-name="Google Sans"/>
    </style:style>
    <style:style style:name="P2" style:family="paragraph" style:parent-style-name="Heading_20_3">
      <style:paragraph-properties fo:margin-top="0cm" fo:margin-bottom="0.247cm" style:contextual-spacing="false" fo:line-height="114%"/>
      <style:text-properties style:font-name="Google Sans"/>
    </style:style>
    <style:style style:name="P3" style:family="paragraph" style:parent-style-name="Heading_20_2">
      <style:paragraph-properties fo:margin-left="0cm" fo:margin-right="0cm" fo:margin-top="0.423cm" fo:margin-bottom="0cm" style:contextual-spacing="false" fo:text-indent="0cm" style:auto-text-indent="false"/>
      <style:text-properties loext:padding="0cm" loext:border="none"/>
    </style:style>
    <style:style style:name="P4" style:family="paragraph" style:parent-style-name="Heading_20_3">
      <style:paragraph-properties fo:margin-left="0cm" fo:margin-right="0cm" fo:margin-top="0.423cm" fo:margin-bottom="0cm" style:contextual-spacing="false" fo:text-indent="0cm" style:auto-text-indent="false"/>
      <style:text-properties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6" style:family="paragraph" style:parent-style-name="Text_20_body">
      <style:paragraph-properties fo:margin-left="0cm" fo:margin-right="0cm" fo:margin-top="0cm" fo:margin-bottom="0cm" style:contextual-spacing="false" fo:line-height="120%" fo:text-indent="0cm" style:auto-text-indent="false"/>
      <style:text-properties loext:padding="0cm" loext:border="none"/>
    </style:style>
    <style:style style:name="P7" style:family="paragraph" style:parent-style-name="Heading_20_3">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20pt" fo:font-weight="bold" officeooo:rsid="000b191a" officeooo:paragraph-rsid="000b191a"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rsid="000b191a" officeooo:paragraph-rsid="000b191a"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11" style:family="paragraph" style:parent-style-name="Preformatted_20_Text">
      <style:paragraph-properties fo:margin-top="0cm" fo:margin-bottom="0.499cm" style:contextual-spacing="false"/>
    </style:style>
    <style:style style:name="P12" style:family="paragraph" style:parent-style-name="Preformatted_20_Text">
      <style:paragraph-properties fo:margin-top="0cm" fo:margin-bottom="0cm" style:contextual-spacing="false" fo:line-height="114%"/>
    </style:style>
    <style:style style:name="P13" style:family="paragraph" style:parent-style-name="Text_20_body">
      <style:paragraph-properties fo:margin-top="0cm" fo:margin-bottom="0.247cm" style:contextual-spacing="false" fo:line-height="114%"/>
      <style:text-properties style:font-name="Google Sans Text"/>
    </style:style>
    <style:style style:name="P14" style:family="paragraph" style:parent-style-name="Text_20_body">
      <style:paragraph-properties fo:text-align="start" style:justify-single-word="false"/>
      <style:text-properties style:font-name="Google Sans Text" fo:font-size="12pt" fo:font-weight="normal" officeooo:rsid="000b191a" officeooo:paragraph-rsid="000b191a" style:font-size-asian="12pt" style:font-weight-asian="normal" style:font-size-complex="12pt" style:font-weight-complex="normal"/>
    </style:style>
    <style:style style:name="P15" style:family="paragraph" style:parent-style-name="Text_20_body">
      <style:paragraph-properties fo:margin-left="0cm" fo:margin-right="0cm" fo:margin-top="0cm" fo:margin-bottom="0cm" style:contextual-spacing="false" fo:text-indent="0cm" style:auto-text-indent="false"/>
    </style:style>
    <style:style style:name="P16" style:family="paragraph" style:parent-style-name="Heading_20_3">
      <style:paragraph-properties fo:margin-left="0cm" fo:margin-right="0cm" fo:margin-top="0.423cm" fo:margin-bottom="0cm" style:contextual-spacing="false" fo:text-indent="0cm" style:auto-text-indent="false"/>
    </style:style>
    <style:style style:name="P17" style:family="paragraph" style:parent-style-name="Text_20_body">
      <style:paragraph-properties fo:text-align="start" style:justify-single-word="false"/>
      <style:text-properties fo:color="#111111" loext:opacity="100%" fo:font-size="20pt" fo:font-weight="bold" officeooo:rsid="000b191a" officeooo:paragraph-rsid="000b191a" style:font-size-asian="20pt" style:font-weight-asian="bold" style:font-size-complex="20pt" style:font-weight-complex="bold" loext:padding="0cm" loext:border="none"/>
    </style:style>
    <style:style style:name="P18" style:family="paragraph" style:parent-style-name="Text_20_body">
      <style:paragraph-properties fo:text-align="start" style:justify-single-word="false"/>
      <style:text-properties fo:color="#000000" loext:opacity="100%" fo:font-size="20pt" fo:font-weight="bold" officeooo:rsid="000d9049" officeooo:paragraph-rsid="000d9049" style:font-size-asian="20pt" style:font-weight-asian="bold" style:font-size-complex="20pt" style:font-weight-complex="bold" loext:padding="0cm" loext:border="none"/>
    </style:style>
    <style:style style:name="P19" style:family="paragraph" style:parent-style-name="Standard">
      <style:paragraph-properties fo:text-align="start" style:justify-single-word="false"/>
      <style:text-properties fo:font-size="20pt" fo:font-weight="bold" officeooo:rsid="000d9049" officeooo:paragraph-rsid="000d9049" style:font-size-asian="20pt" style:font-weight-asian="bold" style:font-size-complex="20pt" style:font-weight-complex="bold"/>
    </style:style>
    <style:style style:name="P20" style:family="paragraph" style:parent-style-name="Standard">
      <style:paragraph-properties fo:text-align="start" style:justify-single-word="false"/>
      <style:text-properties fo:font-size="20pt" fo:font-weight="bold" officeooo:rsid="000fd799" officeooo:paragraph-rsid="0011900d" style:font-size-asian="20pt" style:font-weight-asian="bold" style:font-size-complex="20pt" style:font-weight-complex="bold"/>
    </style:style>
    <style:style style:name="P21" style:family="paragraph" style:parent-style-name="Text_20_body" style:list-style-name="L1">
      <style:paragraph-properties fo:margin-top="0cm" fo:margin-bottom="0.247cm" style:contextual-spacing="false" fo:line-height="114%" fo:padding="0cm" fo:border="none"/>
      <style:text-properties style:font-name="Google Sans Text"/>
    </style:style>
    <style:style style:name="P22" style:family="paragraph" style:parent-style-name="Text_20_body" style:list-style-name="L2">
      <style:paragraph-properties fo:margin-top="0cm" fo:margin-bottom="0.247cm" style:contextual-spacing="false" fo:line-height="114%" fo:padding="0cm" fo:border="none"/>
      <style:text-properties style:font-name="Google Sans Text"/>
    </style:style>
    <style:style style:name="P23" style:family="paragraph" style:parent-style-name="Text_20_body" style:list-style-name="L3">
      <style:paragraph-properties fo:margin-top="0cm" fo:margin-bottom="0.247cm" style:contextual-spacing="false" fo:line-height="114%" fo:padding="0cm" fo:border="none"/>
      <style:text-properties style:font-name="Google Sans Text"/>
    </style:style>
    <style:style style:name="P24" style:family="paragraph" style:parent-style-name="Text_20_body" style:list-style-name="L4">
      <style:paragraph-properties fo:margin-top="0cm" fo:margin-bottom="0.247cm" style:contextual-spacing="false" fo:line-height="114%" fo:padding="0cm" fo:border="none"/>
      <style:text-properties style:font-name="Google Sans Text"/>
    </style:style>
    <style:style style:name="P25" style:family="paragraph" style:parent-style-name="Text_20_body" style:list-style-name="L5">
      <style:paragraph-properties fo:margin-top="0cm" fo:margin-bottom="0.247cm" style:contextual-spacing="false" fo:line-height="114%" fo:padding="0cm" fo:border="none"/>
      <style:text-properties style:font-name="Google Sans Text"/>
    </style:style>
    <style:style style:name="P26" style:family="paragraph" style:parent-style-name="Text_20_body" style:list-style-name="L2">
      <style:paragraph-properties fo:margin-top="0cm" fo:margin-bottom="0.247cm" style:contextual-spacing="false" fo:line-height="114%" fo:padding="0cm" fo:border="none"/>
    </style:style>
    <style:style style:name="P27" style:family="paragraph" style:parent-style-name="Text_20_body" style:list-style-name="L3">
      <style:paragraph-properties fo:margin-top="0cm" fo:margin-bottom="0.247cm" style:contextual-spacing="false" fo:line-height="114%" fo:padding="0cm" fo:border="none"/>
    </style:style>
    <style:style style:name="P28" style:family="paragraph" style:parent-style-name="Text_20_body" style:list-style-name="L5">
      <style:paragraph-properties fo:margin-top="0cm" fo:margin-bottom="0.247cm" style:contextual-spacing="false" fo:line-height="114%" fo:padding="0cm" fo:border="none"/>
    </style:style>
    <style:style style:name="P29"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30" style:family="paragraph" style:parent-style-name="Text_20_body" style:list-style-name="L7">
      <style:paragraph-properties fo:margin-left="0cm" fo:margin-right="0cm" fo:margin-top="0cm" fo:margin-bottom="0cm" style:contextual-spacing="false" fo:line-height="120%" fo:text-indent="0cm" style:auto-text-indent="false" fo:padding="0cm" fo:border="none"/>
      <style:text-properties loext:padding="0cm" loext:border="none"/>
    </style:style>
    <style:style style:name="P31"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loext:padding="0cm" loext:border="none"/>
    </style:style>
    <style:style style:name="P32" style:family="paragraph" style:parent-style-name="Text_20_body" style:list-style-name="L8">
      <style:paragraph-properties fo:margin-left="0cm" fo:margin-right="0cm" fo:margin-top="0cm" fo:margin-bottom="0cm" style:contextual-spacing="false" fo:text-indent="0cm" style:auto-text-indent="false" fo:padding="0cm" fo:border="none"/>
      <style:text-properties loext:padding="0cm" loext:border="none"/>
    </style:style>
    <style:style style:name="P33" style:family="paragraph" style:parent-style-name="Text_20_body" style:list-style-name="L10">
      <style:paragraph-properties fo:margin-left="0cm" fo:margin-right="0cm" fo:margin-top="0cm" fo:margin-bottom="0cm" style:contextual-spacing="false" fo:text-indent="0cm" style:auto-text-indent="false" fo:padding="0cm" fo:border="none"/>
      <style:text-properties loext:padding="0cm" loext:border="none"/>
    </style:style>
    <style:style style:name="P34" style:family="paragraph" style:parent-style-name="Text_20_body" style:list-style-name="L9"/>
    <style:style style:name="T1" style:family="text">
      <style:text-properties fo:font-style="italic"/>
    </style:style>
    <style:style style:name="T2" style:family="text">
      <style:text-properties style:font-name="Google Sans Text"/>
    </style:style>
    <style:style style:name="T3" style:family="text">
      <style:text-properties style:font-name="Google Sans Text" fo:font-weight="bold"/>
    </style:style>
    <style:style style:name="T4" style:family="text">
      <style:text-properties style:font-name="Google Sans Text" fo:font-style="italic"/>
    </style:style>
    <style:style style:name="T5" style:family="text">
      <style:text-properties fo:font-weight="bold"/>
    </style:style>
    <style:style style:name="T6" style:family="text">
      <style:text-properties fo:font-weight="bold" loext:padding="0cm" loext:border="none"/>
    </style:style>
    <style:style style:name="T7" style:family="text">
      <style:text-properties loext:padding="0cm" loext:border="none"/>
    </style:style>
    <style:style style:name="T8" style:family="text">
      <style:text-properties fo:font-variant="normal" fo:text-transform="none" style:font-name="KaTeX Main" fo:font-style="normal" fo:font-weight="normal"/>
    </style:style>
    <style:style style:name="T9" style:family="text">
      <style:text-properties fo:font-variant="normal" fo:text-transform="none" style:font-name="KaTeX Math" fo:font-style="italic" fo:font-weight="normal"/>
    </style:style>
    <style:style style:name="T10" style:family="text">
      <style:text-properties fo:font-variant="normal" fo:text-transform="none" fo:font-weight="bold"/>
    </style:style>
    <style:style style:name="T11" style:family="text">
      <style:text-properties fo:font-variant="normal" fo:text-transform="none" fo:font-style="normal" loext:padding="0cm" loext:border="none"/>
    </style:style>
    <style:style style:name="T12" style:family="text">
      <style:text-properties officeooo:rsid="0011900d"/>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ugmented Pressing Sets Explorer – Plan</text:p>
      <text:p text:style-name="P14"/>
      <text:p text:style-name="P14">Pour fusionner l'interface visuelle du <text:span text:style-name="T1">Pressing Sets Explorer</text:span> (le piano, la portée, les boutons de Pitch Classes) avec la puissance des réseaux de Tymoczko (le graphe de <text:span text:style-name="T1">L'Isle Joyeuse</text:span>), nous devons structurer l'application de manière modulaire.</text:p>
      <text:p text:style-name="P13">Voici l'inventaire complet des briques techniques, mathématiques et graphiques dont nous allons avoir besoin pour coder cet outil.</text:p>
      <text:h text:style-name="P1" text:outline-level="2">1. L'Infrastructure Technique (Le Moteur Graphique &amp; Web)</text:h>
      <text:p text:style-name="P13">Pour que cet outil soit agréable à utiliser, il lui faut une interface visuelle fluide avec deux zones : une zone de saisie (piano/boutons) et une zone d'affichage (le graphe).</text:p>
      <text:list xml:id="list1257968364" text:style-name="L1">
        <text:list-item>
          <text:p text:style-name="P21"><text:span text:style-name="T5">Le Framework principal :</text:span> <text:span text:style-name="T5">Python avec Dash (Plotly)</text:span> ou <text:span text:style-name="T5">Streamlit</text:span>.</text:p>
          <text:list>
            <text:list-item>
              <text:p text:style-name="P21"><text:span text:style-name="T1">Pourquoi ?</text:span> Ils permettent de coder une interface Web moderne entièrement en Python, sans avoir à manipuler du JavaScript/HTML/CSS complexe.</text:p>
            </text:list-item>
          </text:list>
        </text:list-item>
        <text:list-item>
          <text:p text:style-name="P21"><text:span text:style-name="T5">Le Moteur de Graphe Interactif :</text:span> <text:span text:style-name="T5">Pyvis</text:span> ou <text:span text:style-name="T5">Plotly Network Graphs</text:span>.</text:p>
          <text:list>
            <text:list-item>
              <text:p text:style-name="P21"><text:span text:style-name="T1">Pourquoi ?</text:span> Pyvis permet de générer des réseaux de bulles (nœuds) que tu peux glisser, zoomer et cliquer directement dans ton navigateur, exactement comme le schéma de Tymoczko mais en dynamique.</text:p>
            </text:list-item>
          </text:list>
        </text:list-item>
        <text:list-item>
          <text:p text:style-name="P21"><text:span text:style-name="T5">Le Rendu de la Portée Musicale :</text:span> <text:span text:style-name="T5">Abjad</text:span> ou l'API <text:span text:style-name="T5">VexFlow</text:span> (via des composants légers) pour dessiner proprement la portée avec les bémols et les dièses selon tes sélections.</text:p>
        </text:list-item>
      </text:list>
      <text:h text:style-name="P1" text:outline-level="2">2. Le Cœur Mathématique (Set Theory &amp; Topologie)</text:h>
      <text:p text:style-name="P13">C'est ici qu'on injecte la logique de Tymoczko pour relier les stations. Le code doit manipuler des objets mathématiques stricts :</text:p>
      <text:list xml:id="list3991859894" text:style-name="L2">
        <text:list-item>
          <text:p text:style-name="P26"><text:span text:style-name="T3">Le Convertisseur de Pitch Classes (Forte Numbers) :</text:span><text:span text:style-name="T2"> Une fonction qui prend tes boutons pressés (ex: </text:span><text:span text:style-name="Source_20_Text"><text:span text:style-name="T2">[0, 2, 4, 6, 7, 9, 10]</text:span></text:span><text:span text:style-name="T2">) et calcule sa </text:span><text:span text:style-name="T4">Normal Form</text:span><text:span text:style-name="T2"> et sa </text:span><text:span text:style-name="T4">Prime Form</text:span><text:span text:style-name="T2"> pour identifier instantanément qu'il s'agit du Set "Acoustic" ou "Diatonic".</text:span></text:p>
        </text:list-item>
        <text:list-item>
          <text:p text:style-name="P22"><text:span text:style-name="T5">La Matrice d'Adjacence (Calcul des lignes de métro) :</text:span> Un algorithme qui tourne en arrière-plan et qui calcule pour n'importe quel couple de Sets :</text:p>
          <text:list>
            <text:list-item>
              <text:p text:style-name="P22">Le nombre exact de <text:span text:style-name="T5">pivots</text:span> (intersections d'ensembles).</text:p>
            </text:list-item>
            <text:list-item>
              <text:p text:style-name="P22">La <text:span text:style-name="T5">distance de pas de voix (Voice-Leading distance)</text:span> : de combien de demi-tons les notes restantes doivent glisser pour atteindre le nouvel accord ($G \rightarrow G\#$).</text:p>
            </text:list-item>
          </text:list>
        </text:list-item>
      </text:list>
      <text:h text:style-name="P1" text:outline-level="2">3. L'Inventaire des Données (Les Modes d'Entrée)</text:h>
      <text:p text:style-name="P13">Ton application devra gérer deux modes de fonctionnement distincts :</text:p>
      <text:h text:style-name="P2" text:outline-level="3"><text:soft-page-break/>Mode A : "L'Analyseur de Partitions" (Mode statique)</text:h>
      <text:list xml:id="list3806646997" text:style-name="L3">
        <text:list-item>
          <text:p text:style-name="P23"><text:span text:style-name="T5">Ce qu'il prend :</text:span> Ton fichier JSON de 159 lignes réelles (ou plus).</text:p>
        </text:list-item>
        <text:list-item>
          <text:p text:style-name="P27"><text:span text:style-name="T3">Ce qu'il fait :</text:span><text:span text:style-name="T2"> Il lit les enchaînements chronologiques, calcule les pivots et génère la carte routière fixe de l'œuvre. Les nœuds sont labellisés avec le nom du Set, la transposition, la tonique, et éventuellement les numéros de mesures (ex: </text:span><text:span text:style-name="Source_20_Text"><text:span text:style-name="T2">160-3</text:span></text:span><text:span text:style-name="T2">).</text:span></text:p>
        </text:list-item>
      </text:list>
      <text:h text:style-name="P2" text:outline-level="3">Mode B : "L'Explorateur/Compositeur" (Mode prédictif/dynamique)</text:h>
      <text:list xml:id="list3829639912" text:style-name="L4">
        <text:list-item>
          <text:p text:style-name="P24"><text:span text:style-name="T5">Ce qu'il prend :</text:span> Une sélection instantanée sur ton piano virtuel (ton Set de départ).</text:p>
        </text:list-item>
        <text:list-item>
          <text:p text:style-name="P24"><text:span text:style-name="T5">Ce qu'il fait :</text:span> Il calcule en temps réel toutes les "stations adjacentes" possibles dans l'univers tempéré (Diatonique, Acoustique, Octatonique, etc.) et trace des flèches vers elles. Tu pourras filtrer l'affichage : <text:span text:style-name="T1">"Montre-moi uniquement les stations accessibles à exactement 5 pivots"</text:span>.</text:p>
        </text:list-item>
      </text:list>
      <text:h text:style-name="P1" text:outline-level="2">4. La Structure de la Base de Données</text:h>
      <text:p text:style-name="P13">Pour que le code sache identifier les "stations", il nous faut un dictionnaire géométrique étendu (bien plus complet que notre version précédente). Il contiendra la structure fondamentale de chaque couleur harmonique :</text:p>
      <text:p text:style-name="P13">Python</text:p>
      <text:p text:style-name="P12"><text:span text:style-name="Source_20_Text"><text:span text:style-name="T2">DICTIONNAIRE_DES_SETS = {</text:span></text:span></text:p>
      <text:p text:style-name="P12"><text:span text:style-name="Source_20_Text"><text:s text:c="4"/></text:span><text:span text:style-name="Source_20_Text"><text:span text:style-name="T2">"Diatonic": [0, 2, 4, 5, 7, 9, 11],</text:span></text:span></text:p>
      <text:p text:style-name="P12"><text:span text:style-name="Source_20_Text"><text:s text:c="4"/></text:span><text:span text:style-name="Source_20_Text"><text:span text:style-name="T2">"Acoustic": [0, 2, 4, 6, 7, 9, 10],</text:span></text:span></text:p>
      <text:p text:style-name="P12"><text:span text:style-name="Source_20_Text"><text:s text:c="4"/></text:span><text:span text:style-name="Source_20_Text"><text:span text:style-name="T2">"Whole Tone": [0, 2, 4, 6, 8, 10],</text:span></text:span></text:p>
      <text:p text:style-name="P12"><text:span text:style-name="Source_20_Text"><text:s text:c="4"/></text:span><text:span text:style-name="Source_20_Text"><text:span text:style-name="T2">"Octatonic": [0, 1, 3, 4, 6, 7, 9, 10],</text:span></text:span></text:p>
      <text:p text:style-name="P12"><text:span text:style-name="Source_20_Text"><text:s text:c="4"/></text:span><text:span text:style-name="Source_20_Text"><text:span text:style-name="T2">"Hexatonic": [0, 1, 4, 5, 8, 9],</text:span></text:span></text:p>
      <text:p text:style-name="P12"><text:span text:style-name="Source_20_Text"><text:s text:c="4"/></text:span><text:span text:style-name="Source_20_Text"><text:span text:style-name="T2">"Harmonic Minor": [0, 2, 3, 5, 7, 8, 11],</text:span></text:span></text:p>
      <text:p text:style-name="P12"><text:span text:style-name="Source_20_Text"><text:s text:c="4"/></text:span><text:span text:style-name="Source_20_Text"><text:span text:style-name="T2">"Harmonic Major": [0, 2, 4, 5, 7, 8, 11],</text:span></text:span></text:p>
      <text:p text:style-name="P12"><text:span text:style-name="Source_20_Text"><text:s text:c="4"/></text:span><text:span text:style-name="Source_20_Text"><text:span text:style-name="T2"># On pourra ajouter les modes de Messiaen ou les sous-ensembles pentatoniques</text:span></text:span></text:p>
      <text:p text:style-name="P12"><text:span text:style-name="Source_20_Text"><text:span text:style-name="T2">}</text:span></text:span></text:p>
      <text:h text:style-name="P1" text:outline-level="2">Feu de route : Par quoi on commence ?</text:h>
      <text:p text:style-name="P13">Pour ne pas s'éparpiller, je te suggère de construire l'outil en trois étapes simples :</text:p>
      <text:list xml:id="list2767906435" text:style-name="L5">
        <text:list-item>
          <text:p text:style-name="P25"><text:span text:style-name="T5">Étape 1 (Le Moteur de calcul) :</text:span> Écrire les fonctions Python pures qui prennent un Set et calculent mathématiquement toutes les stations adjacentes possibles à $X$ pivots. (Pas d'interface pour l'instant, juste la logique).</text:p>
        </text:list-item>
        <text:list-item>
          <text:p text:style-name="P28"><text:span text:style-name="T3">Étape 2 (Le Traceur de Graphe) :</text:span><text:span text:style-name="T2"> Injecter tes 159 lignes dans </text:span><text:span text:style-name="Source_20_Text"><text:span text:style-name="T2">pyvis</text:span></text:span><text:span text:style-name="T2"> pour afficher ton tout premier schéma de Tymoczko interactif dans ton navigateur.</text:span></text:p>
        </text:list-item>
        <text:list-item>
          <text:p text:style-name="P25"><text:span text:style-name="T5">Étape 3 (L'Interface Web) :</text:span> Coder le piano visuel et l'associer au graphe pour que cliquer sur une touche du piano mette à jour le réseau en temps réel.</text:p>
        </text:list-item>
      </text:list>
      <text:p text:style-name="P13">Es-tu d'accord avec cet inventaire ? Si oui, on peut attaquer directement le code de l'<text:span text:style-name="T5">Étape 1</text:span> pour poser les fondations mathématiques de ton Explorer.</text:p>
      <text:p text:style-name="P8"/>
      <text:p text:style-name="P17"><text:soft-page-break/>Pour la suite, je voulais faire un outil un peu comme cet explorer existant où tu rentres un set avec une transposition et il renvoie les modes, les sets adjacents, les sets éloignés, etc. Donc maintenant que j'ai un code qui fait le graphe complet d'un centre, tu penses que je suis paré ? Parce que je voulais justement faire une version graphique et fonctionnelle de cet explorer, avec trois possibilités, l'exploration (on choisit un centre et on a tout), l'analyse (on donne les sets d'un morceau et il crée le graphe pour ce morceau) et la composition (c'est proche du premier mais on y reviendra plus tard). </text:p>
      <text:section text:style-name="Sect1" text:name="user-query-content-54">
        <text:p text:style-name="Text_20_body"><draw:frame draw:style-name="fr1" draw:name="Cadre1" text:anchor-type="char" svg:x="0.353cm" svg:width="0.041cm" draw:z-index="0"><draw:text-box fo:min-height="0.423cm"><text:p text:style-name="Text_20_body"/></draw:text-box></draw:frame></text:p>
      </text:section>
      <text:section text:style-name="Sect2" text:name="model-response-message-contentr_e5860231091cd92e">
        <text:p text:style-name="P15">D'accord, je vois beaucoup mieux la trajectoire globale de ton projet ! C'est une excellente stratégie : confier l'extraction harmonique à l'oreille humaine (qui reste imbattable pour filtrer les notes de passage, les appoggiatures ou les pédales) et déléguer à la machine la puissance topologique de calcul et d'exploration.</text:p>
        <text:p text:style-name="P5">Pour répondre directement à ta question : <text:span text:style-name="T5">Oui, sur le plan de la logique algorithmique pure, tu es paré à 95 %.</text:span> Tu as le moteur pour générer l'univers complet à partir d'un centre (mode Exploration) et tu as le moteur pour relier intelligemment un pool de sets avec gestion des archipels (mode Analyse).</text:p>
        <text:p text:style-name="P5">Cependant, pour concevoir une véritable application graphique et fonctionnelle (un "PressingSetsExplorer" augmenté), il te manque encore la structure de l'interface et la gestion dynamique des requêtes utilisateur.</text:p>
        <text:p text:style-name="P5">Pour articuler tes trois piliers (Exploration, Analyse, Composition), voici une architecture propre de ce qu'il te reste à mettre en place :</text:p>
        <text:h text:style-name="P3" text:outline-level="2">1. La Vue (L'Interface Graphique)</text:h>
        <text:p text:style-name="P5">Pour que ton outil soit interactif (que l'on puisse cliquer sur un set, changer de transposition, etc.), tu vas devoir choisir une bibliothèque pour l'IHM. En Python, deux options majeures s'offrent à toi :</text:p>
        <text:list xml:id="list2013281120" text:style-name="L6">
          <text:list-item>
            <text:p text:style-name="P29"><text:span text:style-name="T6">Option Web-App (Recommandée) : </text:span><text:span text:style-name="Source_20_Text"><text:span text:style-name="T6">Streamlit</text:span></text:span><text:span text:style-name="T6"> ou </text:span><text:span text:style-name="Source_20_Text"><text:span text:style-name="T6">Dash</text:span></text:span><text:span text:style-name="T7">. C'est ultra-rapide à coder en pur Python. Tu as des boutons, des menus déroulants, et tu peux y intégrer des fenêtres interactives pour afficher tes graphes (avec </text:span><text:span text:style-name="Source_20_Text"><text:span text:style-name="T7">pyvis</text:span></text:span><text:span text:style-name="T7"> ou </text:span><text:span text:style-name="Source_20_Text"><text:span text:style-name="T7">plotly</text:span></text:span><text:span text:style-name="T7">).</text:span></text:p>
          </text:list-item>
          <text:list-item>
            <text:p text:style-name="P29"><text:span text:style-name="T6">Option Desktop : </text:span><text:span text:style-name="Source_20_Text"><text:span text:style-name="T6">CustomTkinter</text:span></text:span><text:span text:style-name="T6"> ou </text:span><text:span text:style-name="Source_20_Text"><text:span text:style-name="T6">PyQt</text:span></text:span><text:span text:style-name="T7">. Plus traditionnel, si tu veux une application de bureau fenêtrée classique.</text:span></text:p>
          </text:list-item>
        </text:list>
        <text:h text:style-name="P3" text:outline-level="2"><text:soft-page-break/>2. L'adaptation de tes moteurs pour l'Explorer</text:h>
        <text:p text:style-name="P5">Pour que l'outil soit aussi complet que l'explorer existant, tu vas devoir exposer les données de tes scripts actuels sous forme de "fiches d'identité" dynamiques dans ton interface.</text:p>
        <text:h text:style-name="P4" text:outline-level="3">Pilier 1 : Mode EXPLORATION</text:h>
        <text:p text:style-name="P15"><text:span text:style-name="T7">L'utilisateur choisit par exemple </text:span><text:span text:style-name="Source_20_Text"><text:span text:style-name="T7">Acoustic [C]</text:span></text:span><text:span text:style-name="T7">. L'interface doit afficher :</text:span></text:p>
        <text:list xml:id="list1371181168" text:style-name="L7">
          <text:list-item>
            <text:p text:style-name="P30"><text:span text:style-name="T5">Les Modes dérivés :</text:span> (Lydien <text:span text:style-name="T9">b</text:span><text:span text:style-name="T8">7</text:span>, Mixolydien <text:span text:style-name="T9">b</text:span><text:span text:style-name="T8">6</text:span>, etc.). C'est une simple rotation cyclique de ton set de base que tu peux générer à la volée.</text:p>
          </text:list-item>
          <text:list-item>
            <text:p text:style-name="P31"><text:span text:style-name="T5">Les Voisins Directs (Distance 1) :</text:span> Tu filtres les nœuds connectés dans ton graphe complet à la couche 1.</text:p>
          </text:list-item>
          <text:list-item>
            <text:p text:style-name="P31"><text:span text:style-name="T5">Les Voisins Éloignés :</text:span> Tu exposes les couches 2, 3 et plus.</text:p>
          </text:list-item>
        </text:list>
        <text:h text:style-name="P4" text:outline-level="3">Pilier 2 : Mode ANALYSE</text:h>
        <text:p text:style-name="P5">C'est le script que nous venons de finaliser. L'utilisateur clique sur "Ajouter un set", tape sa liste, choisit son centre.</text:p>
        <text:list xml:id="list3561842731" text:style-name="L8">
          <text:list-item>
            <text:p text:style-name="P32">L'application affiche le rapport textuel de la console, mais surtout, elle génère un <text:span text:style-name="T5">graphe visuel interactif</text:span> où les sets isolés apparaissent physiquement raccordés par des flèches pointillées (les routes de secours avec leurs étiquettes de notes).</text:p>
          </text:list-item>
        </text:list>
        <text:h text:style-name="P4" text:outline-level="3">Pilier 3 : Mode COMPOSITION (Aperçu)</text:h>
        <text:p text:style-name="P5">Pour planter la graine de ce mode, il s'agira d'un système de <text:span text:style-name="T5">recommandation de trajectoire</text:span>. L'utilisateur est à la station A, il veut aller à la station B, et la machine lui propose des "accords-pivots" ou des chemins fluides en cours de route pour guider son geste créatif.</text:p>
        <text:h text:style-name="P3" text:outline-level="2">Prochaine étape : On s'attaque à l'interface ?</text:h>
        <text:p text:style-name="P15"><text:span text:style-name="T7">Si tu veux matérialiser cet Explorer, la suite logique est de concevoir le squelette de l'application. On pourrait commencer par créer un prototype d'interface très simple (par exemple avec </text:span><text:span text:style-name="Source_20_Text"><text:span text:style-name="T7">Streamlit</text:span></text:span><text:span text:style-name="T7"> ou </text:span><text:span text:style-name="Source_20_Text"><text:span text:style-name="T7">Tkinter</text:span></text:span><text:span text:style-name="T7">) qui charge tes fonctions </text:span><text:span text:style-name="Source_20_Text"><text:span text:style-name="T7">utility_functions.py</text:span></text:span><text:span text:style-name="T7"> et permet de sélectionner un centre dans un menu déroulant pour afficher ses voisins directs.</text:span></text:p>
        <text:p text:style-name="P5">Qu'en penses-tu ? Quelle technologie d'interface te tente le plus ?</text:p>
      </text:section>
      <text:p text:style-name="P8"/>
      <text:h text:style-name="P7" text:outline-level="3">Pourquoi une interface Web (HTML/CSS/JS) est le meilleur choix</text:h>
      <text:p text:style-name="Text_20_body">Pour un projet de théorie musicale qui nécessite une forte interactivité visuelle (un clavier sur lequel on clique, une portée musicale, un graphe de réseau avec des bulles), les technologies Web sont infiniment supérieures aux bibliothèques Desktop classiques (comme Tkinter ou PyQt) qui sont lourdes à styliser et rigides.</text:p>
      <text:p text:style-name="Text_20_body">Pour lier tes scripts Python existants à du HTML/CSS moderne, tu as deux excellentes voies :</text:p>
      <text:h text:style-name="Heading_20_4" text:outline-level="4">Option A : L'approche "Full Stack légère" avec Flask ou FastAPI (Recommandée)</text:h>
      <text:p text:style-name="Text_20_body">Tu gardes tes fichiers Python intacts dans VS Code. Tu ajoutes un petit fichier <text:span text:style-name="Source_20_Text">app.py</text:span> avec <text:span text:style-name="T5">Flask</text:span> ou <text:span text:style-name="T5">FastAPI</text:span> qui va servir d'intermédiaire (API).</text:p>
      <text:list xml:id="list2361353533" text:style-name="L9">
        <text:list-item>
          <text:p text:style-name="P34"><text:soft-page-break/>Ton interface est un bête fichier <text:span text:style-name="Source_20_Text">index.html</text:span> avec ton CSS personnalisé.</text:p>
        </text:list-item>
        <text:list-item>
          <text:p text:style-name="P34">Quand l'utilisateur clique sur le clavier ou choisit "Diatonic [D]", du JavaScript (<text:span text:style-name="Source_20_Text">fetch</text:span>) envoie l'info à ton script Python.</text:p>
        </text:list-item>
        <text:list-item>
          <text:p text:style-name="P34">Python fait le calcul géométrique (voisins, couches, routes de secours) et renvoie le résultat au HTML qui met à jour l'affichage dynamiquement.</text:p>
        </text:list-item>
        <text:list-item>
          <text:p text:style-name="P34"><text:span text:style-name="T5">Le gros avantage :</text:span> C'est ultra-flexible, tu contrôles le design au pixel près en HTML/CSS, et tu peux utiliser des bibliothèques JavaScript géniales pour afficher tes graphes de gares de manière interactive (comme <text:span text:style-name="Source_20_Text">Vis.js</text:span> ou <text:span text:style-name="Source_20_Text">Cytoscape.js</text:span>).</text:p>
        </text:list-item>
      </text:list>
      <text:h text:style-name="Heading_20_4" text:outline-level="4">Option B : Le compromis rapide avec Streamlit</text:h>
      <text:p text:style-name="Text_20_body">Si tu veux aller très vite sans écrire le squelette HTML toi-même, <text:span text:style-name="T5">Streamlit</text:span> te permet de générer des éléments d'interface (menus, boutons) directement en écrivant du Python. Tu peux quand même y injecter du HTML/CSS personnalisé via une fonction dédiée (<text:span text:style-name="Source_20_Text">st.markdown(..., unsafe_allow_html=True)</text:span>). C'est très bien pour un prototype, mais on se sent parfois un peu limité si on veut un design très spécifique comme l'explorer de ton image.</text:p>
      <text:h text:style-name="Heading_20_3" text:outline-level="3">Comment t'organiser dans VS Code et GitHub ?</text:h>
      <text:p text:style-name="Text_20_body">Tu peux (et tu dois) tout faire directement dans ton dossier de travail actuel dans VS Code. Tout va cohabiter proprement. Ton arborescence GitHub ressemblera simplement à ceci :</text:p>
      <text:p text:style-name="Text_20_body">Plaintext</text:p>
      <text:p text:style-name="Preformatted_20_Text"><text:span text:style-name="Source_20_Text">PressingSetsExplorer-ExtensionProject/</text:span></text:p>
      <text:p text:style-name="Preformatted_20_Text"><text:span text:style-name="Source_20_Text">├── .git/</text:span></text:p>
      <text:p text:style-name="Preformatted_20_Text"><text:span text:style-name="Source_20_Text">├── utility_functions.py <text:s text:c="5"/>&lt;-- Ton moteur géométrique actuel</text:span></text:p>
      <text:p text:style-name="Preformatted_20_Text"><text:span text:style-name="Source_20_Text">├── piece_analyzer.py <text:s text:c="8"/>&lt;-- Ton analyseur Ravel actuel</text:span></text:p>
      <text:p text:style-name="Preformatted_20_Text"><text:span text:style-name="Source_20_Text">├── app.py <text:s text:c="19"/>&lt;-- Ton futur serveur (Flask ou FastAPI)</text:span></text:p>
      <text:p text:style-name="Preformatted_20_Text"><text:span text:style-name="Source_20_Text">├── templates/</text:span></text:p>
      <text:p text:style-name="Preformatted_20_Text"><text:span text:style-name="Source_20_Text">│ <text:s text:c="2"/>└── index.html <text:s text:c="11"/>&lt;-- Ton interface (Structure de l'Explorer)</text:span></text:p>
      <text:p text:style-name="Preformatted_20_Text"><text:span text:style-name="Source_20_Text">└── static/</text:span></text:p>
      <text:p text:style-name="Preformatted_20_Text"><text:span text:style-name="Source_20_Text"><text:s text:c="4"/>├── css/</text:span></text:p>
      <text:p text:style-name="Preformatted_20_Text"><text:span text:style-name="Source_20_Text"><text:s text:c="4"/>│ <text:s text:c="2"/>└── style.css <text:s text:c="8"/>&lt;-- Ton design (Clavier, boutons, couleurs)</text:span></text:p>
      <text:p text:style-name="Preformatted_20_Text"><text:span text:style-name="Source_20_Text"><text:s text:c="4"/>└── js/</text:span></text:p>
      <text:p text:style-name="P11"><text:span text:style-name="Source_20_Text"><text:s text:c="8"/>└── main.js <text:s text:c="10"/>&lt;-- L'interactivité (clics, requêtes vers Python)</text:span></text:p>
      <text:h text:style-name="Heading_20_3" text:outline-level="3">Le plan d'action</text:h>
      <text:p text:style-name="Text_20_body">Puisque tu es chaud pour du HTML/CSS, je te conseille de partir sur la structure <text:span text:style-name="T5">Flask + HTML/CSS/JS</text:span>. C'est propre, hyper gratifiant visuellement, et totalement contrôlable.</text:p>
      <text:p text:style-name="Text_20_body">Pour commencer, on peut coder le fichier <text:span text:style-name="Source_20_Text">app.py</text:span> (le pont) et la première structure HTML de ton mode <text:span text:style-name="T5">Exploration</text:span> (le squelette de la page avec le choix du Centre).</text:p>
      <text:p text:style-name="Text_20_body">Tu es prêt à installer Flask dans ton environnement (<text:span text:style-name="Source_20_Text">pip install flask</text:span>) pour qu'on écrive les premières lignes de l'application ?</text:p>
      <text:p text:style-name="P8"/>
      <text:p text:style-name="P18"><text:soft-page-break/>Parfait, je trouverais un moyen de remédier au problème plus tard. Maintenant, il y a 2 choses que j'aimerais régler avant de passer au mode analyse. D'abord, j'aimerais qu'il y ait un système interactif avec le clavier (pour l'instant il ne fait qu'afficher les notes du set choisi), qu'on puisse entrer les notes directement sur le clavier et qu'avec les notes entrées, le système puisse deviner quel est le set. Par exemple, si on choisit 3 notes, une liste de sets potentiels est donnée en mode "voici les sets dont les notes que tu as donnés sont un subset" ainsi que les notes manquantes pour former chacun de ces sets. Ensuite, le 2e point, c'est que pour les sets symétriques, je préférerais que dès qu'on choisit oct, hex ou wt, les transpositions possibles ne soient pas les 12 notes chromatiques mais les transpositions limitées qui existent dans ces sets (Oct(0, 1), Oct(1, 2), Oct(2, 3), WT0, WT1, Hex(0, 1), Hex(1, 2), Hex(2, 3), Hex(3, 4)).</text:p>
      <text:section text:style-name="Sect1" text:name="user-query-content-14">
        <text:p text:style-name="Text_20_body"><draw:frame draw:style-name="fr1" draw:name="Cadre2" text:anchor-type="char" svg:x="0.353cm" svg:width="0.041cm" draw:z-index="1"><draw:text-box fo:min-height="0.423cm"><text:p text:style-name="Text_20_body"/></draw:text-box></draw:frame></text:p>
      </text:section>
      <text:section text:style-name="Sect2" text:name="model-response-message-contentr_a4efa55c94a5db2e">
        <text:p text:style-name="P15">Ce sont deux évolutions majeures qui vont transformer l'application. On passe d'un simple visualiseur passif à un véritable <text:span text:style-name="T5">moteur d'exploration interactif</text:span>.</text:p>
        <text:p text:style-name="P6">Décomposons le travail. Pour que tout fonctionne de manière robuste, nous allons d'abord implémenter le <text:span text:style-name="T5">Point 1 : Le mode "Recherche par clavier" (Saisie de notes </text:span><text:span text:style-name="T10">→</text:span><text:span text:style-name="T5"> Identification de la collection)</text:span>.</text:p>
        <text:p text:style-name="P5">Pour que l'expérience utilisateur soit fluide, voici la logique retenue :</text:p>
        <text:list xml:id="list1958581087" text:style-name="L10">
          <text:list-item>
            <text:p text:style-name="P33">Dès que l'utilisateur clique sur une touche du piano, on capture l'ensemble des notes sélectionnées.</text:p>
          </text:list-item>
          <text:list-item>
            <text:p text:style-name="P33">Si le clavier contient des notes, on désactive temporairement les sélecteurs classiques (Type/Racine) et on affiche en dessous une liste dynamique semblable à ta capture d'écran, classée par pertinence, affichant les sets parents et les notes manquantes.</text:p>
          </text:list-item>
          <text:list-item>
            <text:p text:style-name="P33">Si l'utilisateur vide le clavier, l'affichage rebascule sur le comportement par défaut (graphe centré).</text:p>
          </text:list-item>
        </text:list>
        <text:h text:style-name="P16" text:outline-level="3"><text:soft-page-break/><text:span text:style-name="T7">🛠️ Étape 1 : Le point d'accès API dans </text:span><text:span text:style-name="Source_20_Text"><text:span text:style-name="T7">app.py</text:span></text:span></text:h>
        <text:p text:style-name="P15"><text:span text:style-name="T7">Ajoute cette nouvelle route dans ton fichier </text:span><text:span text:style-name="Source_20_Text"><text:span text:style-name="T6">app.py</text:span></text:span><text:span text:style-name="T7">. Elle va intercepter la liste de notes envoyée par le clavier, scanner tes 57 gares (</text:span><text:span text:style-name="T11">Pressing Sets</text:span><text:span text:style-name="T7">) et calculer pour chacune d'elles si les notes saisies forment un sous-ensemble (</text:span><text:span text:style-name="T11">subset</text:span><text:span text:style-name="T7">).</text:span></text:p>
        <text:h text:style-name="P16" text:outline-level="3"><text:span text:style-name="T7">🌐 Étape 2 : L'interface HTML dans </text:span><text:span text:style-name="Source_20_Text"><text:span text:style-name="T7">templates/index.html</text:span></text:span></text:h>
        <text:p text:style-name="P5">Pour afficher élégamment cette liste de suggestions sans casser ton design actuel, ajoute une zone dédiée aux résultats sous le conteneur de ton piano (ou dans ta barre latérale).</text:p>
        <text:p text:style-name="P15"><text:span text:style-name="T7">Recherche l'endroit idéal dans ton </text:span><text:span text:style-name="Source_20_Text"><text:span text:style-name="T6">index.html</text:span></text:span><text:span text:style-name="T7"> et insère ce bloc :</text:span></text:p>
        <text:h text:style-name="P16" text:outline-level="3"><text:span text:style-name="T7">⚡ Étape 3 : La logique globale dans </text:span><text:span text:style-name="Source_20_Text"><text:span text:style-name="T7">static/js/main.js</text:span></text:span></text:h>
        <text:p text:style-name="P15"><text:span text:style-name="T7">Voici le script JavaScript complet mis à jour pour remplacer ton fichier </text:span><text:span text:style-name="Source_20_Text"><text:span text:style-name="T6">static/js/main.js</text:span></text:span><text:span text:style-name="T7">. Il gère la double casquette : l'écoute du clic sur le piano pour lancer la recherche inverse, et l'affichage interactif au survol des lignes (la version stable et validée que l'on a finalisée juste avant).</text:span></text:p>
        <text:h text:style-name="P4" text:outline-level="3">Prochaine étape : Les transpositions des Modes à Transpositions Limitées (PMTL)</text:h>
        <text:p text:style-name="P5">Prends le temps d'implémenter cette recherche par clavier et de vérifier que l'affichage des notes manquantes te convient parfaitement.</text:p>
        <text:p text:style-name="P15"><text:span text:style-name="T7">Dès que c'est bon, dis-le moi et nous nous attaquerons au </text:span><text:span text:style-name="T6">Point 2</text:span><text:span text:style-name="T7"> : modifier dynamiquement le contenu du menu racine </text:span><text:span text:style-name="Source_20_Text"><text:span text:style-name="T7">root-select</text:span></text:span><text:span text:style-name="T7"> en JavaScript pour qu'il affiche les vraies appellations structurelles (ex: </text:span><text:span text:style-name="Source_20_Text"><text:span text:style-name="T7">(0,1)</text:span></text:span><text:span text:style-name="T7">, </text:span><text:span text:style-name="Source_20_Text"><text:span text:style-name="T7">(1,2)</text:span></text:span><text:span text:style-name="T7">) lorsque l'utilisateur sélectionne un set symétrique comme l'Octatonique ou le Whole-Tone !</text:span></text:p>
      </text:section>
      <text:p text:style-name="P10"/>
      <text:p text:style-name="P10"/>
      <text:p text:style-name="P10"/>
      <text:p text:style-name="P10"/>
      <text:p text:style-name="P10"/>
      <text:p text:style-name="P10"/>
      <text:p text:style-name="P10"/>
      <text:p text:style-name="P10"/>
      <text:p text:style-name="P10">Problèmes à régler :</text:p>
      <text:p text:style-name="P10">1/ Trouver un moyen d’afficher les notes changeantes « dans le bon sens » (C dia → F dia ne doit pas afficher Bb du côté de C dia)</text:p>
      <text:p text:style-name="P10">2/ Trouver un moyen de vérifier que les sets reliés sont les bons, et que les notes de changement sont correctes <text:soft-page-break/>(grosse vérification à faire dans la logique plus que le visuel)</text:p>
      <text:p text:style-name="P20">3/ Éventuellement modifier utility_functions.py (et par conséquent l’app et main.js) pour qu’au lieu d’utiliser les noms de notes, on utilise les chiffres de la Set Theory</text:p>
      <text:p text:style-name="P20"><text:span text:style-name="T12">4/ Harmoniser les noms de sets affichés dans les boutons Set/Transposition, dans la liste des Sets à partir des Subsets et dans le graphe</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sans-serif"/>
    <style:font-face style:name="Google Sans Text" svg:font-family="'Google Sans Text',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01T14:33:54.032000000</meta:creation-date>
    <dc:date>2026-07-03T15:31:44.031000000</dc:date>
    <meta:editing-duration>PT6H51S</meta:editing-duration>
    <meta:editing-cycles>7</meta:editing-cycles>
    <meta:generator>LibreOffice/7.2.5.2$Windows_X86_64 LibreOffice_project/499f9727c189e6ef3471021d6132d4c694f357e5</meta:generator>
    <meta:document-statistic meta:table-count="0" meta:image-count="0" meta:object-count="0" meta:page-count="8" meta:paragraph-count="119" meta:word-count="2484" meta:character-count="15367" meta:non-whitespace-character-count="12911"/>
  </office:meta>
</office:document-meta>
</file>