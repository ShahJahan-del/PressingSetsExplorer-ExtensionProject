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Heading_20_3">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officeooo:rsid="00157ff7" officeooo:paragraph-rsid="00157ff7"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officeooo:rsid="0018902e" officeooo:paragraph-rsid="0018902e"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fo:font-weight="bold" officeooo:rsid="001a4c58" officeooo:paragraph-rsid="001a4c58"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1ecbb3" officeooo:paragraph-rsid="001ecbb3"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18" style:family="paragraph" style:parent-style-name="Heading_20_3">
      <style:text-properties fo:font-size="20pt" style:font-size-asian="20pt" style:font-size-complex="20pt"/>
    </style:style>
    <style:style style:name="P19" style:family="paragraph" style:parent-style-name="Preformatted_20_Text">
      <style:paragraph-properties fo:margin-top="0cm" fo:margin-bottom="0.499cm" style:contextual-spacing="false"/>
    </style:style>
    <style:style style:name="P20" style:family="paragraph" style:parent-style-name="Preformatted_20_Text">
      <style:paragraph-properties fo:margin-top="0cm" fo:margin-bottom="0cm" style:contextual-spacing="false" fo:line-height="114%"/>
    </style:style>
    <style:style style:name="P21" style:family="paragraph" style:parent-style-name="Text_20_body">
      <style:paragraph-properties fo:margin-top="0cm" fo:margin-bottom="0.247cm" style:contextual-spacing="false" fo:line-height="114%"/>
      <style:text-properties style:font-name="Google Sans Text"/>
    </style:style>
    <style:style style:name="P22"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text-indent="0cm" style:auto-text-indent="false"/>
    </style:style>
    <style:style style:name="P24" style:family="paragraph" style:parent-style-name="Heading_20_3">
      <style:paragraph-properties fo:margin-left="0cm" fo:margin-right="0cm" fo:margin-top="0.423cm" fo:margin-bottom="0cm" style:contextual-spacing="false" fo:text-indent="0cm" style:auto-text-indent="false"/>
    </style:style>
    <style:style style:name="P25"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6"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27" style:family="paragraph" style:parent-style-name="Heading_20_3">
      <style:paragraph-properties fo:margin-top="0cm" fo:margin-bottom="0.247cm" style:contextual-spacing="false" fo:line-height="114%"/>
    </style:style>
    <style:style style:name="P28" style:family="paragraph" style:parent-style-name="Standard">
      <style:paragraph-properties fo:text-align="start" style:justify-single-word="false"/>
      <style:text-properties fo:font-size="20pt" fo:font-weight="bold" officeooo:rsid="0011900d" officeooo:paragraph-rsid="0011900d" style:font-size-asian="20pt" style:font-weight-asian="bold" style:font-size-complex="20pt" style:font-weight-complex="bold"/>
    </style:style>
    <style:style style:name="P29"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a933" loext:opacity="100%" fo:font-size="20pt" fo:font-weight="bold" officeooo:rsid="000d9049" officeooo:paragraph-rsid="000d9049"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a933" loext:opacity="100%" fo:font-size="20pt" fo:font-weight="bold" officeooo:rsid="000fd799" officeooo:paragraph-rsid="0011900d"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a933" loext:opacity="100%" fo:font-size="20pt" fo:font-weight="bold" officeooo:rsid="001a92e9" officeooo:paragraph-rsid="001a92e9" style:font-size-asian="20pt" style:font-weight-asian="bold" style:font-size-complex="20pt" style:font-weight-complex="bold"/>
    </style:style>
    <style:style style:name="P33"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34"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35"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36"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37"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38" style:family="paragraph" style:parent-style-name="Text_20_body">
      <style:paragraph-properties fo:margin-top="0cm" fo:margin-bottom="0.247cm" style:contextual-spacing="false" fo:line-height="114%"/>
      <style:text-properties style:font-name="Google Sans Text"/>
    </style:style>
    <style:style style:name="P39" style:family="paragraph" style:parent-style-name="Text_20_body" style:list-style-name="L19">
      <style:paragraph-properties fo:margin-top="0cm" fo:margin-bottom="0.247cm" style:contextual-spacing="false" fo:line-height="114%" fo:padding="0cm" fo:border="none"/>
      <style:text-properties style:font-name="Google Sans Text"/>
    </style:style>
    <style:style style:name="P40" style:family="paragraph" style:parent-style-name="Text_20_body" style:list-style-name="L20">
      <style:paragraph-properties fo:margin-top="0cm" fo:margin-bottom="0.247cm" style:contextual-spacing="false" fo:line-height="114%" fo:padding="0cm" fo:border="none"/>
      <style:text-properties style:font-name="Google Sans Text"/>
    </style:style>
    <style:style style:name="P41" style:family="paragraph" style:parent-style-name="Text_20_body" style:list-style-name="L21">
      <style:paragraph-properties fo:margin-top="0cm" fo:margin-bottom="0.247cm" style:contextual-spacing="false" fo:line-height="114%" fo:padding="0cm" fo:border="none"/>
      <style:text-properties style:font-name="Google Sans Text"/>
    </style:style>
    <style:style style:name="P42" style:family="paragraph" style:parent-style-name="Text_20_body">
      <style:paragraph-properties fo:text-align="start" style:justify-single-word="false"/>
      <style:text-properties style:font-name="Google Sans Text" fo:font-size="20pt" fo:font-weight="bold" officeooo:rsid="001f11df" officeooo:paragraph-rsid="001ecbb3" style:font-size-asian="20pt" style:font-weight-asian="bold" style:font-size-complex="20pt" style:font-weight-complex="bold"/>
    </style:style>
    <style:style style:name="P43" style:family="paragraph" style:parent-style-name="Text_20_body" style:list-style-name="L2">
      <style:paragraph-properties fo:margin-top="0cm" fo:margin-bottom="0.247cm" style:contextual-spacing="false" fo:line-height="114%" fo:padding="0cm" fo:border="none"/>
    </style:style>
    <style:style style:name="P44" style:family="paragraph" style:parent-style-name="Text_20_body" style:list-style-name="L3">
      <style:paragraph-properties fo:margin-top="0cm" fo:margin-bottom="0.247cm" style:contextual-spacing="false" fo:line-height="114%" fo:padding="0cm" fo:border="none"/>
    </style:style>
    <style:style style:name="P45" style:family="paragraph" style:parent-style-name="Text_20_body" style:list-style-name="L5">
      <style:paragraph-properties fo:margin-top="0cm" fo:margin-bottom="0.247cm" style:contextual-spacing="false" fo:line-height="114%" fo:padding="0cm" fo:border="none"/>
    </style:style>
    <style:style style:name="P46" style:family="paragraph" style:parent-style-name="Text_20_body">
      <style:paragraph-properties fo:margin-top="0cm" fo:margin-bottom="0.247cm" style:contextual-spacing="false" fo:line-height="114%"/>
    </style:style>
    <style:style style:name="P47" style:family="paragraph" style:parent-style-name="Text_20_body" style:list-style-name="L20">
      <style:paragraph-properties fo:margin-top="0cm" fo:margin-bottom="0.247cm" style:contextual-spacing="false" fo:line-height="114%" fo:padding="0cm" fo:border="none"/>
    </style:style>
    <style:style style:name="P48"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9"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50"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51"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list-style-name="L9"/>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2458b"/>
    </style:style>
    <style:style style:name="T13" style:family="text">
      <style:text-properties officeooo:rsid="0016599f"/>
    </style:style>
    <style:style style:name="T14" style:family="text">
      <style:text-properties officeooo:rsid="001fe92f"/>
    </style:style>
    <style:style style:name="T15" style:family="text">
      <style:text-properties style:font-name="Google Sans"/>
    </style:style>
    <style:style style:name="T16" style:family="text">
      <style:text-properties officeooo:rsid="0023a78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22"/>
      <text:p text:style-name="P22">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21">Voici l'inventaire complet des briques techniques, mathématiques et graphiques dont nous allons avoir besoin pour coder cet outil.</text:p>
      <text:h text:style-name="P1" text:outline-level="2">1. L'Infrastructure Technique (Le Moteur Graphique &amp; Web)</text:h>
      <text:p text:style-name="P21">Pour que cet outil soit agréable à utiliser, il lui faut une interface visuelle fluide avec deux zones : une zone de saisie (piano/boutons) et une zone d'affichage (le graphe).</text:p>
      <text:list xml:id="list3692952995" text:style-name="L1">
        <text:list-item>
          <text:p text:style-name="P33"><text:span text:style-name="T5">Le Framework principal :</text:span> <text:span text:style-name="T5">Python avec Dash (Plotly)</text:span> ou <text:span text:style-name="T5">Streamlit</text:span>.</text:p>
          <text:list>
            <text:list-item>
              <text:p text:style-name="P33"><text:span text:style-name="T1">Pourquoi ?</text:span> Ils permettent de coder une interface Web moderne entièrement en Python, sans avoir à manipuler du JavaScript/HTML/CSS complexe.</text:p>
            </text:list-item>
          </text:list>
        </text:list-item>
        <text:list-item>
          <text:p text:style-name="P33"><text:span text:style-name="T5">Le Moteur de Graphe Interactif :</text:span> <text:span text:style-name="T5">Pyvis</text:span> ou <text:span text:style-name="T5">Plotly Network Graphs</text:span>.</text:p>
          <text:list>
            <text:list-item>
              <text:p text:style-name="P33"><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33"><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21">C'est ici qu'on injecte la logique de Tymoczko pour relier les stations. Le code doit manipuler des objets mathématiques stricts :</text:p>
      <text:list xml:id="list2173830757" text:style-name="L2">
        <text:list-item>
          <text:p text:style-name="P43"><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34"><text:span text:style-name="T5">La Matrice d'Adjacence (Calcul des lignes de métro) :</text:span> Un algorithme qui tourne en arrière-plan et qui calcule pour n'importe quel couple de Sets :</text:p>
          <text:list>
            <text:list-item>
              <text:p text:style-name="P34">Le nombre exact de <text:span text:style-name="T5">pivots</text:span> (intersections d'ensembles).</text:p>
            </text:list-item>
            <text:list-item>
              <text:p text:style-name="P34">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21">Ton application devra gérer deux modes de fonctionnement distincts :</text:p>
      <text:h text:style-name="P2" text:outline-level="3"><text:soft-page-break/>Mode A : "L'Analyseur de Partitions" (Mode statique)</text:h>
      <text:list xml:id="list2404279586" text:style-name="L3">
        <text:list-item>
          <text:p text:style-name="P35"><text:span text:style-name="T5">Ce qu'il prend :</text:span> Ton fichier JSON de 159 lignes réelles (ou plus).</text:p>
        </text:list-item>
        <text:list-item>
          <text:p text:style-name="P44"><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7246562" text:style-name="L4">
        <text:list-item>
          <text:p text:style-name="P36"><text:span text:style-name="T5">Ce qu'il prend :</text:span> Une sélection instantanée sur ton piano virtuel (ton Set de départ).</text:p>
        </text:list-item>
        <text:list-item>
          <text:p text:style-name="P36"><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21">Pour que le code sache identifier les "stations", il nous faut un dictionnaire géométrique étendu (bien plus complet que notre version précédente). Il contiendra la structure fondamentale de chaque couleur harmonique :</text:p>
      <text:p text:style-name="P21">Python</text:p>
      <text:p text:style-name="P20"><text:span text:style-name="Source_20_Text"><text:span text:style-name="T2">DICTIONNAIRE_DES_SETS = {</text:span></text:span></text:p>
      <text:p text:style-name="P20"><text:span text:style-name="Source_20_Text"><text:s text:c="4"/></text:span><text:span text:style-name="Source_20_Text"><text:span text:style-name="T2">"Diatonic": [0, 2, 4, 5, 7, 9, 11],</text:span></text:span></text:p>
      <text:p text:style-name="P20"><text:span text:style-name="Source_20_Text"><text:s text:c="4"/></text:span><text:span text:style-name="Source_20_Text"><text:span text:style-name="T2">"Acoustic": [0, 2, 4, 6, 7, 9, 10],</text:span></text:span></text:p>
      <text:p text:style-name="P20"><text:span text:style-name="Source_20_Text"><text:s text:c="4"/></text:span><text:span text:style-name="Source_20_Text"><text:span text:style-name="T2">"Whole Tone": [0, 2, 4, 6, 8, 10],</text:span></text:span></text:p>
      <text:p text:style-name="P20"><text:span text:style-name="Source_20_Text"><text:s text:c="4"/></text:span><text:span text:style-name="Source_20_Text"><text:span text:style-name="T2">"Octatonic": [0, 1, 3, 4, 6, 7, 9, 10],</text:span></text:span></text:p>
      <text:p text:style-name="P20"><text:span text:style-name="Source_20_Text"><text:s text:c="4"/></text:span><text:span text:style-name="Source_20_Text"><text:span text:style-name="T2">"Hexatonic": [0, 1, 4, 5, 8, 9],</text:span></text:span></text:p>
      <text:p text:style-name="P20"><text:span text:style-name="Source_20_Text"><text:s text:c="4"/></text:span><text:span text:style-name="Source_20_Text"><text:span text:style-name="T2">"Harmonic Minor": [0, 2, 3, 5, 7, 8, 11],</text:span></text:span></text:p>
      <text:p text:style-name="P20"><text:span text:style-name="Source_20_Text"><text:s text:c="4"/></text:span><text:span text:style-name="Source_20_Text"><text:span text:style-name="T2">"Harmonic Major": [0, 2, 4, 5, 7, 8, 11],</text:span></text:span></text:p>
      <text:p text:style-name="P20"><text:span text:style-name="Source_20_Text"><text:s text:c="4"/></text:span><text:span text:style-name="Source_20_Text"><text:span text:style-name="T2"># On pourra ajouter les modes de Messiaen ou les sous-ensembles pentatoniques</text:span></text:span></text:p>
      <text:p text:style-name="P20"><text:span text:style-name="Source_20_Text"><text:span text:style-name="T2">}</text:span></text:span></text:p>
      <text:h text:style-name="P1" text:outline-level="2">Feu de route : Par quoi on commence ?</text:h>
      <text:p text:style-name="P21">Pour ne pas s'éparpiller, je te suggère de construire l'outil en trois étapes simples :</text:p>
      <text:list xml:id="list436675241" text:style-name="L5">
        <text:list-item>
          <text:p text:style-name="P37"><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45"><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37"><text:span text:style-name="T5">Étape 3 (L'Interface Web) :</text:span> Coder le piano visuel et l'associer au graphe pour que cliquer sur une touche du piano mette à jour le réseau en temps réel.</text:p>
        </text:list-item>
      </text:list>
      <text:p text:style-name="P21">Es-tu d'accord avec cet inventaire ? Si oui, on peut attaquer directement le code de l'<text:span text:style-name="T5">Étape 1</text:span> pour poser les fondations mathématiques de ton Explorer.</text:p>
      <text:p text:style-name="P8"/>
      <text:p text:style-name="P25"><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23">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4188762121" text:style-name="L6">
          <text:list-item>
            <text:p text:style-name="P48"><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48"><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23"><text:span text:style-name="T7">L'utilisateur choisit par exemple </text:span><text:span text:style-name="Source_20_Text"><text:span text:style-name="T7">Acoustic [C]</text:span></text:span><text:span text:style-name="T7">. L'interface doit afficher :</text:span></text:p>
        <text:list xml:id="list121169912" text:style-name="L7">
          <text:list-item>
            <text:p text:style-name="P49"><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50"><text:span text:style-name="T5">Les Voisins Directs (Distance 1) :</text:span> Tu filtres les nœuds connectés dans ton graphe complet à la couche 1.</text:p>
          </text:list-item>
          <text:list-item>
            <text:p text:style-name="P50"><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68796291" text:style-name="L8">
          <text:list-item>
            <text:p text:style-name="P51">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23"><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692572979" text:style-name="L9">
        <text:list-item>
          <text:p text:style-name="P53"><text:soft-page-break/>Ton interface est un bête fichier <text:span text:style-name="Source_20_Text">index.html</text:span> avec ton CSS personnalisé.</text:p>
        </text:list-item>
        <text:list-item>
          <text:p text:style-name="P53">Quand l'utilisateur clique sur le clavier ou choisit "Diatonic [D]", du JavaScript (<text:span text:style-name="Source_20_Text">fetch</text:span>) envoie l'info à ton script Python.</text:p>
        </text:list-item>
        <text:list-item>
          <text:p text:style-name="P53">Python fait le calcul géométrique (voisins, couches, routes de secours) et renvoie le résultat au HTML qui met à jour l'affichage dynamiquement.</text:p>
        </text:list-item>
        <text:list-item>
          <text:p text:style-name="P53"><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9"><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26"><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23">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2086885319" text:style-name="L10">
          <text:list-item>
            <text:p text:style-name="P52">Dès que l'utilisateur clique sur une touche du piano, on capture l'ensemble des notes sélectionnées.</text:p>
          </text:list-item>
          <text:list-item>
            <text:p text:style-name="P52">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52">Si l'utilisateur vide le clavier, l'affichage rebascule sur le comportement par défaut (graphe centré).</text:p>
          </text:list-item>
        </text:list>
        <text:h text:style-name="P24" text:outline-level="3"><text:soft-page-break/><text:span text:style-name="T7">🛠️ Étape 1 : Le point d'accès API dans </text:span><text:span text:style-name="Source_20_Text"><text:span text:style-name="T7">app.py</text:span></text:span></text:h>
        <text:p text:style-name="P23"><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24"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23"><text:span text:style-name="T7">Recherche l'endroit idéal dans ton </text:span><text:span text:style-name="Source_20_Text"><text:span text:style-name="T6">index.html</text:span></text:span><text:span text:style-name="T7"> et insère ce bloc :</text:span></text:p>
        <text:h text:style-name="P24" text:outline-level="3"><text:span text:style-name="T7">⚡ Étape 3 : La logique globale dans </text:span><text:span text:style-name="Source_20_Text"><text:span text:style-name="T7">static/js/main.js</text:span></text:span></text:h>
        <text:p text:style-name="P23"><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23"><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2">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19"><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19"><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19"><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19"><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19"><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h text:style-name="P11"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870973909" text:style-name="L11">
        <text:list-item>
          <text:p text:style-name="P54">Prendre cette liste de sets saisis.</text:p>
        </text:list-item>
        <text:list-item>
          <text:p text:style-name="P54">Repérer s'ils sont connectés directement, ou calculer les "routes de secours" (les stations pivots manquantes) pour lier les blocs isolés (les fameux archipels).</text:p>
        </text:list-item>
        <text:list-item>
          <text:p text:style-name="P54"><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1444474705" text:style-name="L12">
        <text:list-item>
          <text:p text:style-name="P55"><text:span text:style-name="T5">Le Front-end (HTML/UI) :</text:span> Ajouter un système d'onglets (Tabs) en haut de ta page pour basculer entre le mode "Exploration" et le mode "Analyse".</text:p>
        </text:list-item>
        <text:list-item>
          <text:p text:style-name="P55"><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5"><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text:soft-page-break/>dans notre toute première discussion), ou est-ce qu'on doit d'abord regarder comment structurer la route dans <text:span text:style-name="Source_20_Text">app.py</text:span> ?</text:p>
      <text:p text:style-name="Text_20_body">Si tu l'as, tu peux me la partager, sinon dis-moi et on commence par préparer l'interface à onglets dans le HTML !</text:p>
      <text:p text:style-name="P10"/>
      <text:p text:style-name="P12">C’est le moment parfait pour basculer sur le Mode Analyse.</text:p>
      <text:section text:style-name="Sect2" text:name="model-response-message-contentr_7c1e1cbe845f66f1">
        <text:p text:style-name="Text_20_body">Puisque nous avons choisi une architecture <text:span text:style-name="T5">Web (Flask + JS/HTML/CSS avec Vis.js)</text:span> plutôt que Streamlit ou Tkinter, l'implémentation va être super fluide. Nous allons pouvoir réutiliser tout le moteur graphique interactif que nous venons de stabiliser pour l'Exploration.</text:p>
        <text:h text:style-name="Heading_20_3"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273822439" text:style-name="L13">
          <text:list-item>
            <text:p text:style-name="P56">Prendre cette liste de sets saisis.</text:p>
          </text:list-item>
          <text:list-item>
            <text:p text:style-name="P56">Repérer s'ils sont connectés directement, ou calculer les "routes de secours" (les stations pivots manquantes) pour lier les blocs isolés (les fameux archipels).</text:p>
          </text:list-item>
          <text:list-item>
            <text:p text:style-name="P56"><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3222485409" text:style-name="L14">
          <text:list-item>
            <text:p text:style-name="P57"><text:span text:style-name="T5">Le Front-end (HTML/UI) :</text:span> Ajouter un système d'onglets (Tabs) en haut de ta page pour basculer entre le mode "Exploration" et le mode "Analyse".</text:p>
          </text:list-item>
          <text:list-item>
            <text:p text:style-name="P57"><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7"><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dans notre toute première discussion), ou est-ce qu'on doit d'abord regarder comment structurer la route dans <text:span text:style-name="Source_20_Text">app.py</text:span> ?</text:p>
        <text:p text:style-name="Text_20_body"><text:soft-page-break/>Si tu l'as, tu peux me la partager, sinon dis-moi et on commence par préparer l'interface à onglets dans le HTML !</text:p>
      </text:section>
      <text:p text:style-name="P12">Voici le résumé complet de l'architecture que nous avons mise en place pour implémenter et stabiliser ce mode Analyse :</text:p>
      <text:h text:style-name="Heading_20_3" text:outline-level="3">1. Robustesse et standardisation des données (<text:span text:style-name="Source_20_Text">app.py</text:span>)</text:h>
      <text:list xml:id="list2450480180" text:style-name="L15">
        <text:list-item>
          <text:p text:style-name="P58"><text:span text:style-name="T5">Aplatissement en chaînes de caractères (</text:span><text:span text:style-name="Source_20_Text"><text:span text:style-name="T5">str()</text:span></text:span><text:span text:style-name="T5">) :</text:span> Pour éliminer la cause principale de plantage (le mélange entre les types de données musicaux internes de ton moteur et l'interface), toutes les entités envoyées à Vis.js sont converties à la volée en texte standardisé.</text:p>
        </text:list-item>
        <text:list-item>
          <text:p text:style-name="P58"><text:span text:style-name="T5">Extraction directe depuis le graphe :</text:span> Au lieu de recalculer artificiellement les arêtes directes de la pièce dans le script de l'application, nous lisons directement la structure interne générée par <text:span text:style-name="Source_20_Text">pa.build_piece_harmonic_graph</text:span>.</text:p>
        </text:list-item>
        <text:list-item>
          <text:p text:style-name="P58"><text:span text:style-name="T5">Raccordement dynamique des "Éco-pathways" :</text:span> Nous récupérons le dictionnaire du rapport d'archipels (<text:span text:style-name="Source_20_Text">archipelago_routes</text:span>) pour tracer en pointillés les routes de secours indirectes (liaisons absolues ou relatives) calculées par ton algorithme, en injectant dynamiquement des nœuds virtuels "en losange" lorsque le chemin emprunte une station absente du morceau.</text:p>
        </text:list-item>
      </text:list>
      <text:h text:style-name="Heading_20_3" text:outline-level="3">2. Épuration et esthétique visuelle (Graphe Vis.js)</text:h>
      <text:list xml:id="list1654902045" text:style-name="L16">
        <text:list-item>
          <text:p text:style-name="P59"><text:span text:style-name="T5">Code couleur par familles restauré :</text:span> En transmettant uniquement l'étiquette de groupe (<text:span text:style-name="Source_20_Text">group: family</text:span>) sans écraser de propriété de couleur brute côté Python, nous avons permis à Vis.js d'appliquer ton dictionnaire de styles natif (<text:span text:style-name="Source_20_Text">Diatonic</text:span> en bleu, <text:span text:style-name="Source_20_Text">Acoustic</text:span> en bleu-vert, etc.) aux sets du morceau, même s'ils sont isolés.</text:p>
        </text:list-item>
        <text:list-item>
          <text:p text:style-name="P59"><text:span text:style-name="T5">Aplatissement des doublons directionnels :</text:span> Les routes aller-retour parallèles ont été fusionnées en arêtes uniques et épurées en désactivant les flèches graphiques (<text:span text:style-name="Source_20_Text">arrows: ""</text:span>), la nature réversible et bidirectionnelle des relations de voix étant déjà prise en charge au survol.</text:p>
        </text:list-item>
        <text:list-item>
          <text:p text:style-name="P59"><text:span text:style-name="T5">Une couleur par itinéraire d'archipel :</text:span> Les liaisons directes du morceau sont unifiées avec une couleur discrète (<text:span text:style-name="Source_20_Text">#84cc16</text:span>), tandis que chaque trajet reliant un îlot isolé au maillage principal génère sa propre couleur aléatoire, permettant de suivre les dérives harmoniques d'un seul coup d'œil.</text:p>
        </text:list-item>
        <text:list-item>
          <text:p text:style-name="P59"><text:span text:style-name="T5">Allègement textuel :</text:span> Les étiquettes encombrantes sur les flèches ont été supprimées au profit d'un affichage minimaliste au survol (ex: <text:span text:style-name="Source_20_Text">G ⇄ Ab</text:span>).</text:p>
        </text:list-item>
      </text:list>
      <text:h text:style-name="Heading_20_3" text:outline-level="3">3. Interface et Confort d'utilisation (HTML / CSS / JS)</text:h>
      <text:list xml:id="list2421273722" text:style-name="L17">
        <text:list-item>
          <text:p text:style-name="P60"><text:span text:style-name="T5">Destruction propre de l'instance du réseau :</text:span> Ajout d'une vérification stricte sur la variable globale (<text:span text:style-name="Source_20_Text">typeof network !== 'undefined'</text:span>) avant d'appeler <text:soft-page-break/><text:span text:style-name="Source_20_Text">network.destroy()</text:span>, évitant les crashs silencieux lors de la reconstruction de la topologie.</text:p>
        </text:list-item>
        <text:list-item>
          <text:p text:style-name="P60"><text:span text:style-name="T5">Légende contextuelle dynamique :</text:span> Création d'une légende flottante masquée par défaut au démarrage (<text:span text:style-name="Source_20_Text">display: none</text:span>), qui apparaît uniquement lorsque l'utilisateur bascule sur l'onglet d'analyse et documente la sémantique des cercles, des losanges et des pointillés.</text:p>
        </text:list-item>
      </text:list>
      <text:h text:style-name="P18" text:outline-level="3"/>
      <text:h text:style-name="P18" text:outline-level="3"/>
      <text:h text:style-name="P18" text:outline-level="3"/>
      <text:h text:style-name="P18" text:outline-level="3">Prochaine étape : Le Mode Composition</text:h>
      <text:p text:style-name="Text_20_body">Le terrain est désormais parfaitement balisé. Quand tu es prêt, dis-moi ce que tu imagines pour ce mode <text:span text:style-name="T5">Composition</text:span> :</text:p>
      <text:list xml:id="list326431162" text:style-name="L18">
        <text:list-item>
          <text:p text:style-name="P61">S'agit-il d'aider l'utilisateur à choisir le <text:span text:style-name="T1">prochain</text:span> meilleur set à ajouter en fonction de règles harmoniques strictes ?</text:p>
        </text:list-item>
        <text:list-item>
          <text:p text:style-name="P61">Veux-tu utiliser le piano virtuel pour générer ou tester des accords en temps réel au sein de la topologie ?</text:p>
        </text:list-item>
        <text:list-item>
          <text:p text:style-name="P61">Quelle va être l'interaction attendue avec le graphe ?</text:p>
        </text:list-item>
      </text:list>
      <text:p text:style-name="P10"/>
      <text:p text:style-name="P10"/>
      <text:p text:style-name="P10"/>
      <text:p text:style-name="P10"/>
      <text:p text:style-name="P10"/>
      <text:p text:style-name="P10"/>
      <text:p text:style-name="P10"/>
      <text:p text:style-name="P10">Problèmes à régler :</text:p>
      <text:p text:style-name="P30">1/ Trouver un moyen d’afficher les notes changeantes « dans le bon sens » (C dia → F dia ne doit pas afficher Bb du côté de C dia) <text:span text:style-name="T16">(le sens n’est pas réglé mais la double-flèche suffit, l’utilisateur regardera lui-même le sens correct du changement)</text:span></text:p>
      <text:p text:style-name="P30">2/ Trouver un moyen de vérifier que les sets reliés sont les bons, et que les notes de changement sont correctes <text:soft-page-break/>(grosse vérification à faire dans la logique plus que le visuel, <text:span text:style-name="T13">en particulier pour les changements de cardinalités</text:span>)</text:p>
      <text:p text:style-name="P31">3/ Éventuellement modifier utility_functions.py (et par conséquent l’app et main.js) pour <text:span text:style-name="T12">utiliser les chiffres pour la logique et les noms pour le visuel</text:span></text:p>
      <text:p text:style-name="P28">4/ Harmoniser les noms de sets affichés dans les boutons Set/Transposition, dans la liste des Sets à partir des Subsets et dans le graphe</text:p>
      <text:p text:style-name="P13">5/ Ajouter des sons (gammes ou extraits de morceaux?) pour les modes</text:p>
      <text:p text:style-name="P14">6/ Ajouter les lettres devant les noms des modes</text:p>
      <text:p text:style-name="P15">7/ Ajouter un système permettant de choisir ses propres couleurs pour chaque Set (éviter d’imposer mon interprétation)</text:p>
      <text:p text:style-name="P32">8/ Il y a des cas où les routes vers les sets isolés changent à chaque essai (même nombre de notes qui changent, donc il faut les afficher toutes s’il y en a plusieurs)</text:p>
      <text:p text:style-name="P16">9/ Séparer les visuels de chaque onglet (exploration, analyse, composition). Sauvegarder les graphes de chaque onglet pour éviter d’avoir à les recréer à chaque fois qu’on change d’onglet</text:p>
      <text:p text:style-name="P17">10/ Ajouter un<text:span text:style-name="T14">e case</text:span> dans l’onglet exploration pour dire qu’un double clic sur un set le rend central</text:p>
      <text:p text:style-name="P17"/>
      <text:p text:style-name="P42">Pour avancer efficacement et éviter de s'emmêler les pinceaux, nous allons les traiter par blocs logiques. Voici comment nous pouvons les regrouper :</text:p>
      <text:h text:style-name="P27" text:outline-level="3">📦 <text:span text:style-name="T15">Bloc A : Précision Musicale &amp; Algorithmique (Points 1, 2, 3 &amp; 8)</text:span></text:h>
      <text:p text:style-name="P21">C'est le cœur du moteur (la logique pure dans tes fichiers Python).</text:p>
      <text:list xml:id="list3487039617" text:style-name="L19">
        <text:list-item>
          <text:p text:style-name="P39"><text:soft-page-break/><text:span text:style-name="T5">Point 3 (Chiffres vs Noms) :</text:span> C'est le point de départ idéal. On bascule toute la tuyauterie interne en <text:span text:style-name="T1">Pitch Class Integers</text:span> (0 à 11) pour sécuriser les calculs, et on ne convertit en lettres (C, D#, F...) qu'au moment de l'affichage.</text:p>
        </text:list-item>
        <text:list-item>
          <text:p text:style-name="P39"><text:span text:style-name="T5">Points 1 &amp; 2 (Sens des flèches &amp; Cardinalités) :</text:span> En passant aux chiffres, la détection des notes qui bougent entre deux sets de tailles différentes (ex: un set de 7 notes vers un set de 6 notes) devient mathématiquement infaillible. On pourra s'assurer que si $A \to B$ implique $B \flat \to B$, l'affichage ne montre pas $B \flat$ comme appartenant à $A$.</text:p>
        </text:list-item>
        <text:list-item>
          <text:p text:style-name="P39"><text:span text:style-name="T5">Point 8 (Routes multiples/Ex-æquo) :</text:span> Si deux chemins de secours vers un îlot isolé ont la même distance harmonique (ex: 2 notes qui changent dans les deux cas), l'algorithme doit renvoyer une liste de routes au lieu d'en choisir une arbitrairement, et on les affichera toutes en pointillés parallèles.</text:p>
        </text:list-item>
      </text:list>
      <text:h text:style-name="P27" text:outline-level="3">📦 <text:span text:style-name="T15">Bloc B : UI, Confort &amp; Personnalisation (Points 4, 6, 7, 9 &amp; 10)</text:span></text:h>
      <text:p text:style-name="P46"><text:span text:style-name="T2">C'est la consolidation de l'interface graphique (</text:span><text:span text:style-name="Source_20_Text"><text:span text:style-name="T2">main.js</text:span></text:span><text:span text:style-name="T2"> et tes fichiers HTML/CSS).</text:span></text:p>
      <text:list xml:id="list1316019640" text:style-name="L20">
        <text:list-item>
          <text:p text:style-name="P47"><text:span text:style-name="T3">Point 9 (Persistance des onglets) :</text:span><text:span text:style-name="T2"> Actuellement, basculer d'un onglet à l'autre détruit le réseau. On va modifier le JS pour créer </text:span><text:span text:style-name="T3">trois instances Vis.js distinctes</text:span><text:span text:style-name="T2"> (</text:span><text:span text:style-name="Source_20_Text"><text:span text:style-name="T2">networkExplore</text:span></text:span><text:span text:style-name="T2">, </text:span><text:span text:style-name="Source_20_Text"><text:span text:style-name="T2">networkAnalyze</text:span></text:span><text:span text:style-name="T2">, </text:span><text:span text:style-name="Source_20_Text"><text:span text:style-name="T2">networkCompose</text:span></text:span><text:span text:style-name="T2">) liées à des conteneurs cachés/affichés dynamiquement. Changer d'onglet ne fera plus perdre ton travail.</text:span></text:p>
        </text:list-item>
        <text:list-item>
          <text:p text:style-name="P47"><text:span text:style-name="T3">Point 7 (Sélecteur de couleurs) :</text:span><text:span text:style-name="T2"> On va ajouter un petit panneau de configuration (ou un bouton d'engrenage) permettant à l'utilisateur d'ouvrir un </text:span><text:span text:style-name="T4">Color Picker</text:span><text:span text:style-name="T2"> HTML pour modifier la couleur associée à "Diatonic", "Octatonic", etc., et mettre à jour le dictionnaire </text:span><text:span text:style-name="Source_20_Text"><text:span text:style-name="T2">groups</text:span></text:span><text:span text:style-name="T2"> en temps réel.</text:span></text:p>
        </text:list-item>
        <text:list-item>
          <text:p text:style-name="P40"><text:span text:style-name="T5">Points 4, 6 &amp; 10 (Harmonisation &amp; Raccourcis) :</text:span> Uniformiser les labels textuels (ex: ajouter les numéros Forte ou lettres de classification) et implémenter l'option <text:span text:style-name="T1">"Double-clic = Définir comme centre"</text:span> via une simple case à cocher (Checkbox) dans l'exploration.</text:p>
        </text:list-item>
      </text:list>
      <text:h text:style-name="P27" text:outline-level="3">📦 <text:span text:style-name="T15">Bloc C : Multimédia (Point 5)</text:span></text:h>
      <text:list xml:id="list3385583910" text:style-name="L21">
        <text:list-item>
          <text:p text:style-name="P41"><text:span text:style-name="T5">Point 5 (Sons) :</text:span> Utiliser l'API audio native du navigateur (Web Audio API) ou une bibliothèque ultra-légère pour jouer la collection de notes du Set (sous forme d'arpège ou d'accord) lorsqu'on clique dessus.</text:p>
        </text:list-item>
      </text:list>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8T14:53:22.786000000</dc:date>
    <meta:editing-duration>PT14H8M58S</meta:editing-duration>
    <meta:editing-cycles>26</meta:editing-cycles>
    <meta:generator>LibreOffice/7.2.5.2$Windows_X86_64 LibreOffice_project/499f9727c189e6ef3471021d6132d4c694f357e5</meta:generator>
    <meta:document-statistic meta:table-count="0" meta:image-count="0" meta:object-count="0" meta:page-count="15" meta:paragraph-count="279" meta:word-count="4869" meta:character-count="32363" meta:non-whitespace-character-count="26792"/>
  </office:meta>
</office:document-meta>
</file>