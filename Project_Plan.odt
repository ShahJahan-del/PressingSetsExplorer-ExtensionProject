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Preformatted_20_Text">
      <style:paragraph-properties fo:margin-top="0cm" fo:margin-bottom="0.499cm" style:contextual-spacing="false"/>
    </style:style>
    <style:style style:name="P12" style:family="paragraph" style:parent-style-name="Preformatted_20_Text">
      <style:paragraph-properties fo:margin-top="0cm" fo:margin-bottom="0cm" style:contextual-spacing="false" fo:line-height="114%"/>
    </style:style>
    <style:style style:name="P13" style:family="paragraph" style:parent-style-name="Text_20_body">
      <style:paragraph-properties fo:margin-top="0cm" fo:margin-bottom="0.247cm" style:contextual-spacing="false" fo:line-height="114%"/>
      <style:text-properties style:font-name="Google Sans Text"/>
    </style:style>
    <style:style style:name="P14"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style:contextual-spacing="false" fo:text-indent="0cm" style:auto-text-indent="false"/>
    </style:style>
    <style:style style:name="P16" style:family="paragraph" style:parent-style-name="Heading_20_3">
      <style:paragraph-properties fo:margin-left="0cm" fo:margin-right="0cm" fo:margin-top="0.423cm" fo:margin-bottom="0cm" style:contextual-spacing="false" fo:text-indent="0cm" style:auto-text-indent="false"/>
    </style:style>
    <style:style style:name="P17"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18"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19" style:family="paragraph" style:parent-style-name="Preformatted_20_Text">
      <style:paragraph-properties fo:margin-top="0cm" fo:margin-bottom="0.499cm" style:contextual-spacing="false"/>
    </style:style>
    <style:style style:name="P2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fo:font-weight="bold" officeooo:rsid="000fd799" officeooo:paragraph-rsid="0011900d" style:font-size-asian="20pt" style:font-weight-asian="bold" style:font-size-complex="20pt" style:font-weight-complex="bold"/>
    </style:style>
    <style:style style:name="P22"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23"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24"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25"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26"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27" style:family="paragraph" style:parent-style-name="Text_20_body" style:list-style-name="L2">
      <style:paragraph-properties fo:margin-top="0cm" fo:margin-bottom="0.247cm" style:contextual-spacing="false" fo:line-height="114%" fo:padding="0cm" fo:border="none"/>
    </style:style>
    <style:style style:name="P28" style:family="paragraph" style:parent-style-name="Text_20_body" style:list-style-name="L3">
      <style:paragraph-properties fo:margin-top="0cm" fo:margin-bottom="0.247cm" style:contextual-spacing="false" fo:line-height="114%" fo:padding="0cm" fo:border="none"/>
    </style:style>
    <style:style style:name="P29" style:family="paragraph" style:parent-style-name="Text_20_body" style:list-style-name="L5">
      <style:paragraph-properties fo:margin-top="0cm" fo:margin-bottom="0.247cm" style:contextual-spacing="false" fo:line-height="114%" fo:padding="0cm" fo:border="none"/>
    </style:style>
    <style:style style:name="P30"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1"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32"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33"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34"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35" style:family="paragraph" style:parent-style-name="Text_20_body" style:list-style-name="L9"/>
    <style:style style:name="P36"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1900d"/>
    </style:style>
    <style:style style:name="T13" style:family="text">
      <style:text-properties officeooo:rsid="0012458b"/>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14"/>
      <text:p text:style-name="P14">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13">Voici l'inventaire complet des briques techniques, mathématiques et graphiques dont nous allons avoir besoin pour coder cet outil.</text:p>
      <text:h text:style-name="P1" text:outline-level="2">1. L'Infrastructure Technique (Le Moteur Graphique &amp; Web)</text:h>
      <text:p text:style-name="P13">Pour que cet outil soit agréable à utiliser, il lui faut une interface visuelle fluide avec deux zones : une zone de saisie (piano/boutons) et une zone d'affichage (le graphe).</text:p>
      <text:list xml:id="list1257968364" text:style-name="L1">
        <text:list-item>
          <text:p text:style-name="P22"><text:span text:style-name="T5">Le Framework principal :</text:span> <text:span text:style-name="T5">Python avec Dash (Plotly)</text:span> ou <text:span text:style-name="T5">Streamlit</text:span>.</text:p>
          <text:list>
            <text:list-item>
              <text:p text:style-name="P22"><text:span text:style-name="T1">Pourquoi ?</text:span> Ils permettent de coder une interface Web moderne entièrement en Python, sans avoir à manipuler du JavaScript/HTML/CSS complexe.</text:p>
            </text:list-item>
          </text:list>
        </text:list-item>
        <text:list-item>
          <text:p text:style-name="P22"><text:span text:style-name="T5">Le Moteur de Graphe Interactif :</text:span> <text:span text:style-name="T5">Pyvis</text:span> ou <text:span text:style-name="T5">Plotly Network Graphs</text:span>.</text:p>
          <text:list>
            <text:list-item>
              <text:p text:style-name="P22"><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22"><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13">C'est ici qu'on injecte la logique de Tymoczko pour relier les stations. Le code doit manipuler des objets mathématiques stricts :</text:p>
      <text:list xml:id="list3991859894" text:style-name="L2">
        <text:list-item>
          <text:p text:style-name="P27"><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23"><text:span text:style-name="T5">La Matrice d'Adjacence (Calcul des lignes de métro) :</text:span> Un algorithme qui tourne en arrière-plan et qui calcule pour n'importe quel couple de Sets :</text:p>
          <text:list>
            <text:list-item>
              <text:p text:style-name="P23">Le nombre exact de <text:span text:style-name="T5">pivots</text:span> (intersections d'ensembles).</text:p>
            </text:list-item>
            <text:list-item>
              <text:p text:style-name="P23">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13">Ton application devra gérer deux modes de fonctionnement distincts :</text:p>
      <text:h text:style-name="P2" text:outline-level="3"><text:soft-page-break/>Mode A : "L'Analyseur de Partitions" (Mode statique)</text:h>
      <text:list xml:id="list3806646997" text:style-name="L3">
        <text:list-item>
          <text:p text:style-name="P24"><text:span text:style-name="T5">Ce qu'il prend :</text:span> Ton fichier JSON de 159 lignes réelles (ou plus).</text:p>
        </text:list-item>
        <text:list-item>
          <text:p text:style-name="P28"><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829639912" text:style-name="L4">
        <text:list-item>
          <text:p text:style-name="P25"><text:span text:style-name="T5">Ce qu'il prend :</text:span> Une sélection instantanée sur ton piano virtuel (ton Set de départ).</text:p>
        </text:list-item>
        <text:list-item>
          <text:p text:style-name="P25"><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13">Pour que le code sache identifier les "stations", il nous faut un dictionnaire géométrique étendu (bien plus complet que notre version précédente). Il contiendra la structure fondamentale de chaque couleur harmonique :</text:p>
      <text:p text:style-name="P13">Python</text:p>
      <text:p text:style-name="P12"><text:span text:style-name="Source_20_Text"><text:span text:style-name="T2">DICTIONNAIRE_DES_SETS = {</text:span></text:span></text:p>
      <text:p text:style-name="P12"><text:span text:style-name="Source_20_Text"><text:s text:c="4"/></text:span><text:span text:style-name="Source_20_Text"><text:span text:style-name="T2">"Diatonic": [0, 2, 4, 5, 7, 9, 11],</text:span></text:span></text:p>
      <text:p text:style-name="P12"><text:span text:style-name="Source_20_Text"><text:s text:c="4"/></text:span><text:span text:style-name="Source_20_Text"><text:span text:style-name="T2">"Acoustic": [0, 2, 4, 6, 7, 9, 10],</text:span></text:span></text:p>
      <text:p text:style-name="P12"><text:span text:style-name="Source_20_Text"><text:s text:c="4"/></text:span><text:span text:style-name="Source_20_Text"><text:span text:style-name="T2">"Whole Tone": [0, 2, 4, 6, 8, 10],</text:span></text:span></text:p>
      <text:p text:style-name="P12"><text:span text:style-name="Source_20_Text"><text:s text:c="4"/></text:span><text:span text:style-name="Source_20_Text"><text:span text:style-name="T2">"Octatonic": [0, 1, 3, 4, 6, 7, 9, 10],</text:span></text:span></text:p>
      <text:p text:style-name="P12"><text:span text:style-name="Source_20_Text"><text:s text:c="4"/></text:span><text:span text:style-name="Source_20_Text"><text:span text:style-name="T2">"Hexatonic": [0, 1, 4, 5, 8, 9],</text:span></text:span></text:p>
      <text:p text:style-name="P12"><text:span text:style-name="Source_20_Text"><text:s text:c="4"/></text:span><text:span text:style-name="Source_20_Text"><text:span text:style-name="T2">"Harmonic Minor": [0, 2, 3, 5, 7, 8, 11],</text:span></text:span></text:p>
      <text:p text:style-name="P12"><text:span text:style-name="Source_20_Text"><text:s text:c="4"/></text:span><text:span text:style-name="Source_20_Text"><text:span text:style-name="T2">"Harmonic Major": [0, 2, 4, 5, 7, 8, 11],</text:span></text:span></text:p>
      <text:p text:style-name="P12"><text:span text:style-name="Source_20_Text"><text:s text:c="4"/></text:span><text:span text:style-name="Source_20_Text"><text:span text:style-name="T2"># On pourra ajouter les modes de Messiaen ou les sous-ensembles pentatoniques</text:span></text:span></text:p>
      <text:p text:style-name="P12"><text:span text:style-name="Source_20_Text"><text:span text:style-name="T2">}</text:span></text:span></text:p>
      <text:h text:style-name="P1" text:outline-level="2">Feu de route : Par quoi on commence ?</text:h>
      <text:p text:style-name="P13">Pour ne pas s'éparpiller, je te suggère de construire l'outil en trois étapes simples :</text:p>
      <text:list xml:id="list2767906435" text:style-name="L5">
        <text:list-item>
          <text:p text:style-name="P26"><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29"><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26"><text:span text:style-name="T5">Étape 3 (L'Interface Web) :</text:span> Coder le piano visuel et l'associer au graphe pour que cliquer sur une touche du piano mette à jour le réseau en temps réel.</text:p>
        </text:list-item>
      </text:list>
      <text:p text:style-name="P13">Es-tu d'accord avec cet inventaire ? Si oui, on peut attaquer directement le code de l'<text:span text:style-name="T5">Étape 1</text:span> pour poser les fondations mathématiques de ton Explorer.</text:p>
      <text:p text:style-name="P8"/>
      <text:p text:style-name="P17"><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15">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2013281120" text:style-name="L6">
          <text:list-item>
            <text:p text:style-name="P30"><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30"><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15"><text:span text:style-name="T7">L'utilisateur choisit par exemple </text:span><text:span text:style-name="Source_20_Text"><text:span text:style-name="T7">Acoustic [C]</text:span></text:span><text:span text:style-name="T7">. L'interface doit afficher :</text:span></text:p>
        <text:list xml:id="list1371181168" text:style-name="L7">
          <text:list-item>
            <text:p text:style-name="P31"><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32"><text:span text:style-name="T5">Les Voisins Directs (Distance 1) :</text:span> Tu filtres les nœuds connectés dans ton graphe complet à la couche 1.</text:p>
          </text:list-item>
          <text:list-item>
            <text:p text:style-name="P32"><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561842731" text:style-name="L8">
          <text:list-item>
            <text:p text:style-name="P33">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15"><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2361353533" text:style-name="L9">
        <text:list-item>
          <text:p text:style-name="P35"><text:soft-page-break/>Ton interface est un bête fichier <text:span text:style-name="Source_20_Text">index.html</text:span> avec ton CSS personnalisé.</text:p>
        </text:list-item>
        <text:list-item>
          <text:p text:style-name="P35">Quand l'utilisateur clique sur le clavier ou choisit "Diatonic [D]", du JavaScript (<text:span text:style-name="Source_20_Text">fetch</text:span>) envoie l'info à ton script Python.</text:p>
        </text:list-item>
        <text:list-item>
          <text:p text:style-name="P35">Python fait le calcul géométrique (voisins, couches, routes de secours) et renvoie le résultat au HTML qui met à jour l'affichage dynamiquement.</text:p>
        </text:list-item>
        <text:list-item>
          <text:p text:style-name="P35"><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11"><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18"><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15">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1958581087" text:style-name="L10">
          <text:list-item>
            <text:p text:style-name="P34">Dès que l'utilisateur clique sur une touche du piano, on capture l'ensemble des notes sélectionnées.</text:p>
          </text:list-item>
          <text:list-item>
            <text:p text:style-name="P34">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34">Si l'utilisateur vide le clavier, l'affichage rebascule sur le comportement par défaut (graphe centré).</text:p>
          </text:list-item>
        </text:list>
        <text:h text:style-name="P16" text:outline-level="3"><text:soft-page-break/><text:span text:style-name="T7">🛠️ Étape 1 : Le point d'accès API dans </text:span><text:span text:style-name="Source_20_Text"><text:span text:style-name="T7">app.py</text:span></text:span></text:h>
        <text:p text:style-name="P15"><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16"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15"><text:span text:style-name="T7">Recherche l'endroit idéal dans ton </text:span><text:span text:style-name="Source_20_Text"><text:span text:style-name="T6">index.html</text:span></text:span><text:span text:style-name="T7"> et insère ce bloc :</text:span></text:p>
        <text:h text:style-name="P16" text:outline-level="3"><text:span text:style-name="T7">⚡ Étape 3 : La logique globale dans </text:span><text:span text:style-name="Source_20_Text"><text:span text:style-name="T7">static/js/main.js</text:span></text:span></text:h>
        <text:p text:style-name="P15"><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15"><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36">Voici la marche à suivre avec les blocs de code précis à rajouter ou modifier.</text:p>
      <text:h text:style-name="Heading_20_3" text:outline-level="3">Étape 1 : Le squelette HTML</text:h>
      <text:p text:style-name="Text_20_body">Ajoute ce bloc dans ton fichier HTML (par exemple, juste en dessous ou à côté de ton conteneur <text:span text:style-name="Source_20_Text">#keyboard-matches-container</text:span>) pour accueillir la liste des modes :</text:p>
      <text:p text:style-name="Text_20_body">HTML</text:p>
      <text:p text:style-name="Preformatted_20_Text"><text:span text:style-name="Source_20_Text">&lt;div id="collection-modes-container" style="display: none; margin-top: 20px; font-family: 'Segoe UI', sans-serif;"&gt;</text:span></text:p>
      <text:p text:style-name="Preformatted_20_Text"><text:span text:style-name="Source_20_Text"><text:s text:c="4"/>&lt;h3 style="color: #cbd5e1; font-size: 16px; margin-bottom: 10px;"&gt;Collection sélectionnée :&lt;/h3&gt;</text:span></text:p>
      <text:p text:style-name="Preformatted_20_Text"><text:span text:style-name="Source_20_Text"><text:s text:c="4"/>&lt;div id="selected-collection-badge" style="margin-bottom: 20px;"&gt;&lt;/div&gt;</text:span></text:p>
      <text:p text:style-name="Preformatted_20_Text"><text:span text:style-name="Source_20_Text"><text:s text:c="4"/></text:span></text:p>
      <text:p text:style-name="Preformatted_20_Text"><text:span text:style-name="Source_20_Text"><text:s text:c="4"/>&lt;h4 style="color: #94a3b8; font-size: 14px; margin-bottom: 10px;"&gt;Modes de cette collection :&lt;/h4&gt;</text:span></text:p>
      <text:p text:style-name="Preformatted_20_Text"><text:span text:style-name="Source_20_Text"><text:s text:c="4"/>&lt;ul id="modes-list" style="list-style: none; padding: 0; margin: 0;"&gt;&lt;/ul&gt;</text:span></text:p>
      <text:p text:style-name="P11"><text:span text:style-name="Source_20_Text">&lt;/div&gt;</text:span></text:p>
      <text:h text:style-name="Heading_20_3" text:outline-level="3"><text:soft-page-break/>Étape 2 : Le dictionnaire des modes côté JavaScript (<text:span text:style-name="Source_20_Text">main.js</text:span>)</text:h>
      <text:p text:style-name="Text_20_body">Puisque ton backend renvoie la liste des notes sous forme de numéros (les <text:span text:style-name="T1">pitches</text:span>), nous pouvons générer mathématiquement les modes directement en Front-end (ou préparer le terrain pour l'audio plus tard).</text:p>
      <text:p text:style-name="Text_20_body">Au tout début de ton fichier <text:span text:style-name="Source_20_Text">static/js/main.js</text:span>, juste en dessous de ton <text:span text:style-name="Source_20_Text">noteMap</text:span> ou de tes définitions de variables, ajoute ce dictionnaire qui associe chaque type de set asymétrique à ses noms de modes :</text:p>
      <text:p text:style-name="Text_20_body">JavaScript</text:p>
      <text:p text:style-name="Preformatted_20_Text"><text:span text:style-name="Source_20_Text"><text:s text:c="4"/>// Liste des modes pour chaque famille asymétrique (ordonnés par degré)</text:span></text:p>
      <text:p text:style-name="Preformatted_20_Text"><text:span text:style-name="Source_20_Text"><text:s text:c="4"/>const familyModes = {</text:span></text:p>
      <text:p text:style-name="Preformatted_20_Text"><text:span text:style-name="Source_20_Text"><text:s text:c="8"/>"Diatonic": ["Major/Ionian", "Dorian", "Phrygian", "Lydian", "Mixolydian", "Aeolian", "Locrian"],</text:span></text:p>
      <text:p text:style-name="Preformatted_20_Text"><text:span text:style-name="Source_20_Text"><text:s text:c="8"/>"Acoustic": ["Acoustic (Lydian b7)", "Major Locrian", "Altered b6", "Melodic Minor", "Dorian b2", "Lydian Augmented", "Bartok/Lydian Dominant"],</text:span></text:p>
      <text:p text:style-name="Preformatted_20_Text"><text:span text:style-name="Source_20_Text"><text:s text:c="8"/>"Harmonic Minor": ["Harmonic Minor", "Locrian ♮6", "Ionian ♯5", "Dorian ♯4", "Phrygian Dominant", "Lydian ♯2", "Ultralocrian"],</text:span></text:p>
      <text:p text:style-name="Preformatted_20_Text"><text:span text:style-name="Source_20_Text"><text:s text:c="8"/>"Harmonic Major": ["Harmonic Major", "Dorian b5", "Phrygian b4", "Lydian b3", "Mixolydian b2", "Lydian Augmented ♯2", "Locrian bb7"]</text:span></text:p>
      <text:p text:style-name="P11"><text:span text:style-name="Source_20_Text"><text:s text:c="4"/>};</text:span></text:p>
      <text:h text:style-name="Heading_20_3" text:outline-level="3">Étape 3 : La fonction de rendu des modes (<text:span text:style-name="Source_20_Text">main.js</text:span>)</text:h>
      <text:p text:style-name="Text_20_body">Ajoute cette nouvelle fonction à la fin de ton fichier <text:span text:style-name="Source_20_Text">static/js/main.js</text:span> (juste avant le tout dernier <text:span text:style-name="Source_20_Text">});</text:span> de fermeture du script). Elle va s'occuper de construire exactement l'interface visuelle de ta capture d'écran :</text:p>
      <text:p text:style-name="Text_20_body">JavaScript</text:p>
      <text:p text:style-name="Preformatted_20_Text"><text:span text:style-name="Source_20_Text"><text:s text:c="4"/>function displayCollectionModes(family, root) {</text:span></text:p>
      <text:p text:style-name="Preformatted_20_Text"><text:span text:style-name="Source_20_Text"><text:s text:c="8"/>const container = document.getElementById('collection-modes-container');</text:span></text:p>
      <text:p text:style-name="Preformatted_20_Text"><text:span text:style-name="Source_20_Text"><text:s text:c="8"/>const badgeDiv = document.getElementById('selected-collection-badge');</text:span></text:p>
      <text:p text:style-name="Preformatted_20_Text"><text:span text:style-name="Source_20_Text"><text:s text:c="8"/>const modesList = document.getElementById('modes-list');</text:span></text:p>
      <text:p text:style-name="Preformatted_20_Text"/>
      <text:p text:style-name="Preformatted_20_Text"><text:span text:style-name="Source_20_Text"><text:s text:c="8"/>// 1. Affichage du Badge Vert de la collection</text:span></text:p>
      <text:p text:style-name="Preformatted_20_Text"><text:span text:style-name="Source_20_Text"><text:s text:c="8"/>// Traduction visuelle si c'est un set symétrique pour l'affichage du badge</text:span></text:p>
      <text:p text:style-name="Preformatted_20_Text"><text:span text:style-name="Source_20_Text"><text:s text:c="8"/>let shortName = root;</text:span></text:p>
      <text:p text:style-name="Preformatted_20_Text"><text:span text:style-name="Source_20_Text"><text:s text:c="8"/>if (["Octatonic", "Whole Tone", "Hexatonic"].includes(family)) {</text:span></text:p>
      <text:p text:style-name="Preformatted_20_Text"><text:span text:style-name="Source_20_Text"><text:s text:c="12"/>const symNames = { "C": "0,1", "C#": "1,2", "D": "2,3", "Eb": "3,4" };</text:span></text:p>
      <text:p text:style-name="Preformatted_20_Text"><text:span text:style-name="Source_20_Text"><text:s text:c="12"/>shortName = symNames[root] || roo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dgeDiv.innerHTML = `</text:span></text:p>
      <text:p text:style-name="Preformatted_20_Text"><text:span text:style-name="Source_20_Text"><text:s text:c="12"/>&lt;span style="background-color: #84cc16; color: #ffffff; padding: 6px 14px; border-radius: 6px; font-weight: bold; font-size: 14px; display: inline-block; box-shadow: 0 2px 4px rgba(0,0,0,0.2);"&gt;</text:span></text:p>
      <text:p text:style-name="Preformatted_20_Text"><text:span text:style-name="Source_20_Text"><text:s text:c="16"/>${shortName} ${family.substring(0, 3).toUpperCase()}</text:span></text:p>
      <text:p text:style-name="Preformatted_20_Text"><text:span text:style-name="Source_20_Text"><text:s text:c="12"/>&lt;/span&gt;</text:span></text:p>
      <text:p text:style-name="Preformatted_20_Text"><text:span text:style-name="Source_20_Text"><text:s text:c="12"/>&lt;span style="color: #64748b; margin-left: 10px; font-size: 14px;"&gt;(${root} ${family})&lt;/span&gt;</text:span></text:p>
      <text:p text:style-name="Preformatted_20_Text"><text:span text:style-name="Source_20_Text"><text:s text:c="8"/>`;</text:span></text:p>
      <text:p text:style-name="Preformatted_20_Text"/>
      <text:p text:style-name="Preformatted_20_Text"><text:span text:style-name="Source_20_Text"><text:s text:c="8"/>// 2. Génération de la liste des modes</text:span></text:p>
      <text:p text:style-name="Preformatted_20_Text"><text:span text:style-name="Source_20_Text"><text:s text:c="8"/>modesList.innerHTML = '';</text:span></text:p>
      <text:p text:style-name="Preformatted_20_Text"/>
      <text:p text:style-name="Preformatted_20_Text"><text:soft-page-break/><text:span text:style-name="Source_20_Text"><text:s text:c="8"/>if (familyModes[family]) {</text:span></text:p>
      <text:p text:style-name="Preformatted_20_Text"><text:span text:style-name="Source_20_Text"><text:s text:c="12"/>// C'est un set asymétrique : on boucle sur ses modes</text:span></text:p>
      <text:p text:style-name="Preformatted_20_Text"><text:span text:style-name="Source_20_Text"><text:s text:c="12"/>familyModes[family].forEach((modeName, index) =&gt; {</text:span></text:p>
      <text:p text:style-name="Preformatted_20_Text"><text:span text:style-name="Source_20_Text"><text:s text:c="16"/>const li = document.createElement('li');</text:span></text:p>
      <text:p text:style-name="Preformatted_20_Text"><text:span text:style-name="Source_20_Text"><text:s text:c="16"/>li.style.display = 'flex';</text:span></text:p>
      <text:p text:style-name="Preformatted_20_Text"><text:span text:style-name="Source_20_Text"><text:s text:c="16"/>li.style.justifyContent = 'space-between';</text:span></text:p>
      <text:p text:style-name="Preformatted_20_Text"><text:span text:style-name="Source_20_Text"><text:s text:c="16"/>li.style.alignItems = 'center';</text:span></text:p>
      <text:p text:style-name="Preformatted_20_Text"><text:span text:style-name="Source_20_Text"><text:s text:c="16"/>li.style.marginBottom = '10px';</text:span></text:p>
      <text:p text:style-name="Preformatted_20_Text"><text:span text:style-name="Source_20_Text"><text:s text:c="16"/>li.style.color = '#94a3b8';</text:span></text:p>
      <text:p text:style-name="Preformatted_20_Text"><text:span text:style-name="Source_20_Text"><text:s text:c="16"/>li.style.fontSize = '14px';</text:span></text:p>
      <text:p text:style-name="Preformatted_20_Text"/>
      <text:p text:style-name="Preformatted_20_Text"><text:span text:style-name="Source_20_Text"><text:s text:c="16"/>li.innerHTML = `</text:span></text:p>
      <text:p text:style-name="Preformatted_20_Text"><text:span text:style-name="Source_20_Text"><text:s text:c="20"/>&lt;span&gt;&lt;span style="color: #475569; margin-right: 8px;"&gt;▪&lt;/span&gt; ${modeName}&lt;/span&gt;</text:span></text:p>
      <text:p text:style-name="Preformatted_20_Text"><text:span text:style-name="Source_20_Text"><text:s text:c="20"/>&lt;button class="play-mode-btn" data-degree="${index}" style="</text:span></text:p>
      <text:p text:style-name="Preformatted_20_Text"><text:span text:style-name="Source_20_Text"><text:s text:c="24"/>background-color: #ffffff;</text:span></text:p>
      <text:p text:style-name="Preformatted_20_Text"><text:span text:style-name="Source_20_Text"><text:s text:c="24"/>color: #0f172a;</text:span></text:p>
      <text:p text:style-name="Preformatted_20_Text"><text:span text:style-name="Source_20_Text"><text:s text:c="24"/>border: 1px solid #cbd5e1;</text:span></text:p>
      <text:p text:style-name="Preformatted_20_Text"><text:span text:style-name="Source_20_Text"><text:s text:c="24"/>padding: 6px 12px;</text:span></text:p>
      <text:p text:style-name="Preformatted_20_Text"><text:span text:style-name="Source_20_Text"><text:s text:c="24"/>border-radius: 4px;</text:span></text:p>
      <text:p text:style-name="Preformatted_20_Text"><text:span text:style-name="Source_20_Text"><text:s text:c="24"/>font-weight: 500;</text:span></text:p>
      <text:p text:style-name="Preformatted_20_Text"><text:span text:style-name="Source_20_Text"><text:s text:c="24"/>cursor: pointer;</text:span></text:p>
      <text:p text:style-name="Preformatted_20_Text"><text:span text:style-name="Source_20_Text"><text:s text:c="24"/>font-size: 12px;</text:span></text:p>
      <text:p text:style-name="Preformatted_20_Text"><text:span text:style-name="Source_20_Text"><text:s text:c="24"/>transition: all 0.2s;"&gt;</text:span></text:p>
      <text:p text:style-name="Preformatted_20_Text"><text:span text:style-name="Source_20_Text"><text:s text:c="24"/>PLAY THIS MODE</text:span></text:p>
      <text:p text:style-name="Preformatted_20_Text"><text:span text:style-name="Source_20_Text"><text:s text:c="20"/>&lt;/button&gt;</text:span></text:p>
      <text:p text:style-name="Preformatted_20_Text"><text:span text:style-name="Source_20_Text"><text:s text:c="16"/>`;</text:span></text:p>
      <text:p text:style-name="Preformatted_20_Text"><text:span text:style-name="Source_20_Text"><text:s text:c="16"/>modesList.appendChild(li);</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C'est un set symétrique (Octatonic, Whole Tone, Hexatonic)</text:span></text:p>
      <text:p text:style-name="Preformatted_20_Text"><text:span text:style-name="Source_20_Text"><text:s text:c="12"/>const li = document.createElement('li');</text:span></text:p>
      <text:p text:style-name="Preformatted_20_Text"><text:span text:style-name="Source_20_Text"><text:s text:c="12"/>li.style.color = '#64748b';</text:span></text:p>
      <text:p text:style-name="Preformatted_20_Text"><text:span text:style-name="Source_20_Text"><text:s text:c="12"/>li.style.fontStyle = 'italic';</text:span></text:p>
      <text:p text:style-name="Preformatted_20_Text"><text:span text:style-name="Source_20_Text"><text:s text:c="12"/>li.style.padding = '10px 0';</text:span></text:p>
      <text:p text:style-name="Preformatted_20_Text"><text:span text:style-name="Source_20_Text"><text:s text:c="12"/>li.innerText = "Cette collection est symétrique (à transpositions limitées) et ne possède pas de modes distincts exploitables de manière diatonique.";</text:span></text:p>
      <text:p text:style-name="Preformatted_20_Text"><text:span text:style-name="Source_20_Text"><text:s text:c="12"/>modesList.appendChild(li);</text:span></text:p>
      <text:p text:style-name="Preformatted_20_Text"><text:span text:style-name="Source_20_Text"><text:s text:c="8"/>}</text:span></text:p>
      <text:p text:style-name="Preformatted_20_Text"/>
      <text:p text:style-name="Preformatted_20_Text"><text:span text:style-name="Source_20_Text"><text:s text:c="8"/>// Rendre le conteneur visible</text:span></text:p>
      <text:p text:style-name="Preformatted_20_Text"><text:span text:style-name="Source_20_Text"><text:s text:c="8"/>container.style.display = 'block';</text:span></text:p>
      <text:p text:style-name="P11"><text:span text:style-name="Source_20_Text"><text:s text:c="4"/>}</text:span></text:p>
      <text:h text:style-name="Heading_20_3" text:outline-level="3">Étape 4 : Déclencher l'affichage lors d'une recherche</text:h>
      <text:p text:style-name="Text_20_body">Pour que ce panneau se mette à jour automatiquement au moment où le graphe et le piano se chargent, il faut appeler notre nouvelle fonction à la fin de <text:span text:style-name="Source_20_Text">updateExploration</text:span>.</text:p>
      <text:p text:style-name="Text_20_body">Dans <text:span text:style-name="Source_20_Text">static/js/main.js</text:span>, va tout à la fin de ta fonction <text:span text:style-name="Source_20_Text">async function updateExploration(type, root, distance)</text:span>. Juste après la configuration des écouteurs du graphe Vis.js (après le bloc <text:span text:style-name="Source_20_Text">network.on("doubleClick", ...)</text:span>), ajoute cette ligne :</text:p>
      <text:p text:style-name="Text_20_body">JavaScript</text:p>
      <text:p text:style-name="Preformatted_20_Text"><text:span text:style-name="Source_20_Text"><text:s text:c="8"/>// Déclenche l'affichage du panneau des modes correspondant au choix actuel</text:span></text:p>
      <text:p text:style-name="P11"><text:span text:style-name="Source_20_Text"><text:s text:c="8"/>displayCollectionModes(type, root);</text:span></text:p>
      <text:p text:style-name="Text_20_body"><text:soft-page-break/>Fais également de même à l'intérieur de l'écouteur du bouton <text:span text:style-name="Source_20_Text">.match-btn</text:span> (quand on clique sur un set détecté via le clavier) pour forcer son affichage. Écris-le juste en dessous de l'appel à <text:span text:style-name="Source_20_Text">updateExploration(family, root, ...)</text:span> :</text:p>
      <text:p text:style-name="Text_20_body">JavaScript</text:p>
      <text:p text:style-name="Preformatted_20_Text"><text:span text:style-name="Source_20_Text"><text:s text:c="16"/>updateExploration(family, root, distanceSelect.value);</text:span></text:p>
      <text:p text:style-name="P11"><text:span text:style-name="Source_20_Text"><text:s text:c="16"/>displayCollectionModes(family, root); // Force la mise à jour des modes</text:span></text:p>
      <text:p text:style-name="Text_20_body">Une fois ces modifications appliquées, un rafraîchissement complet (<text:span text:style-name="T5">Ctrl + F5</text:span>) te permettra de voir apparaître dynamiquement le badge de ton set accompagné de ses modes ou du message d'exclusion symétrique. Les boutons <text:span text:style-name="Source_20_Text">"PLAY THIS MODE"</text:span> sont prêts et n'attendent plus que l'implémentation du moteur audio Web Audio API ou Tone.js !</text:p>
      <text:p text:style-name="P10"/>
      <text:p text:style-name="P10"/>
      <text:p text:style-name="P10"/>
      <text:p text:style-name="P10"/>
      <text:p text:style-name="P10"/>
      <text:p text:style-name="P10"/>
      <text:p text:style-name="P10"/>
      <text:p text:style-name="P10">Problèmes à régler :</text:p>
      <text:p text:style-name="P10">1/ Trouver un moyen d’afficher les notes changeantes « dans le bon sens » (C dia → F dia ne doit pas afficher Bb du côté de C dia)</text:p>
      <text:p text:style-name="P10">2/ Trouver un moyen de vérifier que les sets reliés sont les bons, et que les notes de changement sont correctes (grosse vérification à faire dans la logique plus que le visuel)</text:p>
      <text:p text:style-name="P21">3/ Éventuellement modifier utility_functions.py (et par conséquent l’app et main.js) pour <text:span text:style-name="T13">utiliser les chiffres pour la logique et les noms pour le visuel</text:span></text:p>
      <text:p text:style-name="P21"><text:span text:style-name="T12">4/ Harmoniser les noms de sets affichés dans les boutons Set/Transposition, dans la liste des Sets à partir des Subsets et dans le graphe</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3T16:07:35.363000000</dc:date>
    <meta:editing-duration>PT6H36M41S</meta:editing-duration>
    <meta:editing-cycles>9</meta:editing-cycles>
    <meta:generator>LibreOffice/7.2.5.2$Windows_X86_64 LibreOffice_project/499f9727c189e6ef3471021d6132d4c694f357e5</meta:generator>
    <meta:document-statistic meta:table-count="0" meta:image-count="0" meta:object-count="0" meta:page-count="10" meta:paragraph-count="214" meta:word-count="3206" meta:character-count="21792" meta:non-whitespace-character-count="17787"/>
  </office:meta>
</office:document-meta>
</file>