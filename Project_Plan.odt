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Heading_20_2">
      <style:paragraph-properties fo:margin-top="0cm" fo:margin-bottom="0.247cm" style:contextual-spacing="false" fo:line-height="114%"/>
      <style:text-properties style:font-name="Google Sans"/>
    </style:style>
    <style:style style:name="P2" style:family="paragraph" style:parent-style-name="Heading_20_3">
      <style:paragraph-properties fo:margin-top="0cm" fo:margin-bottom="0.247cm" style:contextual-spacing="false" fo:line-height="114%"/>
      <style:text-properties style:font-name="Google Sans"/>
    </style:style>
    <style:style style:name="P3" style:family="paragraph" style:parent-style-name="Heading_20_2">
      <style:paragraph-properties fo:margin-left="0cm" fo:margin-right="0cm" fo:margin-top="0.423cm" fo:margin-bottom="0cm" style:contextual-spacing="false" fo:text-indent="0cm" style:auto-text-indent="false"/>
      <style:text-properties loext:padding="0cm" loext:border="none"/>
    </style:style>
    <style:style style:name="P4" style:family="paragraph" style:parent-style-name="Heading_20_3">
      <style:paragraph-properties fo:margin-left="0cm" fo:margin-right="0cm" fo:margin-top="0.423cm" fo:margin-bottom="0cm" style:contextual-spacing="false" fo:text-indent="0cm" style:auto-text-indent="false"/>
      <style:text-properties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6" style:family="paragraph" style:parent-style-name="Text_20_body">
      <style:paragraph-properties fo:margin-left="0cm" fo:margin-right="0cm" fo:margin-top="0cm" fo:margin-bottom="0cm" style:contextual-spacing="false" fo:line-height="120%" fo:text-indent="0cm" style:auto-text-indent="false"/>
      <style:text-properties loext:padding="0cm" loext:border="none"/>
    </style:style>
    <style:style style:name="P7" style:family="paragraph" style:parent-style-name="Heading_20_3">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0b191a" officeooo:paragraph-rsid="000b191a"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1" style:family="paragraph" style:parent-style-name="Heading_20_3">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2" style:family="paragraph" style:parent-style-name="Text_20_body">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fo:font-weight="bold" officeooo:rsid="00157ff7" officeooo:paragraph-rsid="00157ff7"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20pt" fo:font-weight="bold" officeooo:rsid="001f11df" officeooo:paragraph-rsid="001ecbb3" style:font-size-asian="20pt" style:font-weight-asian="bold" style:font-size-complex="20pt" style:font-weight-complex="bold"/>
    </style:style>
    <style:style style:name="P15" style:family="paragraph" style:parent-style-name="Heading_20_3">
      <style:text-properties fo:font-size="20pt" style:font-size-asian="20pt" style:font-size-complex="20pt"/>
    </style:style>
    <style:style style:name="P16" style:family="paragraph" style:parent-style-name="Preformatted_20_Text">
      <style:paragraph-properties fo:margin-top="0cm" fo:margin-bottom="0.499cm" style:contextual-spacing="false"/>
    </style:style>
    <style:style style:name="P17" style:family="paragraph" style:parent-style-name="Preformatted_20_Text">
      <style:paragraph-properties fo:margin-top="0cm" fo:margin-bottom="0cm" style:contextual-spacing="false" fo:line-height="114%"/>
    </style:style>
    <style:style style:name="P18" style:family="paragraph" style:parent-style-name="Text_20_body">
      <style:paragraph-properties fo:margin-top="0cm" fo:margin-bottom="0.247cm" style:contextual-spacing="false" fo:line-height="114%"/>
      <style:text-properties style:font-name="Google Sans Text"/>
    </style:style>
    <style:style style:name="P19" style:family="paragraph" style:parent-style-name="Text_20_body">
      <style:paragraph-properties fo:text-align="start" style:justify-single-word="false"/>
      <style:text-properties style:font-name="Google Sans Text" fo:font-size="12pt" fo:font-weight="normal" officeooo:rsid="000b191a" officeooo:paragraph-rsid="000b191a" style:font-size-asian="12pt" style:font-weight-asian="normal" style:font-size-complex="12pt" style:font-weight-complex="normal"/>
    </style:style>
    <style:style style:name="P20" style:family="paragraph" style:parent-style-name="Text_20_body">
      <style:paragraph-properties fo:margin-left="0cm" fo:margin-right="0cm" fo:margin-top="0cm" fo:margin-bottom="0cm" style:contextual-spacing="false" fo:text-indent="0cm" style:auto-text-indent="false"/>
    </style:style>
    <style:style style:name="P21" style:family="paragraph" style:parent-style-name="Heading_20_3">
      <style:paragraph-properties fo:margin-left="0cm" fo:margin-right="0cm" fo:margin-top="0.423cm" fo:margin-bottom="0cm" style:contextual-spacing="false" fo:text-indent="0cm" style:auto-text-indent="false"/>
    </style:style>
    <style:style style:name="P22" style:family="paragraph" style:parent-style-name="Text_20_body">
      <style:paragraph-properties fo:text-align="start" style:justify-single-word="false"/>
      <style:text-properties fo:color="#111111" loext:opacity="100%" fo:font-size="20pt" fo:font-weight="bold" officeooo:rsid="000b191a" officeooo:paragraph-rsid="000b191a" style:font-size-asian="20pt" style:font-weight-asian="bold" style:font-size-complex="20pt" style:font-weight-complex="bold" loext:padding="0cm" loext:border="none"/>
    </style:style>
    <style:style style:name="P23" style:family="paragraph" style:parent-style-name="Text_20_body">
      <style:paragraph-properties fo:text-align="start" style:justify-single-word="false"/>
      <style:text-properties fo:color="#000000" loext:opacity="100%" fo:font-size="20pt" fo:font-weight="bold" officeooo:rsid="000d9049" officeooo:paragraph-rsid="000d9049" style:font-size-asian="20pt" style:font-weight-asian="bold" style:font-size-complex="20pt" style:font-weight-complex="bold" loext:padding="0cm" loext:border="none"/>
    </style:style>
    <style:style style:name="P24" style:family="paragraph" style:parent-style-name="Heading_20_3">
      <style:paragraph-properties fo:margin-top="0cm" fo:margin-bottom="0.247cm" style:contextual-spacing="false" fo:line-height="114%"/>
    </style:style>
    <style:style style:name="P25" style:family="paragraph" style:parent-style-name="Standard">
      <style:paragraph-properties fo:text-align="start" style:justify-single-word="false"/>
      <style:text-properties fo:font-size="20pt" fo:font-weight="bold" officeooo:rsid="001f11df" officeooo:paragraph-rsid="001ecbb3" style:font-size-asian="20pt" style:font-weight-asian="bold" style:font-size-complex="20pt" style:font-weight-complex="bold"/>
    </style:style>
    <style:style style:name="P26" style:family="paragraph" style:parent-style-name="Standard">
      <style:paragraph-properties fo:text-align="start" style:justify-single-word="false"/>
      <style:text-properties fo:color="#00a933" loext:opacity="100%" fo:font-size="20pt" fo:font-weight="bold" officeooo:rsid="000d9049" officeooo:paragraph-rsid="000d9049" style:font-size-asian="20pt" style:font-weight-asian="bold" style:font-size-complex="20pt" style:font-weight-complex="bold"/>
    </style:style>
    <style:style style:name="P27" style:family="paragraph" style:parent-style-name="Standard">
      <style:paragraph-properties fo:text-align="start" style:justify-single-word="false"/>
      <style:text-properties fo:color="#00a933" loext:opacity="100%" fo:font-size="20pt" fo:font-weight="bold" officeooo:rsid="000fd799" officeooo:paragraph-rsid="0011900d" style:font-size-asian="20pt" style:font-weight-asian="bold" style:font-size-complex="20pt" style:font-weight-complex="bold"/>
    </style:style>
    <style:style style:name="P28" style:family="paragraph" style:parent-style-name="Standard">
      <style:paragraph-properties fo:text-align="start" style:justify-single-word="false"/>
      <style:text-properties fo:color="#00a933" loext:opacity="100%" fo:font-size="20pt" fo:font-weight="bold" officeooo:rsid="001a92e9" officeooo:paragraph-rsid="001a92e9" style:font-size-asian="20pt" style:font-weight-asian="bold" style:font-size-complex="20pt" style:font-weight-complex="bold"/>
    </style:style>
    <style:style style:name="P29" style:family="paragraph" style:parent-style-name="Standard">
      <style:paragraph-properties fo:text-align="start" style:justify-single-word="false"/>
      <style:text-properties fo:color="#00a933" loext:opacity="100%" fo:font-size="20pt" fo:font-weight="bold" officeooo:rsid="001ecbb3" officeooo:paragraph-rsid="001ecbb3" style:font-size-asian="20pt" style:font-weight-asian="bold" style:font-size-complex="20pt" style:font-weight-complex="bold"/>
    </style:style>
    <style:style style:name="P30" style:family="paragraph" style:parent-style-name="Standard">
      <style:paragraph-properties fo:text-align="start" style:justify-single-word="false"/>
      <style:text-properties fo:color="#00a933" loext:opacity="100%" fo:font-size="20pt" fo:font-weight="bold" officeooo:rsid="001f11df" officeooo:paragraph-rsid="001ecbb3" style:font-size-asian="20pt" style:font-weight-asian="bold" style:font-size-complex="20pt" style:font-weight-complex="bold"/>
    </style:style>
    <style:style style:name="P31" style:family="paragraph" style:parent-style-name="Standard">
      <style:paragraph-properties fo:text-align="start" style:justify-single-word="false"/>
      <style:text-properties fo:color="#00a933" loext:opacity="100%" fo:font-size="20pt" fo:font-weight="bold" officeooo:rsid="0018902e" officeooo:paragraph-rsid="0018902e" style:font-size-asian="20pt" style:font-weight-asian="bold" style:font-size-complex="20pt" style:font-weight-complex="bold"/>
    </style:style>
    <style:style style:name="P32" style:family="paragraph" style:parent-style-name="Standard">
      <style:paragraph-properties fo:text-align="start" style:justify-single-word="false"/>
      <style:text-properties fo:color="#00a933" loext:opacity="100%" fo:font-size="20pt" fo:font-weight="bold" officeooo:rsid="001a4c58" officeooo:paragraph-rsid="001a4c58" style:font-size-asian="20pt" style:font-weight-asian="bold" style:font-size-complex="20pt" style:font-weight-complex="bold"/>
    </style:style>
    <style:style style:name="P33" style:family="paragraph" style:parent-style-name="Standard">
      <style:paragraph-properties fo:text-align="start" style:justify-single-word="false"/>
      <style:text-properties fo:color="#00a933" loext:opacity="100%" fo:font-size="20pt" fo:font-weight="bold" officeooo:rsid="0011900d" officeooo:paragraph-rsid="0011900d" style:font-size-asian="20pt" style:font-weight-asian="bold" style:font-size-complex="20pt" style:font-weight-complex="bold"/>
    </style:style>
    <style:style style:name="P34" style:family="paragraph" style:parent-style-name="Text_20_body" style:list-style-name="L1">
      <style:paragraph-properties fo:margin-top="0cm" fo:margin-bottom="0.247cm" style:contextual-spacing="false" fo:line-height="114%" fo:padding="0cm" fo:border="none"/>
      <style:text-properties style:font-name="Google Sans Text"/>
    </style:style>
    <style:style style:name="P35" style:family="paragraph" style:parent-style-name="Text_20_body" style:list-style-name="L2">
      <style:paragraph-properties fo:margin-top="0cm" fo:margin-bottom="0.247cm" style:contextual-spacing="false" fo:line-height="114%" fo:padding="0cm" fo:border="none"/>
      <style:text-properties style:font-name="Google Sans Text"/>
    </style:style>
    <style:style style:name="P36" style:family="paragraph" style:parent-style-name="Text_20_body" style:list-style-name="L3">
      <style:paragraph-properties fo:margin-top="0cm" fo:margin-bottom="0.247cm" style:contextual-spacing="false" fo:line-height="114%" fo:padding="0cm" fo:border="none"/>
      <style:text-properties style:font-name="Google Sans Text"/>
    </style:style>
    <style:style style:name="P37" style:family="paragraph" style:parent-style-name="Text_20_body" style:list-style-name="L4">
      <style:paragraph-properties fo:margin-top="0cm" fo:margin-bottom="0.247cm" style:contextual-spacing="false" fo:line-height="114%" fo:padding="0cm" fo:border="none"/>
      <style:text-properties style:font-name="Google Sans Text"/>
    </style:style>
    <style:style style:name="P38" style:family="paragraph" style:parent-style-name="Text_20_body" style:list-style-name="L5">
      <style:paragraph-properties fo:margin-top="0cm" fo:margin-bottom="0.247cm" style:contextual-spacing="false" fo:line-height="114%" fo:padding="0cm" fo:border="none"/>
      <style:text-properties style:font-name="Google Sans Text"/>
    </style:style>
    <style:style style:name="P39" style:family="paragraph" style:parent-style-name="Text_20_body">
      <style:paragraph-properties fo:margin-top="0cm" fo:margin-bottom="0.247cm" style:contextual-spacing="false" fo:line-height="114%"/>
      <style:text-properties style:font-name="Google Sans Text"/>
    </style:style>
    <style:style style:name="P40" style:family="paragraph" style:parent-style-name="Text_20_body" style:list-style-name="L19">
      <style:paragraph-properties fo:margin-top="0cm" fo:margin-bottom="0.247cm" style:contextual-spacing="false" fo:line-height="114%" fo:padding="0cm" fo:border="none"/>
      <style:text-properties style:font-name="Google Sans Text"/>
    </style:style>
    <style:style style:name="P41" style:family="paragraph" style:parent-style-name="Text_20_body" style:list-style-name="L20">
      <style:paragraph-properties fo:margin-top="0cm" fo:margin-bottom="0.247cm" style:contextual-spacing="false" fo:line-height="114%" fo:padding="0cm" fo:border="none"/>
      <style:text-properties style:font-name="Google Sans Text"/>
    </style:style>
    <style:style style:name="P42" style:family="paragraph" style:parent-style-name="Text_20_body" style:list-style-name="L21">
      <style:paragraph-properties fo:margin-top="0cm" fo:margin-bottom="0.247cm" style:contextual-spacing="false" fo:line-height="114%" fo:padding="0cm" fo:border="none"/>
      <style:text-properties style:font-name="Google Sans Text"/>
    </style:style>
    <style:style style:name="P43" style:family="paragraph" style:parent-style-name="Text_20_body">
      <style:paragraph-properties fo:text-align="start" style:justify-single-word="false"/>
      <style:text-properties style:font-name="Google Sans Text" fo:font-size="20pt" fo:font-weight="bold" officeooo:rsid="001f11df" officeooo:paragraph-rsid="001ecbb3" style:font-size-asian="20pt" style:font-weight-asian="bold" style:font-size-complex="20pt" style:font-weight-complex="bold"/>
    </style:style>
    <style:style style:name="P44" style:family="paragraph" style:parent-style-name="Text_20_body" style:list-style-name="L2">
      <style:paragraph-properties fo:margin-top="0cm" fo:margin-bottom="0.247cm" style:contextual-spacing="false" fo:line-height="114%" fo:padding="0cm" fo:border="none"/>
    </style:style>
    <style:style style:name="P45" style:family="paragraph" style:parent-style-name="Text_20_body" style:list-style-name="L3">
      <style:paragraph-properties fo:margin-top="0cm" fo:margin-bottom="0.247cm" style:contextual-spacing="false" fo:line-height="114%" fo:padding="0cm" fo:border="none"/>
    </style:style>
    <style:style style:name="P46" style:family="paragraph" style:parent-style-name="Text_20_body" style:list-style-name="L5">
      <style:paragraph-properties fo:margin-top="0cm" fo:margin-bottom="0.247cm" style:contextual-spacing="false" fo:line-height="114%" fo:padding="0cm" fo:border="none"/>
    </style:style>
    <style:style style:name="P47" style:family="paragraph" style:parent-style-name="Text_20_body">
      <style:paragraph-properties fo:margin-top="0cm" fo:margin-bottom="0.247cm" style:contextual-spacing="false" fo:line-height="114%"/>
    </style:style>
    <style:style style:name="P48" style:family="paragraph" style:parent-style-name="Text_20_body" style:list-style-name="L20">
      <style:paragraph-properties fo:margin-top="0cm" fo:margin-bottom="0.247cm" style:contextual-spacing="false" fo:line-height="114%" fo:padding="0cm" fo:border="none"/>
    </style:style>
    <style:style style:name="P49"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50" style:family="paragraph" style:parent-style-name="Text_20_body" style:list-style-name="L7">
      <style:paragraph-properties fo:margin-left="0cm" fo:margin-right="0cm" fo:margin-top="0cm" fo:margin-bottom="0cm" style:contextual-spacing="false" fo:line-height="120%" fo:text-indent="0cm" style:auto-text-indent="false" fo:padding="0cm" fo:border="none"/>
      <style:text-properties loext:padding="0cm" loext:border="none"/>
    </style:style>
    <style:style style:name="P51"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loext:padding="0cm" loext:border="none"/>
    </style:style>
    <style:style style:name="P52" style:family="paragraph" style:parent-style-name="Text_20_body" style:list-style-name="L8">
      <style:paragraph-properties fo:margin-left="0cm" fo:margin-right="0cm" fo:margin-top="0cm" fo:margin-bottom="0cm" style:contextual-spacing="false" fo:text-indent="0cm" style:auto-text-indent="false" fo:padding="0cm" fo:border="none"/>
      <style:text-properties loext:padding="0cm" loext:border="none"/>
    </style:style>
    <style:style style:name="P53" style:family="paragraph" style:parent-style-name="Text_20_body" style:list-style-name="L10">
      <style:paragraph-properties fo:margin-left="0cm" fo:margin-right="0cm" fo:margin-top="0cm" fo:margin-bottom="0cm" style:contextual-spacing="false" fo:text-indent="0cm" style:auto-text-indent="false" fo:padding="0cm" fo:border="none"/>
      <style:text-properties loext:padding="0cm" loext:border="none"/>
    </style:style>
    <style:style style:name="P54" style:family="paragraph" style:parent-style-name="Text_20_body" style:list-style-name="L9"/>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T1" style:family="text">
      <style:text-properties fo:font-style="italic"/>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style:font-name="Google Sans Text" fo:font-style="italic"/>
    </style:style>
    <style:style style:name="T5" style:family="text">
      <style:text-properties fo:font-weight="bold"/>
    </style:style>
    <style:style style:name="T6" style:family="text">
      <style:text-properties fo:font-weight="bold" loext:padding="0cm" loext:border="none"/>
    </style:style>
    <style:style style:name="T7" style:family="text">
      <style:text-properties loext:padding="0cm" loext:border="none"/>
    </style:style>
    <style:style style:name="T8" style:family="text">
      <style:text-properties fo:font-variant="normal" fo:text-transform="none" style:font-name="KaTeX Main" fo:font-style="normal" fo:font-weight="normal"/>
    </style:style>
    <style:style style:name="T9" style:family="text">
      <style:text-properties fo:font-variant="normal" fo:text-transform="none" style:font-name="KaTeX Math" fo:font-style="italic" fo:font-weight="normal"/>
    </style:style>
    <style:style style:name="T10" style:family="text">
      <style:text-properties fo:font-variant="normal" fo:text-transform="none" fo:font-weight="bold"/>
    </style:style>
    <style:style style:name="T11" style:family="text">
      <style:text-properties fo:font-variant="normal" fo:text-transform="none" fo:font-style="normal" loext:padding="0cm" loext:border="none"/>
    </style:style>
    <style:style style:name="T12" style:family="text">
      <style:text-properties officeooo:rsid="0012458b"/>
    </style:style>
    <style:style style:name="T13" style:family="text">
      <style:text-properties officeooo:rsid="0016599f"/>
    </style:style>
    <style:style style:name="T14" style:family="text">
      <style:text-properties officeooo:rsid="001fe92f"/>
    </style:style>
    <style:style style:name="T15" style:family="text">
      <style:text-properties style:font-name="Google Sans"/>
    </style:style>
    <style:style style:name="T16" style:family="text">
      <style:text-properties officeooo:rsid="0023a78c"/>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ugmented Pressing Sets Explorer – Plan</text:p>
      <text:p text:style-name="P19"/>
      <text:p text:style-name="P19">Pour fusionner l'interface visuelle du <text:span text:style-name="T1">Pressing Sets Explorer</text:span> (le piano, la portée, les boutons de Pitch Classes) avec la puissance des réseaux de Tymoczko (le graphe de <text:span text:style-name="T1">L'Isle Joyeuse</text:span>), nous devons structurer l'application de manière modulaire.</text:p>
      <text:p text:style-name="P18">Voici l'inventaire complet des briques techniques, mathématiques et graphiques dont nous allons avoir besoin pour coder cet outil.</text:p>
      <text:h text:style-name="P1" text:outline-level="2">1. L'Infrastructure Technique (Le Moteur Graphique &amp; Web)</text:h>
      <text:p text:style-name="P18">Pour que cet outil soit agréable à utiliser, il lui faut une interface visuelle fluide avec deux zones : une zone de saisie (piano/boutons) et une zone d'affichage (le graphe).</text:p>
      <text:list xml:id="list3692952995" text:style-name="L1">
        <text:list-item>
          <text:p text:style-name="P34"><text:span text:style-name="T5">Le Framework principal :</text:span> <text:span text:style-name="T5">Python avec Dash (Plotly)</text:span> ou <text:span text:style-name="T5">Streamlit</text:span>.</text:p>
          <text:list>
            <text:list-item>
              <text:p text:style-name="P34"><text:span text:style-name="T1">Pourquoi ?</text:span> Ils permettent de coder une interface Web moderne entièrement en Python, sans avoir à manipuler du JavaScript/HTML/CSS complexe.</text:p>
            </text:list-item>
          </text:list>
        </text:list-item>
        <text:list-item>
          <text:p text:style-name="P34"><text:span text:style-name="T5">Le Moteur de Graphe Interactif :</text:span> <text:span text:style-name="T5">Pyvis</text:span> ou <text:span text:style-name="T5">Plotly Network Graphs</text:span>.</text:p>
          <text:list>
            <text:list-item>
              <text:p text:style-name="P34"><text:span text:style-name="T1">Pourquoi ?</text:span> Pyvis permet de générer des réseaux de bulles (nœuds) que tu peux glisser, zoomer et cliquer directement dans ton navigateur, exactement comme le schéma de Tymoczko mais en dynamique.</text:p>
            </text:list-item>
          </text:list>
        </text:list-item>
        <text:list-item>
          <text:p text:style-name="P34"><text:span text:style-name="T5">Le Rendu de la Portée Musicale :</text:span> <text:span text:style-name="T5">Abjad</text:span> ou l'API <text:span text:style-name="T5">VexFlow</text:span> (via des composants légers) pour dessiner proprement la portée avec les bémols et les dièses selon tes sélections.</text:p>
        </text:list-item>
      </text:list>
      <text:h text:style-name="P1" text:outline-level="2">2. Le Cœur Mathématique (Set Theory &amp; Topologie)</text:h>
      <text:p text:style-name="P18">C'est ici qu'on injecte la logique de Tymoczko pour relier les stations. Le code doit manipuler des objets mathématiques stricts :</text:p>
      <text:list xml:id="list2173830757" text:style-name="L2">
        <text:list-item>
          <text:p text:style-name="P44"><text:span text:style-name="T3">Le Convertisseur de Pitch Classes (Forte Numbers) :</text:span><text:span text:style-name="T2"> Une fonction qui prend tes boutons pressés (ex: </text:span><text:span text:style-name="Source_20_Text"><text:span text:style-name="T2">[0, 2, 4, 6, 7, 9, 10]</text:span></text:span><text:span text:style-name="T2">) et calcule sa </text:span><text:span text:style-name="T4">Normal Form</text:span><text:span text:style-name="T2"> et sa </text:span><text:span text:style-name="T4">Prime Form</text:span><text:span text:style-name="T2"> pour identifier instantanément qu'il s'agit du Set "Acoustic" ou "Diatonic".</text:span></text:p>
        </text:list-item>
        <text:list-item>
          <text:p text:style-name="P35"><text:span text:style-name="T5">La Matrice d'Adjacence (Calcul des lignes de métro) :</text:span> Un algorithme qui tourne en arrière-plan et qui calcule pour n'importe quel couple de Sets :</text:p>
          <text:list>
            <text:list-item>
              <text:p text:style-name="P35">Le nombre exact de <text:span text:style-name="T5">pivots</text:span> (intersections d'ensembles).</text:p>
            </text:list-item>
            <text:list-item>
              <text:p text:style-name="P35">La <text:span text:style-name="T5">distance de pas de voix (Voice-Leading distance)</text:span> : de combien de demi-tons les notes restantes doivent glisser pour atteindre le nouvel accord ($G \rightarrow G\#$).</text:p>
            </text:list-item>
          </text:list>
        </text:list-item>
      </text:list>
      <text:h text:style-name="P1" text:outline-level="2">3. L'Inventaire des Données (Les Modes d'Entrée)</text:h>
      <text:p text:style-name="P18">Ton application devra gérer deux modes de fonctionnement distincts :</text:p>
      <text:h text:style-name="P2" text:outline-level="3"><text:soft-page-break/>Mode A : "L'Analyseur de Partitions" (Mode statique)</text:h>
      <text:list xml:id="list2404279586" text:style-name="L3">
        <text:list-item>
          <text:p text:style-name="P36"><text:span text:style-name="T5">Ce qu'il prend :</text:span> Ton fichier JSON de 159 lignes réelles (ou plus).</text:p>
        </text:list-item>
        <text:list-item>
          <text:p text:style-name="P45"><text:span text:style-name="T3">Ce qu'il fait :</text:span><text:span text:style-name="T2"> Il lit les enchaînements chronologiques, calcule les pivots et génère la carte routière fixe de l'œuvre. Les nœuds sont labellisés avec le nom du Set, la transposition, la tonique, et éventuellement les numéros de mesures (ex: </text:span><text:span text:style-name="Source_20_Text"><text:span text:style-name="T2">160-3</text:span></text:span><text:span text:style-name="T2">).</text:span></text:p>
        </text:list-item>
      </text:list>
      <text:h text:style-name="P2" text:outline-level="3">Mode B : "L'Explorateur/Compositeur" (Mode prédictif/dynamique)</text:h>
      <text:list xml:id="list37246562" text:style-name="L4">
        <text:list-item>
          <text:p text:style-name="P37"><text:span text:style-name="T5">Ce qu'il prend :</text:span> Une sélection instantanée sur ton piano virtuel (ton Set de départ).</text:p>
        </text:list-item>
        <text:list-item>
          <text:p text:style-name="P37"><text:span text:style-name="T5">Ce qu'il fait :</text:span> Il calcule en temps réel toutes les "stations adjacentes" possibles dans l'univers tempéré (Diatonique, Acoustique, Octatonique, etc.) et trace des flèches vers elles. Tu pourras filtrer l'affichage : <text:span text:style-name="T1">"Montre-moi uniquement les stations accessibles à exactement 5 pivots"</text:span>.</text:p>
        </text:list-item>
      </text:list>
      <text:h text:style-name="P1" text:outline-level="2">4. La Structure de la Base de Données</text:h>
      <text:p text:style-name="P18">Pour que le code sache identifier les "stations", il nous faut un dictionnaire géométrique étendu (bien plus complet que notre version précédente). Il contiendra la structure fondamentale de chaque couleur harmonique :</text:p>
      <text:p text:style-name="P18">Python</text:p>
      <text:p text:style-name="P17"><text:span text:style-name="Source_20_Text"><text:span text:style-name="T2">DICTIONNAIRE_DES_SETS = {</text:span></text:span></text:p>
      <text:p text:style-name="P17"><text:span text:style-name="Source_20_Text"><text:s text:c="4"/></text:span><text:span text:style-name="Source_20_Text"><text:span text:style-name="T2">"Diatonic": [0, 2, 4, 5, 7, 9, 11],</text:span></text:span></text:p>
      <text:p text:style-name="P17"><text:span text:style-name="Source_20_Text"><text:s text:c="4"/></text:span><text:span text:style-name="Source_20_Text"><text:span text:style-name="T2">"Acoustic": [0, 2, 4, 6, 7, 9, 10],</text:span></text:span></text:p>
      <text:p text:style-name="P17"><text:span text:style-name="Source_20_Text"><text:s text:c="4"/></text:span><text:span text:style-name="Source_20_Text"><text:span text:style-name="T2">"Whole Tone": [0, 2, 4, 6, 8, 10],</text:span></text:span></text:p>
      <text:p text:style-name="P17"><text:span text:style-name="Source_20_Text"><text:s text:c="4"/></text:span><text:span text:style-name="Source_20_Text"><text:span text:style-name="T2">"Octatonic": [0, 1, 3, 4, 6, 7, 9, 10],</text:span></text:span></text:p>
      <text:p text:style-name="P17"><text:span text:style-name="Source_20_Text"><text:s text:c="4"/></text:span><text:span text:style-name="Source_20_Text"><text:span text:style-name="T2">"Hexatonic": [0, 1, 4, 5, 8, 9],</text:span></text:span></text:p>
      <text:p text:style-name="P17"><text:span text:style-name="Source_20_Text"><text:s text:c="4"/></text:span><text:span text:style-name="Source_20_Text"><text:span text:style-name="T2">"Harmonic Minor": [0, 2, 3, 5, 7, 8, 11],</text:span></text:span></text:p>
      <text:p text:style-name="P17"><text:span text:style-name="Source_20_Text"><text:s text:c="4"/></text:span><text:span text:style-name="Source_20_Text"><text:span text:style-name="T2">"Harmonic Major": [0, 2, 4, 5, 7, 8, 11],</text:span></text:span></text:p>
      <text:p text:style-name="P17"><text:span text:style-name="Source_20_Text"><text:s text:c="4"/></text:span><text:span text:style-name="Source_20_Text"><text:span text:style-name="T2"># On pourra ajouter les modes de Messiaen ou les sous-ensembles pentatoniques</text:span></text:span></text:p>
      <text:p text:style-name="P17"><text:span text:style-name="Source_20_Text"><text:span text:style-name="T2">}</text:span></text:span></text:p>
      <text:h text:style-name="P1" text:outline-level="2">Feu de route : Par quoi on commence ?</text:h>
      <text:p text:style-name="P18">Pour ne pas s'éparpiller, je te suggère de construire l'outil en trois étapes simples :</text:p>
      <text:list xml:id="list436675241" text:style-name="L5">
        <text:list-item>
          <text:p text:style-name="P38"><text:span text:style-name="T5">Étape 1 (Le Moteur de calcul) :</text:span> Écrire les fonctions Python pures qui prennent un Set et calculent mathématiquement toutes les stations adjacentes possibles à $X$ pivots. (Pas d'interface pour l'instant, juste la logique).</text:p>
        </text:list-item>
        <text:list-item>
          <text:p text:style-name="P46"><text:span text:style-name="T3">Étape 2 (Le Traceur de Graphe) :</text:span><text:span text:style-name="T2"> Injecter tes 159 lignes dans </text:span><text:span text:style-name="Source_20_Text"><text:span text:style-name="T2">pyvis</text:span></text:span><text:span text:style-name="T2"> pour afficher ton tout premier schéma de Tymoczko interactif dans ton navigateur.</text:span></text:p>
        </text:list-item>
        <text:list-item>
          <text:p text:style-name="P38"><text:span text:style-name="T5">Étape 3 (L'Interface Web) :</text:span> Coder le piano visuel et l'associer au graphe pour que cliquer sur une touche du piano mette à jour le réseau en temps réel.</text:p>
        </text:list-item>
      </text:list>
      <text:p text:style-name="P18">Es-tu d'accord avec cet inventaire ? Si oui, on peut attaquer directement le code de l'<text:span text:style-name="T5">Étape 1</text:span> pour poser les fondations mathématiques de ton Explorer.</text:p>
      <text:p text:style-name="P8"/>
      <text:p text:style-name="P22"><text:soft-page-break/>Pour la suite, je voulais faire un outil un peu comme cet explorer existant où tu rentres un set avec une transposition et il renvoie les modes, les sets adjacents, les sets éloignés, etc. Donc maintenant que j'ai un code qui fait le graphe complet d'un centre, tu penses que je suis paré ? Parce que je voulais justement faire une version graphique et fonctionnelle de cet explorer, avec trois possibilités, l'exploration (on choisit un centre et on a tout), l'analyse (on donne les sets d'un morceau et il crée le graphe pour ce morceau) et la composition (c'est proche du premier mais on y reviendra plus tard). </text:p>
      <text:section text:style-name="Sect1" text:name="user-query-content-54">
        <text:p text:style-name="Text_20_body"><draw:frame draw:style-name="fr1" draw:name="Cadre1" text:anchor-type="char" svg:x="0.353cm" svg:width="0.041cm" draw:z-index="0"><draw:text-box fo:min-height="0.423cm"><text:p text:style-name="Text_20_body"/></draw:text-box></draw:frame></text:p>
      </text:section>
      <text:section text:style-name="Sect2" text:name="model-response-message-contentr_e5860231091cd92e">
        <text:p text:style-name="P20">D'accord, je vois beaucoup mieux la trajectoire globale de ton projet ! C'est une excellente stratégie : confier l'extraction harmonique à l'oreille humaine (qui reste imbattable pour filtrer les notes de passage, les appoggiatures ou les pédales) et déléguer à la machine la puissance topologique de calcul et d'exploration.</text:p>
        <text:p text:style-name="P5">Pour répondre directement à ta question : <text:span text:style-name="T5">Oui, sur le plan de la logique algorithmique pure, tu es paré à 95 %.</text:span> Tu as le moteur pour générer l'univers complet à partir d'un centre (mode Exploration) et tu as le moteur pour relier intelligemment un pool de sets avec gestion des archipels (mode Analyse).</text:p>
        <text:p text:style-name="P5">Cependant, pour concevoir une véritable application graphique et fonctionnelle (un "PressingSetsExplorer" augmenté), il te manque encore la structure de l'interface et la gestion dynamique des requêtes utilisateur.</text:p>
        <text:p text:style-name="P5">Pour articuler tes trois piliers (Exploration, Analyse, Composition), voici une architecture propre de ce qu'il te reste à mettre en place :</text:p>
        <text:h text:style-name="P3" text:outline-level="2">1. La Vue (L'Interface Graphique)</text:h>
        <text:p text:style-name="P5">Pour que ton outil soit interactif (que l'on puisse cliquer sur un set, changer de transposition, etc.), tu vas devoir choisir une bibliothèque pour l'IHM. En Python, deux options majeures s'offrent à toi :</text:p>
        <text:list xml:id="list4188762121" text:style-name="L6">
          <text:list-item>
            <text:p text:style-name="P49"><text:span text:style-name="T6">Option Web-App (Recommandée) : </text:span><text:span text:style-name="Source_20_Text"><text:span text:style-name="T6">Streamlit</text:span></text:span><text:span text:style-name="T6"> ou </text:span><text:span text:style-name="Source_20_Text"><text:span text:style-name="T6">Dash</text:span></text:span><text:span text:style-name="T7">. C'est ultra-rapide à coder en pur Python. Tu as des boutons, des menus déroulants, et tu peux y intégrer des fenêtres interactives pour afficher tes graphes (avec </text:span><text:span text:style-name="Source_20_Text"><text:span text:style-name="T7">pyvis</text:span></text:span><text:span text:style-name="T7"> ou </text:span><text:span text:style-name="Source_20_Text"><text:span text:style-name="T7">plotly</text:span></text:span><text:span text:style-name="T7">).</text:span></text:p>
          </text:list-item>
          <text:list-item>
            <text:p text:style-name="P49"><text:span text:style-name="T6">Option Desktop : </text:span><text:span text:style-name="Source_20_Text"><text:span text:style-name="T6">CustomTkinter</text:span></text:span><text:span text:style-name="T6"> ou </text:span><text:span text:style-name="Source_20_Text"><text:span text:style-name="T6">PyQt</text:span></text:span><text:span text:style-name="T7">. Plus traditionnel, si tu veux une application de bureau fenêtrée classique.</text:span></text:p>
          </text:list-item>
        </text:list>
        <text:h text:style-name="P3" text:outline-level="2"><text:soft-page-break/>2. L'adaptation de tes moteurs pour l'Explorer</text:h>
        <text:p text:style-name="P5">Pour que l'outil soit aussi complet que l'explorer existant, tu vas devoir exposer les données de tes scripts actuels sous forme de "fiches d'identité" dynamiques dans ton interface.</text:p>
        <text:h text:style-name="P4" text:outline-level="3">Pilier 1 : Mode EXPLORATION</text:h>
        <text:p text:style-name="P20"><text:span text:style-name="T7">L'utilisateur choisit par exemple </text:span><text:span text:style-name="Source_20_Text"><text:span text:style-name="T7">Acoustic [C]</text:span></text:span><text:span text:style-name="T7">. L'interface doit afficher :</text:span></text:p>
        <text:list xml:id="list121169912" text:style-name="L7">
          <text:list-item>
            <text:p text:style-name="P50"><text:span text:style-name="T5">Les Modes dérivés :</text:span> (Lydien <text:span text:style-name="T9">b</text:span><text:span text:style-name="T8">7</text:span>, Mixolydien <text:span text:style-name="T9">b</text:span><text:span text:style-name="T8">6</text:span>, etc.). C'est une simple rotation cyclique de ton set de base que tu peux générer à la volée.</text:p>
          </text:list-item>
          <text:list-item>
            <text:p text:style-name="P51"><text:span text:style-name="T5">Les Voisins Directs (Distance 1) :</text:span> Tu filtres les nœuds connectés dans ton graphe complet à la couche 1.</text:p>
          </text:list-item>
          <text:list-item>
            <text:p text:style-name="P51"><text:span text:style-name="T5">Les Voisins Éloignés :</text:span> Tu exposes les couches 2, 3 et plus.</text:p>
          </text:list-item>
        </text:list>
        <text:h text:style-name="P4" text:outline-level="3">Pilier 2 : Mode ANALYSE</text:h>
        <text:p text:style-name="P5">C'est le script que nous venons de finaliser. L'utilisateur clique sur "Ajouter un set", tape sa liste, choisit son centre.</text:p>
        <text:list xml:id="list368796291" text:style-name="L8">
          <text:list-item>
            <text:p text:style-name="P52">L'application affiche le rapport textuel de la console, mais surtout, elle génère un <text:span text:style-name="T5">graphe visuel interactif</text:span> où les sets isolés apparaissent physiquement raccordés par des flèches pointillées (les routes de secours avec leurs étiquettes de notes).</text:p>
          </text:list-item>
        </text:list>
        <text:h text:style-name="P4" text:outline-level="3">Pilier 3 : Mode COMPOSITION (Aperçu)</text:h>
        <text:p text:style-name="P5">Pour planter la graine de ce mode, il s'agira d'un système de <text:span text:style-name="T5">recommandation de trajectoire</text:span>. L'utilisateur est à la station A, il veut aller à la station B, et la machine lui propose des "accords-pivots" ou des chemins fluides en cours de route pour guider son geste créatif.</text:p>
        <text:h text:style-name="P3" text:outline-level="2">Prochaine étape : On s'attaque à l'interface ?</text:h>
        <text:p text:style-name="P20"><text:span text:style-name="T7">Si tu veux matérialiser cet Explorer, la suite logique est de concevoir le squelette de l'application. On pourrait commencer par créer un prototype d'interface très simple (par exemple avec </text:span><text:span text:style-name="Source_20_Text"><text:span text:style-name="T7">Streamlit</text:span></text:span><text:span text:style-name="T7"> ou </text:span><text:span text:style-name="Source_20_Text"><text:span text:style-name="T7">Tkinter</text:span></text:span><text:span text:style-name="T7">) qui charge tes fonctions </text:span><text:span text:style-name="Source_20_Text"><text:span text:style-name="T7">utility_functions.py</text:span></text:span><text:span text:style-name="T7"> et permet de sélectionner un centre dans un menu déroulant pour afficher ses voisins directs.</text:span></text:p>
        <text:p text:style-name="P5">Qu'en penses-tu ? Quelle technologie d'interface te tente le plus ?</text:p>
      </text:section>
      <text:p text:style-name="P8"/>
      <text:h text:style-name="P7" text:outline-level="3">Pourquoi une interface Web (HTML/CSS/JS) est le meilleur choix</text:h>
      <text:p text:style-name="Text_20_body">Pour un projet de théorie musicale qui nécessite une forte interactivité visuelle (un clavier sur lequel on clique, une portée musicale, un graphe de réseau avec des bulles), les technologies Web sont infiniment supérieures aux bibliothèques Desktop classiques (comme Tkinter ou PyQt) qui sont lourdes à styliser et rigides.</text:p>
      <text:p text:style-name="Text_20_body">Pour lier tes scripts Python existants à du HTML/CSS moderne, tu as deux excellentes voies :</text:p>
      <text:h text:style-name="Heading_20_4" text:outline-level="4">Option A : L'approche "Full Stack légère" avec Flask ou FastAPI (Recommandée)</text:h>
      <text:p text:style-name="Text_20_body">Tu gardes tes fichiers Python intacts dans VS Code. Tu ajoutes un petit fichier <text:span text:style-name="Source_20_Text">app.py</text:span> avec <text:span text:style-name="T5">Flask</text:span> ou <text:span text:style-name="T5">FastAPI</text:span> qui va servir d'intermédiaire (API).</text:p>
      <text:list xml:id="list692572979" text:style-name="L9">
        <text:list-item>
          <text:p text:style-name="P54"><text:soft-page-break/>Ton interface est un bête fichier <text:span text:style-name="Source_20_Text">index.html</text:span> avec ton CSS personnalisé.</text:p>
        </text:list-item>
        <text:list-item>
          <text:p text:style-name="P54">Quand l'utilisateur clique sur le clavier ou choisit "Diatonic [D]", du JavaScript (<text:span text:style-name="Source_20_Text">fetch</text:span>) envoie l'info à ton script Python.</text:p>
        </text:list-item>
        <text:list-item>
          <text:p text:style-name="P54">Python fait le calcul géométrique (voisins, couches, routes de secours) et renvoie le résultat au HTML qui met à jour l'affichage dynamiquement.</text:p>
        </text:list-item>
        <text:list-item>
          <text:p text:style-name="P54"><text:span text:style-name="T5">Le gros avantage :</text:span> C'est ultra-flexible, tu contrôles le design au pixel près en HTML/CSS, et tu peux utiliser des bibliothèques JavaScript géniales pour afficher tes graphes de gares de manière interactive (comme <text:span text:style-name="Source_20_Text">Vis.js</text:span> ou <text:span text:style-name="Source_20_Text">Cytoscape.js</text:span>).</text:p>
        </text:list-item>
      </text:list>
      <text:h text:style-name="Heading_20_4" text:outline-level="4">Option B : Le compromis rapide avec Streamlit</text:h>
      <text:p text:style-name="Text_20_body">Si tu veux aller très vite sans écrire le squelette HTML toi-même, <text:span text:style-name="T5">Streamlit</text:span> te permet de générer des éléments d'interface (menus, boutons) directement en écrivant du Python. Tu peux quand même y injecter du HTML/CSS personnalisé via une fonction dédiée (<text:span text:style-name="Source_20_Text">st.markdown(..., unsafe_allow_html=True)</text:span>). C'est très bien pour un prototype, mais on se sent parfois un peu limité si on veut un design très spécifique comme l'explorer de ton image.</text:p>
      <text:h text:style-name="Heading_20_3" text:outline-level="3">Comment t'organiser dans VS Code et GitHub ?</text:h>
      <text:p text:style-name="Text_20_body">Tu peux (et tu dois) tout faire directement dans ton dossier de travail actuel dans VS Code. Tout va cohabiter proprement. Ton arborescence GitHub ressemblera simplement à ceci :</text:p>
      <text:p text:style-name="Text_20_body">Plaintext</text:p>
      <text:p text:style-name="Preformatted_20_Text"><text:span text:style-name="Source_20_Text">PressingSetsExplorer-ExtensionProject/</text:span></text:p>
      <text:p text:style-name="Preformatted_20_Text"><text:span text:style-name="Source_20_Text">├── .git/</text:span></text:p>
      <text:p text:style-name="Preformatted_20_Text"><text:span text:style-name="Source_20_Text">├── utility_functions.py <text:s text:c="5"/>&lt;-- Ton moteur géométrique actuel</text:span></text:p>
      <text:p text:style-name="Preformatted_20_Text"><text:span text:style-name="Source_20_Text">├── piece_analyzer.py <text:s text:c="8"/>&lt;-- Ton analyseur Ravel actuel</text:span></text:p>
      <text:p text:style-name="Preformatted_20_Text"><text:span text:style-name="Source_20_Text">├── app.py <text:s text:c="19"/>&lt;-- Ton futur serveur (Flask ou FastAPI)</text:span></text:p>
      <text:p text:style-name="Preformatted_20_Text"><text:span text:style-name="Source_20_Text">├── templates/</text:span></text:p>
      <text:p text:style-name="Preformatted_20_Text"><text:span text:style-name="Source_20_Text">│ <text:s text:c="2"/>└── index.html <text:s text:c="11"/>&lt;-- Ton interface (Structure de l'Explorer)</text:span></text:p>
      <text:p text:style-name="Preformatted_20_Text"><text:span text:style-name="Source_20_Text">└── static/</text:span></text:p>
      <text:p text:style-name="Preformatted_20_Text"><text:span text:style-name="Source_20_Text"><text:s text:c="4"/>├── css/</text:span></text:p>
      <text:p text:style-name="Preformatted_20_Text"><text:span text:style-name="Source_20_Text"><text:s text:c="4"/>│ <text:s text:c="2"/>└── style.css <text:s text:c="8"/>&lt;-- Ton design (Clavier, boutons, couleurs)</text:span></text:p>
      <text:p text:style-name="Preformatted_20_Text"><text:span text:style-name="Source_20_Text"><text:s text:c="4"/>└── js/</text:span></text:p>
      <text:p text:style-name="P16"><text:span text:style-name="Source_20_Text"><text:s text:c="8"/>└── main.js <text:s text:c="10"/>&lt;-- L'interactivité (clics, requêtes vers Python)</text:span></text:p>
      <text:h text:style-name="Heading_20_3" text:outline-level="3">Le plan d'action</text:h>
      <text:p text:style-name="Text_20_body">Puisque tu es chaud pour du HTML/CSS, je te conseille de partir sur la structure <text:span text:style-name="T5">Flask + HTML/CSS/JS</text:span>. C'est propre, hyper gratifiant visuellement, et totalement contrôlable.</text:p>
      <text:p text:style-name="Text_20_body">Pour commencer, on peut coder le fichier <text:span text:style-name="Source_20_Text">app.py</text:span> (le pont) et la première structure HTML de ton mode <text:span text:style-name="T5">Exploration</text:span> (le squelette de la page avec le choix du Centre).</text:p>
      <text:p text:style-name="Text_20_body">Tu es prêt à installer Flask dans ton environnement (<text:span text:style-name="Source_20_Text">pip install flask</text:span>) pour qu'on écrive les premières lignes de l'application ?</text:p>
      <text:p text:style-name="P8"/>
      <text:p text:style-name="P23"><text:soft-page-break/>Parfait, je trouverais un moyen de remédier au problème plus tard. Maintenant, il y a 2 choses que j'aimerais régler avant de passer au mode analyse. D'abord, j'aimerais qu'il y ait un système interactif avec le clavier (pour l'instant il ne fait qu'afficher les notes du set choisi), qu'on puisse entrer les notes directement sur le clavier et qu'avec les notes entrées, le système puisse deviner quel est le set. Par exemple, si on choisit 3 notes, une liste de sets potentiels est donnée en mode "voici les sets dont les notes que tu as donnés sont un subset" ainsi que les notes manquantes pour former chacun de ces sets. Ensuite, le 2e point, c'est que pour les sets symétriques, je préférerais que dès qu'on choisit oct, hex ou wt, les transpositions possibles ne soient pas les 12 notes chromatiques mais les transpositions limitées qui existent dans ces sets (Oct(0, 1), Oct(1, 2), Oct(2, 3), WT0, WT1, Hex(0, 1), Hex(1, 2), Hex(2, 3), Hex(3, 4)).</text:p>
      <text:section text:style-name="Sect1" text:name="user-query-content-14">
        <text:p text:style-name="Text_20_body"><draw:frame draw:style-name="fr1" draw:name="Cadre2" text:anchor-type="char" svg:x="0.353cm" svg:width="0.041cm" draw:z-index="1"><draw:text-box fo:min-height="0.423cm"><text:p text:style-name="Text_20_body"/></draw:text-box></draw:frame></text:p>
      </text:section>
      <text:section text:style-name="Sect2" text:name="model-response-message-contentr_a4efa55c94a5db2e">
        <text:p text:style-name="P20">Ce sont deux évolutions majeures qui vont transformer l'application. On passe d'un simple visualiseur passif à un véritable <text:span text:style-name="T5">moteur d'exploration interactif</text:span>.</text:p>
        <text:p text:style-name="P6">Décomposons le travail. Pour que tout fonctionne de manière robuste, nous allons d'abord implémenter le <text:span text:style-name="T5">Point 1 : Le mode "Recherche par clavier" (Saisie de notes </text:span><text:span text:style-name="T10">→</text:span><text:span text:style-name="T5"> Identification de la collection)</text:span>.</text:p>
        <text:p text:style-name="P5">Pour que l'expérience utilisateur soit fluide, voici la logique retenue :</text:p>
        <text:list xml:id="list2086885319" text:style-name="L10">
          <text:list-item>
            <text:p text:style-name="P53">Dès que l'utilisateur clique sur une touche du piano, on capture l'ensemble des notes sélectionnées.</text:p>
          </text:list-item>
          <text:list-item>
            <text:p text:style-name="P53">Si le clavier contient des notes, on désactive temporairement les sélecteurs classiques (Type/Racine) et on affiche en dessous une liste dynamique semblable à ta capture d'écran, classée par pertinence, affichant les sets parents et les notes manquantes.</text:p>
          </text:list-item>
          <text:list-item>
            <text:p text:style-name="P53">Si l'utilisateur vide le clavier, l'affichage rebascule sur le comportement par défaut (graphe centré).</text:p>
          </text:list-item>
        </text:list>
        <text:h text:style-name="P21" text:outline-level="3"><text:soft-page-break/><text:span text:style-name="T7">🛠️ Étape 1 : Le point d'accès API dans </text:span><text:span text:style-name="Source_20_Text"><text:span text:style-name="T7">app.py</text:span></text:span></text:h>
        <text:p text:style-name="P20"><text:span text:style-name="T7">Ajoute cette nouvelle route dans ton fichier </text:span><text:span text:style-name="Source_20_Text"><text:span text:style-name="T6">app.py</text:span></text:span><text:span text:style-name="T7">. Elle va intercepter la liste de notes envoyée par le clavier, scanner tes 57 gares (</text:span><text:span text:style-name="T11">Pressing Sets</text:span><text:span text:style-name="T7">) et calculer pour chacune d'elles si les notes saisies forment un sous-ensemble (</text:span><text:span text:style-name="T11">subset</text:span><text:span text:style-name="T7">).</text:span></text:p>
        <text:h text:style-name="P21" text:outline-level="3"><text:span text:style-name="T7">🌐 Étape 2 : L'interface HTML dans </text:span><text:span text:style-name="Source_20_Text"><text:span text:style-name="T7">templates/index.html</text:span></text:span></text:h>
        <text:p text:style-name="P5">Pour afficher élégamment cette liste de suggestions sans casser ton design actuel, ajoute une zone dédiée aux résultats sous le conteneur de ton piano (ou dans ta barre latérale).</text:p>
        <text:p text:style-name="P20"><text:span text:style-name="T7">Recherche l'endroit idéal dans ton </text:span><text:span text:style-name="Source_20_Text"><text:span text:style-name="T6">index.html</text:span></text:span><text:span text:style-name="T7"> et insère ce bloc :</text:span></text:p>
        <text:h text:style-name="P21" text:outline-level="3"><text:span text:style-name="T7">⚡ Étape 3 : La logique globale dans </text:span><text:span text:style-name="Source_20_Text"><text:span text:style-name="T7">static/js/main.js</text:span></text:span></text:h>
        <text:p text:style-name="P20"><text:span text:style-name="T7">Voici le script JavaScript complet mis à jour pour remplacer ton fichier </text:span><text:span text:style-name="Source_20_Text"><text:span text:style-name="T6">static/js/main.js</text:span></text:span><text:span text:style-name="T7">. Il gère la double casquette : l'écoute du clic sur le piano pour lancer la recherche inverse, et l'affichage interactif au survol des lignes (la version stable et validée que l'on a finalisée juste avant).</text:span></text:p>
        <text:h text:style-name="P4" text:outline-level="3">Prochaine étape : Les transpositions des Modes à Transpositions Limitées (PMTL)</text:h>
        <text:p text:style-name="P5">Prends le temps d'implémenter cette recherche par clavier et de vérifier que l'affichage des notes manquantes te convient parfaitement.</text:p>
        <text:p text:style-name="P20"><text:span text:style-name="T7">Dès que c'est bon, dis-le moi et nous nous attaquerons au </text:span><text:span text:style-name="T6">Point 2</text:span><text:span text:style-name="T7"> : modifier dynamiquement le contenu du menu racine </text:span><text:span text:style-name="Source_20_Text"><text:span text:style-name="T7">root-select</text:span></text:span><text:span text:style-name="T7"> en JavaScript pour qu'il affiche les vraies appellations structurelles (ex: </text:span><text:span text:style-name="Source_20_Text"><text:span text:style-name="T7">(0,1)</text:span></text:span><text:span text:style-name="T7">, </text:span><text:span text:style-name="Source_20_Text"><text:span text:style-name="T7">(1,2)</text:span></text:span><text:span text:style-name="T7">) lorsque l'utilisateur sélectionne un set symétrique comme l'Octatonique ou le Whole-Tone !</text:span></text:p>
      </text:section>
      <text:p text:style-name="P10"/>
      <text:p text:style-name="P12">Voici la marche à suivre avec les blocs de code précis à rajouter ou modifier.</text:p>
      <text:h text:style-name="Heading_20_3" text:outline-level="3">Étape 1 : Le squelette HTML</text:h>
      <text:p text:style-name="Text_20_body">Ajoute ce bloc dans ton fichier HTML (par exemple, juste en dessous ou à côté de ton conteneur <text:span text:style-name="Source_20_Text">#keyboard-matches-container</text:span>) pour accueillir la liste des modes :</text:p>
      <text:p text:style-name="Text_20_body">HTML</text:p>
      <text:p text:style-name="Preformatted_20_Text"><text:span text:style-name="Source_20_Text">&lt;div id="collection-modes-container" style="display: none; margin-top: 20px; font-family: 'Segoe UI', sans-serif;"&gt;</text:span></text:p>
      <text:p text:style-name="Preformatted_20_Text"><text:span text:style-name="Source_20_Text"><text:s text:c="4"/>&lt;h3 style="color: #cbd5e1; font-size: 16px; margin-bottom: 10px;"&gt;Collection sélectionnée :&lt;/h3&gt;</text:span></text:p>
      <text:p text:style-name="Preformatted_20_Text"><text:span text:style-name="Source_20_Text"><text:s text:c="4"/>&lt;div id="selected-collection-badge" style="margin-bottom: 20px;"&gt;&lt;/div&gt;</text:span></text:p>
      <text:p text:style-name="Preformatted_20_Text"><text:span text:style-name="Source_20_Text"><text:s text:c="4"/></text:span></text:p>
      <text:p text:style-name="Preformatted_20_Text"><text:span text:style-name="Source_20_Text"><text:s text:c="4"/>&lt;h4 style="color: #94a3b8; font-size: 14px; margin-bottom: 10px;"&gt;Modes de cette collection :&lt;/h4&gt;</text:span></text:p>
      <text:p text:style-name="Preformatted_20_Text"><text:span text:style-name="Source_20_Text"><text:s text:c="4"/>&lt;ul id="modes-list" style="list-style: none; padding: 0; margin: 0;"&gt;&lt;/ul&gt;</text:span></text:p>
      <text:p text:style-name="P16"><text:span text:style-name="Source_20_Text">&lt;/div&gt;</text:span></text:p>
      <text:h text:style-name="Heading_20_3" text:outline-level="3"><text:soft-page-break/>Étape 2 : Le dictionnaire des modes côté JavaScript (<text:span text:style-name="Source_20_Text">main.js</text:span>)</text:h>
      <text:p text:style-name="Text_20_body">Puisque ton backend renvoie la liste des notes sous forme de numéros (les <text:span text:style-name="T1">pitches</text:span>), nous pouvons générer mathématiquement les modes directement en Front-end (ou préparer le terrain pour l'audio plus tard).</text:p>
      <text:p text:style-name="Text_20_body">Au tout début de ton fichier <text:span text:style-name="Source_20_Text">static/js/main.js</text:span>, juste en dessous de ton <text:span text:style-name="Source_20_Text">noteMap</text:span> ou de tes définitions de variables, ajoute ce dictionnaire qui associe chaque type de set asymétrique à ses noms de modes :</text:p>
      <text:p text:style-name="Text_20_body">JavaScript</text:p>
      <text:p text:style-name="Preformatted_20_Text"><text:span text:style-name="Source_20_Text"><text:s text:c="4"/>// Liste des modes pour chaque famille asymétrique (ordonnés par degré)</text:span></text:p>
      <text:p text:style-name="Preformatted_20_Text"><text:span text:style-name="Source_20_Text"><text:s text:c="4"/>const familyModes = {</text:span></text:p>
      <text:p text:style-name="Preformatted_20_Text"><text:span text:style-name="Source_20_Text"><text:s text:c="8"/>"Diatonic": ["Major/Ionian", "Dorian", "Phrygian", "Lydian", "Mixolydian", "Aeolian", "Locrian"],</text:span></text:p>
      <text:p text:style-name="Preformatted_20_Text"><text:span text:style-name="Source_20_Text"><text:s text:c="8"/>"Acoustic": ["Acoustic (Lydian b7)", "Major Locrian", "Altered b6", "Melodic Minor", "Dorian b2", "Lydian Augmented", "Bartok/Lydian Dominant"],</text:span></text:p>
      <text:p text:style-name="Preformatted_20_Text"><text:span text:style-name="Source_20_Text"><text:s text:c="8"/>"Harmonic Minor": ["Harmonic Minor", "Locrian ♮6", "Ionian ♯5", "Dorian ♯4", "Phrygian Dominant", "Lydian ♯2", "Ultralocrian"],</text:span></text:p>
      <text:p text:style-name="Preformatted_20_Text"><text:span text:style-name="Source_20_Text"><text:s text:c="8"/>"Harmonic Major": ["Harmonic Major", "Dorian b5", "Phrygian b4", "Lydian b3", "Mixolydian b2", "Lydian Augmented ♯2", "Locrian bb7"]</text:span></text:p>
      <text:p text:style-name="P16"><text:span text:style-name="Source_20_Text"><text:s text:c="4"/>};</text:span></text:p>
      <text:h text:style-name="Heading_20_3" text:outline-level="3">Étape 3 : La fonction de rendu des modes (<text:span text:style-name="Source_20_Text">main.js</text:span>)</text:h>
      <text:p text:style-name="Text_20_body">Ajoute cette nouvelle fonction à la fin de ton fichier <text:span text:style-name="Source_20_Text">static/js/main.js</text:span> (juste avant le tout dernier <text:span text:style-name="Source_20_Text">});</text:span> de fermeture du script). Elle va s'occuper de construire exactement l'interface visuelle de ta capture d'écran :</text:p>
      <text:p text:style-name="Text_20_body">JavaScript</text:p>
      <text:p text:style-name="Preformatted_20_Text"><text:span text:style-name="Source_20_Text"><text:s text:c="4"/>function displayCollectionModes(family, root) {</text:span></text:p>
      <text:p text:style-name="Preformatted_20_Text"><text:span text:style-name="Source_20_Text"><text:s text:c="8"/>const container = document.getElementById('collection-modes-container');</text:span></text:p>
      <text:p text:style-name="Preformatted_20_Text"><text:span text:style-name="Source_20_Text"><text:s text:c="8"/>const badgeDiv = document.getElementById('selected-collection-badge');</text:span></text:p>
      <text:p text:style-name="Preformatted_20_Text"><text:span text:style-name="Source_20_Text"><text:s text:c="8"/>const modesList = document.getElementById('modes-list');</text:span></text:p>
      <text:p text:style-name="Preformatted_20_Text"/>
      <text:p text:style-name="Preformatted_20_Text"><text:span text:style-name="Source_20_Text"><text:s text:c="8"/>// 1. Affichage du Badge Vert de la collection</text:span></text:p>
      <text:p text:style-name="Preformatted_20_Text"><text:span text:style-name="Source_20_Text"><text:s text:c="8"/>// Traduction visuelle si c'est un set symétrique pour l'affichage du badge</text:span></text:p>
      <text:p text:style-name="Preformatted_20_Text"><text:span text:style-name="Source_20_Text"><text:s text:c="8"/>let shortName = root;</text:span></text:p>
      <text:p text:style-name="Preformatted_20_Text"><text:span text:style-name="Source_20_Text"><text:s text:c="8"/>if (["Octatonic", "Whole Tone", "Hexatonic"].includes(family)) {</text:span></text:p>
      <text:p text:style-name="Preformatted_20_Text"><text:span text:style-name="Source_20_Text"><text:s text:c="12"/>const symNames = { "C": "0,1", "C#": "1,2", "D": "2,3", "Eb": "3,4" };</text:span></text:p>
      <text:p text:style-name="Preformatted_20_Text"><text:span text:style-name="Source_20_Text"><text:s text:c="12"/>shortName = symNames[root] || roo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badgeDiv.innerHTML = `</text:span></text:p>
      <text:p text:style-name="Preformatted_20_Text"><text:span text:style-name="Source_20_Text"><text:s text:c="12"/>&lt;span style="background-color: #84cc16; color: #ffffff; padding: 6px 14px; border-radius: 6px; font-weight: bold; font-size: 14px; display: inline-block; box-shadow: 0 2px 4px rgba(0,0,0,0.2);"&gt;</text:span></text:p>
      <text:p text:style-name="Preformatted_20_Text"><text:span text:style-name="Source_20_Text"><text:s text:c="16"/>${shortName} ${family.substring(0, 3).toUpperCase()}</text:span></text:p>
      <text:p text:style-name="Preformatted_20_Text"><text:span text:style-name="Source_20_Text"><text:s text:c="12"/>&lt;/span&gt;</text:span></text:p>
      <text:p text:style-name="Preformatted_20_Text"><text:span text:style-name="Source_20_Text"><text:s text:c="12"/>&lt;span style="color: #64748b; margin-left: 10px; font-size: 14px;"&gt;(${root} ${family})&lt;/span&gt;</text:span></text:p>
      <text:p text:style-name="Preformatted_20_Text"><text:span text:style-name="Source_20_Text"><text:s text:c="8"/>`;</text:span></text:p>
      <text:p text:style-name="Preformatted_20_Text"/>
      <text:p text:style-name="Preformatted_20_Text"><text:span text:style-name="Source_20_Text"><text:s text:c="8"/>// 2. Génération de la liste des modes</text:span></text:p>
      <text:p text:style-name="Preformatted_20_Text"><text:span text:style-name="Source_20_Text"><text:s text:c="8"/>modesList.innerHTML = '';</text:span></text:p>
      <text:p text:style-name="Preformatted_20_Text"/>
      <text:p text:style-name="Preformatted_20_Text"><text:soft-page-break/><text:span text:style-name="Source_20_Text"><text:s text:c="8"/>if (familyModes[family]) {</text:span></text:p>
      <text:p text:style-name="Preformatted_20_Text"><text:span text:style-name="Source_20_Text"><text:s text:c="12"/>// C'est un set asymétrique : on boucle sur ses modes</text:span></text:p>
      <text:p text:style-name="Preformatted_20_Text"><text:span text:style-name="Source_20_Text"><text:s text:c="12"/>familyModes[family].forEach((modeName, index) =&gt; {</text:span></text:p>
      <text:p text:style-name="Preformatted_20_Text"><text:span text:style-name="Source_20_Text"><text:s text:c="16"/>const li = document.createElement('li');</text:span></text:p>
      <text:p text:style-name="Preformatted_20_Text"><text:span text:style-name="Source_20_Text"><text:s text:c="16"/>li.style.display = 'flex';</text:span></text:p>
      <text:p text:style-name="Preformatted_20_Text"><text:span text:style-name="Source_20_Text"><text:s text:c="16"/>li.style.justifyContent = 'space-between';</text:span></text:p>
      <text:p text:style-name="Preformatted_20_Text"><text:span text:style-name="Source_20_Text"><text:s text:c="16"/>li.style.alignItems = 'center';</text:span></text:p>
      <text:p text:style-name="Preformatted_20_Text"><text:span text:style-name="Source_20_Text"><text:s text:c="16"/>li.style.marginBottom = '10px';</text:span></text:p>
      <text:p text:style-name="Preformatted_20_Text"><text:span text:style-name="Source_20_Text"><text:s text:c="16"/>li.style.color = '#94a3b8';</text:span></text:p>
      <text:p text:style-name="Preformatted_20_Text"><text:span text:style-name="Source_20_Text"><text:s text:c="16"/>li.style.fontSize = '14px';</text:span></text:p>
      <text:p text:style-name="Preformatted_20_Text"/>
      <text:p text:style-name="Preformatted_20_Text"><text:span text:style-name="Source_20_Text"><text:s text:c="16"/>li.innerHTML = `</text:span></text:p>
      <text:p text:style-name="Preformatted_20_Text"><text:span text:style-name="Source_20_Text"><text:s text:c="20"/>&lt;span&gt;&lt;span style="color: #475569; margin-right: 8px;"&gt;▪&lt;/span&gt; ${modeName}&lt;/span&gt;</text:span></text:p>
      <text:p text:style-name="Preformatted_20_Text"><text:span text:style-name="Source_20_Text"><text:s text:c="20"/>&lt;button class="play-mode-btn" data-degree="${index}" style="</text:span></text:p>
      <text:p text:style-name="Preformatted_20_Text"><text:span text:style-name="Source_20_Text"><text:s text:c="24"/>background-color: #ffffff;</text:span></text:p>
      <text:p text:style-name="Preformatted_20_Text"><text:span text:style-name="Source_20_Text"><text:s text:c="24"/>color: #0f172a;</text:span></text:p>
      <text:p text:style-name="Preformatted_20_Text"><text:span text:style-name="Source_20_Text"><text:s text:c="24"/>border: 1px solid #cbd5e1;</text:span></text:p>
      <text:p text:style-name="Preformatted_20_Text"><text:span text:style-name="Source_20_Text"><text:s text:c="24"/>padding: 6px 12px;</text:span></text:p>
      <text:p text:style-name="Preformatted_20_Text"><text:span text:style-name="Source_20_Text"><text:s text:c="24"/>border-radius: 4px;</text:span></text:p>
      <text:p text:style-name="Preformatted_20_Text"><text:span text:style-name="Source_20_Text"><text:s text:c="24"/>font-weight: 500;</text:span></text:p>
      <text:p text:style-name="Preformatted_20_Text"><text:span text:style-name="Source_20_Text"><text:s text:c="24"/>cursor: pointer;</text:span></text:p>
      <text:p text:style-name="Preformatted_20_Text"><text:span text:style-name="Source_20_Text"><text:s text:c="24"/>font-size: 12px;</text:span></text:p>
      <text:p text:style-name="Preformatted_20_Text"><text:span text:style-name="Source_20_Text"><text:s text:c="24"/>transition: all 0.2s;"&gt;</text:span></text:p>
      <text:p text:style-name="Preformatted_20_Text"><text:span text:style-name="Source_20_Text"><text:s text:c="24"/>PLAY THIS MODE</text:span></text:p>
      <text:p text:style-name="Preformatted_20_Text"><text:span text:style-name="Source_20_Text"><text:s text:c="20"/>&lt;/button&gt;</text:span></text:p>
      <text:p text:style-name="Preformatted_20_Text"><text:span text:style-name="Source_20_Text"><text:s text:c="16"/>`;</text:span></text:p>
      <text:p text:style-name="Preformatted_20_Text"><text:span text:style-name="Source_20_Text"><text:s text:c="16"/>modesList.appendChild(li);</text:span></text:p>
      <text:p text:style-name="Preformatted_20_Text"><text:span text:style-name="Source_20_Text"><text:s text:c="12"/>});</text:span></text:p>
      <text:p text:style-name="Preformatted_20_Text"><text:span text:style-name="Source_20_Text"><text:s text:c="8"/>} else {</text:span></text:p>
      <text:p text:style-name="Preformatted_20_Text"><text:span text:style-name="Source_20_Text"><text:s text:c="12"/>// C'est un set symétrique (Octatonic, Whole Tone, Hexatonic)</text:span></text:p>
      <text:p text:style-name="Preformatted_20_Text"><text:span text:style-name="Source_20_Text"><text:s text:c="12"/>const li = document.createElement('li');</text:span></text:p>
      <text:p text:style-name="Preformatted_20_Text"><text:span text:style-name="Source_20_Text"><text:s text:c="12"/>li.style.color = '#64748b';</text:span></text:p>
      <text:p text:style-name="Preformatted_20_Text"><text:span text:style-name="Source_20_Text"><text:s text:c="12"/>li.style.fontStyle = 'italic';</text:span></text:p>
      <text:p text:style-name="Preformatted_20_Text"><text:span text:style-name="Source_20_Text"><text:s text:c="12"/>li.style.padding = '10px 0';</text:span></text:p>
      <text:p text:style-name="Preformatted_20_Text"><text:span text:style-name="Source_20_Text"><text:s text:c="12"/>li.innerText = "Cette collection est symétrique (à transpositions limitées) et ne possède pas de modes distincts exploitables de manière diatonique.";</text:span></text:p>
      <text:p text:style-name="Preformatted_20_Text"><text:span text:style-name="Source_20_Text"><text:s text:c="12"/>modesList.appendChild(li);</text:span></text:p>
      <text:p text:style-name="Preformatted_20_Text"><text:span text:style-name="Source_20_Text"><text:s text:c="8"/>}</text:span></text:p>
      <text:p text:style-name="Preformatted_20_Text"/>
      <text:p text:style-name="Preformatted_20_Text"><text:span text:style-name="Source_20_Text"><text:s text:c="8"/>// Rendre le conteneur visible</text:span></text:p>
      <text:p text:style-name="Preformatted_20_Text"><text:span text:style-name="Source_20_Text"><text:s text:c="8"/>container.style.display = 'block';</text:span></text:p>
      <text:p text:style-name="P16"><text:span text:style-name="Source_20_Text"><text:s text:c="4"/>}</text:span></text:p>
      <text:h text:style-name="Heading_20_3" text:outline-level="3">Étape 4 : Déclencher l'affichage lors d'une recherche</text:h>
      <text:p text:style-name="Text_20_body">Pour que ce panneau se mette à jour automatiquement au moment où le graphe et le piano se chargent, il faut appeler notre nouvelle fonction à la fin de <text:span text:style-name="Source_20_Text">updateExploration</text:span>.</text:p>
      <text:p text:style-name="Text_20_body">Dans <text:span text:style-name="Source_20_Text">static/js/main.js</text:span>, va tout à la fin de ta fonction <text:span text:style-name="Source_20_Text">async function updateExploration(type, root, distance)</text:span>. Juste après la configuration des écouteurs du graphe Vis.js (après le bloc <text:span text:style-name="Source_20_Text">network.on("doubleClick", ...)</text:span>), ajoute cette ligne :</text:p>
      <text:p text:style-name="Text_20_body">JavaScript</text:p>
      <text:p text:style-name="Preformatted_20_Text"><text:span text:style-name="Source_20_Text"><text:s text:c="8"/>// Déclenche l'affichage du panneau des modes correspondant au choix actuel</text:span></text:p>
      <text:p text:style-name="P16"><text:span text:style-name="Source_20_Text"><text:s text:c="8"/>displayCollectionModes(type, root);</text:span></text:p>
      <text:p text:style-name="Text_20_body"><text:soft-page-break/>Fais également de même à l'intérieur de l'écouteur du bouton <text:span text:style-name="Source_20_Text">.match-btn</text:span> (quand on clique sur un set détecté via le clavier) pour forcer son affichage. Écris-le juste en dessous de l'appel à <text:span text:style-name="Source_20_Text">updateExploration(family, root, ...)</text:span> :</text:p>
      <text:p text:style-name="Text_20_body">JavaScript</text:p>
      <text:p text:style-name="Preformatted_20_Text"><text:span text:style-name="Source_20_Text"><text:s text:c="16"/>updateExploration(family, root, distanceSelect.value);</text:span></text:p>
      <text:p text:style-name="P16"><text:span text:style-name="Source_20_Text"><text:s text:c="16"/>displayCollectionModes(family, root); // Force la mise à jour des modes</text:span></text:p>
      <text:p text:style-name="Text_20_body">Une fois ces modifications appliquées, un rafraîchissement complet (<text:span text:style-name="T5">Ctrl + F5</text:span>) te permettra de voir apparaître dynamiquement le badge de ton set accompagné de ses modes ou du message d'exclusion symétrique. Les boutons <text:span text:style-name="Source_20_Text">"PLAY THIS MODE"</text:span> sont prêts et n'attendent plus que l'implémentation du moteur audio Web Audio API ou Tone.js !</text:p>
      <text:p text:style-name="P10"/>
      <text:h text:style-name="P11" text:outline-level="3">Qu'est-ce que le Mode Analyse dans notre architecture ?</text:h>
      <text:p text:style-name="Text_20_body">Dans le mode Exploration, l'utilisateur choisit <text:span text:style-name="T5">un seul set</text:span> (le centre) et la machine calcule ses voisins théoriques de proche en proche. En <text:span text:style-name="T5">Mode Analyse</text:span>, l'utilisateur va soumettre une <text:span text:style-name="T5">suite ou un pool de sets</text:span> (par exemple, la structure harmonique d'un morceau de musique qu'il analyse). Le système doit :</text:p>
      <text:list xml:id="list870973909" text:style-name="L11">
        <text:list-item>
          <text:p text:style-name="P55">Prendre cette liste de sets saisis.</text:p>
        </text:list-item>
        <text:list-item>
          <text:p text:style-name="P55">Repérer s'ils sont connectés directement, ou calculer les "routes de secours" (les stations pivots manquantes) pour lier les blocs isolés (les fameux archipels).</text:p>
        </text:list-item>
        <text:list-item>
          <text:p text:style-name="P55"><text:span text:style-name="T5">Afficher un graphe sur-mesure contenant uniquement les sets du morceau</text:span>, interconnectés par leurs relations de <text:span text:style-name="T1">voice-leading</text:span>.</text:p>
        </text:list-item>
      </text:list>
      <text:h text:style-name="Heading_20_3" text:outline-level="3">La stratégie d'implémentation</text:h>
      <text:p text:style-name="Text_20_body">Pour intégrer cela proprement dans l'application actuelle, nous allons procéder en trois étapes :</text:p>
      <text:list xml:id="list1444474705" text:style-name="L12">
        <text:list-item>
          <text:p text:style-name="P56"><text:span text:style-name="T5">Le Front-end (HTML/UI) :</text:span> Ajouter un système d'onglets (Tabs) en haut de ta page pour basculer entre le mode "Exploration" et le mode "Analyse".</text:p>
        </text:list-item>
        <text:list-item>
          <text:p text:style-name="P56"><text:span text:style-name="T5">Le panneau de saisie de l'Analyse :</text:span> En mode Analyse, remplacer les menus de sélection par une interface permettant d'ajouter plusieurs sets les uns après les autres (une liste dynamique d'accords/sets) et un bouton "Lancer l'Analyse".</text:p>
        </text:list-item>
        <text:list-item>
          <text:p text:style-name="P56"><text:span text:style-name="T5">Le Back-end (</text:span><text:span text:style-name="Source_20_Text"><text:span text:style-name="T5">app.py</text:span></text:span><text:span text:style-name="T5">) :</text:span> Créer une nouvelle route <text:span text:style-name="Source_20_Text">@app.route('/api/analyze', methods=['POST'])</text:span> qui va recevoir cette liste de sets, utiliser ton script NetworkX pour générer le sous-graphe spécifique au morceau, et renvoyer les nœuds et liaisons correspondants à Vis.js.</text:p>
        </text:list-item>
      </text:list>
      <text:h text:style-name="Heading_20_3" text:outline-level="3">Par quoi commence-t-on ?</text:h>
      <text:p text:style-name="Text_20_body">As-tu déjà sous la main dans ton fichier <text:span text:style-name="Source_20_Text">utility_functions.py</text:span> la fonction Python qui prend une <text:span text:style-name="T5">liste de plusieurs stations</text:span> et calcule le graphe de leurs interconnexions (celle dont on parlait <text:soft-page-break/>dans notre toute première discussion), ou est-ce qu'on doit d'abord regarder comment structurer la route dans <text:span text:style-name="Source_20_Text">app.py</text:span> ?</text:p>
      <text:p text:style-name="Text_20_body">Si tu l'as, tu peux me la partager, sinon dis-moi et on commence par préparer l'interface à onglets dans le HTML !</text:p>
      <text:p text:style-name="P10"/>
      <text:p text:style-name="P12">C’est le moment parfait pour basculer sur le Mode Analyse.</text:p>
      <text:section text:style-name="Sect2" text:name="model-response-message-contentr_7c1e1cbe845f66f1">
        <text:p text:style-name="Text_20_body">Puisque nous avons choisi une architecture <text:span text:style-name="T5">Web (Flask + JS/HTML/CSS avec Vis.js)</text:span> plutôt que Streamlit ou Tkinter, l'implémentation va être super fluide. Nous allons pouvoir réutiliser tout le moteur graphique interactif que nous venons de stabiliser pour l'Exploration.</text:p>
        <text:h text:style-name="Heading_20_3" text:outline-level="3">Qu'est-ce que le Mode Analyse dans notre architecture ?</text:h>
        <text:p text:style-name="Text_20_body">Dans le mode Exploration, l'utilisateur choisit <text:span text:style-name="T5">un seul set</text:span> (le centre) et la machine calcule ses voisins théoriques de proche en proche. En <text:span text:style-name="T5">Mode Analyse</text:span>, l'utilisateur va soumettre une <text:span text:style-name="T5">suite ou un pool de sets</text:span> (par exemple, la structure harmonique d'un morceau de musique qu'il analyse). Le système doit :</text:p>
        <text:list xml:id="list1273822439" text:style-name="L13">
          <text:list-item>
            <text:p text:style-name="P57">Prendre cette liste de sets saisis.</text:p>
          </text:list-item>
          <text:list-item>
            <text:p text:style-name="P57">Repérer s'ils sont connectés directement, ou calculer les "routes de secours" (les stations pivots manquantes) pour lier les blocs isolés (les fameux archipels).</text:p>
          </text:list-item>
          <text:list-item>
            <text:p text:style-name="P57"><text:span text:style-name="T5">Afficher un graphe sur-mesure contenant uniquement les sets du morceau</text:span>, interconnectés par leurs relations de <text:span text:style-name="T1">voice-leading</text:span>.</text:p>
          </text:list-item>
        </text:list>
        <text:h text:style-name="Heading_20_3" text:outline-level="3">La stratégie d'implémentation</text:h>
        <text:p text:style-name="Text_20_body">Pour intégrer cela proprement dans l'application actuelle, nous allons procéder en trois étapes :</text:p>
        <text:list xml:id="list3222485409" text:style-name="L14">
          <text:list-item>
            <text:p text:style-name="P58"><text:span text:style-name="T5">Le Front-end (HTML/UI) :</text:span> Ajouter un système d'onglets (Tabs) en haut de ta page pour basculer entre le mode "Exploration" et le mode "Analyse".</text:p>
          </text:list-item>
          <text:list-item>
            <text:p text:style-name="P58"><text:span text:style-name="T5">Le panneau de saisie de l'Analyse :</text:span> En mode Analyse, remplacer les menus de sélection par une interface permettant d'ajouter plusieurs sets les uns après les autres (une liste dynamique d'accords/sets) et un bouton "Lancer l'Analyse".</text:p>
          </text:list-item>
          <text:list-item>
            <text:p text:style-name="P58"><text:span text:style-name="T5">Le Back-end (</text:span><text:span text:style-name="Source_20_Text"><text:span text:style-name="T5">app.py</text:span></text:span><text:span text:style-name="T5">) :</text:span> Créer une nouvelle route <text:span text:style-name="Source_20_Text">@app.route('/api/analyze', methods=['POST'])</text:span> qui va recevoir cette liste de sets, utiliser ton script NetworkX pour générer le sous-graphe spécifique au morceau, et renvoyer les nœuds et liaisons correspondants à Vis.js.</text:p>
          </text:list-item>
        </text:list>
        <text:h text:style-name="Heading_20_3" text:outline-level="3">Par quoi commence-t-on ?</text:h>
        <text:p text:style-name="Text_20_body">As-tu déjà sous la main dans ton fichier <text:span text:style-name="Source_20_Text">utility_functions.py</text:span> la fonction Python qui prend une <text:span text:style-name="T5">liste de plusieurs stations</text:span> et calcule le graphe de leurs interconnexions (celle dont on parlait dans notre toute première discussion), ou est-ce qu'on doit d'abord regarder comment structurer la route dans <text:span text:style-name="Source_20_Text">app.py</text:span> ?</text:p>
        <text:p text:style-name="Text_20_body"><text:soft-page-break/>Si tu l'as, tu peux me la partager, sinon dis-moi et on commence par préparer l'interface à onglets dans le HTML !</text:p>
      </text:section>
      <text:p text:style-name="P12">Voici le résumé complet de l'architecture que nous avons mise en place pour implémenter et stabiliser ce mode Analyse :</text:p>
      <text:h text:style-name="Heading_20_3" text:outline-level="3">1. Robustesse et standardisation des données (<text:span text:style-name="Source_20_Text">app.py</text:span>)</text:h>
      <text:list xml:id="list2450480180" text:style-name="L15">
        <text:list-item>
          <text:p text:style-name="P59"><text:span text:style-name="T5">Aplatissement en chaînes de caractères (</text:span><text:span text:style-name="Source_20_Text"><text:span text:style-name="T5">str()</text:span></text:span><text:span text:style-name="T5">) :</text:span> Pour éliminer la cause principale de plantage (le mélange entre les types de données musicaux internes de ton moteur et l'interface), toutes les entités envoyées à Vis.js sont converties à la volée en texte standardisé.</text:p>
        </text:list-item>
        <text:list-item>
          <text:p text:style-name="P59"><text:span text:style-name="T5">Extraction directe depuis le graphe :</text:span> Au lieu de recalculer artificiellement les arêtes directes de la pièce dans le script de l'application, nous lisons directement la structure interne générée par <text:span text:style-name="Source_20_Text">pa.build_piece_harmonic_graph</text:span>.</text:p>
        </text:list-item>
        <text:list-item>
          <text:p text:style-name="P59"><text:span text:style-name="T5">Raccordement dynamique des "Éco-pathways" :</text:span> Nous récupérons le dictionnaire du rapport d'archipels (<text:span text:style-name="Source_20_Text">archipelago_routes</text:span>) pour tracer en pointillés les routes de secours indirectes (liaisons absolues ou relatives) calculées par ton algorithme, en injectant dynamiquement des nœuds virtuels "en losange" lorsque le chemin emprunte une station absente du morceau.</text:p>
        </text:list-item>
      </text:list>
      <text:h text:style-name="Heading_20_3" text:outline-level="3">2. Épuration et esthétique visuelle (Graphe Vis.js)</text:h>
      <text:list xml:id="list1654902045" text:style-name="L16">
        <text:list-item>
          <text:p text:style-name="P60"><text:span text:style-name="T5">Code couleur par familles restauré :</text:span> En transmettant uniquement l'étiquette de groupe (<text:span text:style-name="Source_20_Text">group: family</text:span>) sans écraser de propriété de couleur brute côté Python, nous avons permis à Vis.js d'appliquer ton dictionnaire de styles natif (<text:span text:style-name="Source_20_Text">Diatonic</text:span> en bleu, <text:span text:style-name="Source_20_Text">Acoustic</text:span> en bleu-vert, etc.) aux sets du morceau, même s'ils sont isolés.</text:p>
        </text:list-item>
        <text:list-item>
          <text:p text:style-name="P60"><text:span text:style-name="T5">Aplatissement des doublons directionnels :</text:span> Les routes aller-retour parallèles ont été fusionnées en arêtes uniques et épurées en désactivant les flèches graphiques (<text:span text:style-name="Source_20_Text">arrows: ""</text:span>), la nature réversible et bidirectionnelle des relations de voix étant déjà prise en charge au survol.</text:p>
        </text:list-item>
        <text:list-item>
          <text:p text:style-name="P60"><text:span text:style-name="T5">Une couleur par itinéraire d'archipel :</text:span> Les liaisons directes du morceau sont unifiées avec une couleur discrète (<text:span text:style-name="Source_20_Text">#84cc16</text:span>), tandis que chaque trajet reliant un îlot isolé au maillage principal génère sa propre couleur aléatoire, permettant de suivre les dérives harmoniques d'un seul coup d'œil.</text:p>
        </text:list-item>
        <text:list-item>
          <text:p text:style-name="P60"><text:span text:style-name="T5">Allègement textuel :</text:span> Les étiquettes encombrantes sur les flèches ont été supprimées au profit d'un affichage minimaliste au survol (ex: <text:span text:style-name="Source_20_Text">G ⇄ Ab</text:span>).</text:p>
        </text:list-item>
      </text:list>
      <text:h text:style-name="Heading_20_3" text:outline-level="3">3. Interface et Confort d'utilisation (HTML / CSS / JS)</text:h>
      <text:list xml:id="list2421273722" text:style-name="L17">
        <text:list-item>
          <text:p text:style-name="P61"><text:span text:style-name="T5">Destruction propre de l'instance du réseau :</text:span> Ajout d'une vérification stricte sur la variable globale (<text:span text:style-name="Source_20_Text">typeof network !== 'undefined'</text:span>) avant d'appeler <text:soft-page-break/><text:span text:style-name="Source_20_Text">network.destroy()</text:span>, évitant les crashs silencieux lors de la reconstruction de la topologie.</text:p>
        </text:list-item>
        <text:list-item>
          <text:p text:style-name="P61"><text:span text:style-name="T5">Légende contextuelle dynamique :</text:span> Création d'une légende flottante masquée par défaut au démarrage (<text:span text:style-name="Source_20_Text">display: none</text:span>), qui apparaît uniquement lorsque l'utilisateur bascule sur l'onglet d'analyse et documente la sémantique des cercles, des losanges et des pointillés.</text:p>
        </text:list-item>
      </text:list>
      <text:h text:style-name="P15" text:outline-level="3"/>
      <text:h text:style-name="P15" text:outline-level="3"/>
      <text:h text:style-name="P15" text:outline-level="3"/>
      <text:h text:style-name="P15" text:outline-level="3">Prochaine étape : Le Mode Composition</text:h>
      <text:p text:style-name="Text_20_body">Le terrain est désormais parfaitement balisé. Quand tu es prêt, dis-moi ce que tu imagines pour ce mode <text:span text:style-name="T5">Composition</text:span> :</text:p>
      <text:list xml:id="list326431162" text:style-name="L18">
        <text:list-item>
          <text:p text:style-name="P62">S'agit-il d'aider l'utilisateur à choisir le <text:span text:style-name="T1">prochain</text:span> meilleur set à ajouter en fonction de règles harmoniques strictes ?</text:p>
        </text:list-item>
        <text:list-item>
          <text:p text:style-name="P62">Veux-tu utiliser le piano virtuel pour générer ou tester des accords en temps réel au sein de la topologie ?</text:p>
        </text:list-item>
        <text:list-item>
          <text:p text:style-name="P62">Quelle va être l'interaction attendue avec le graphe ?</text:p>
        </text:list-item>
      </text:list>
      <text:p text:style-name="P10"/>
      <text:p text:style-name="P10"/>
      <text:p text:style-name="P10"/>
      <text:p text:style-name="P10"/>
      <text:p text:style-name="P10"/>
      <text:p text:style-name="P10"/>
      <text:p text:style-name="P10"/>
      <text:p text:style-name="P10">Problèmes à régler :</text:p>
      <text:p text:style-name="P26">1/ Trouver un moyen d’afficher les notes changeantes « dans le bon sens » (C dia → F dia ne doit pas afficher Bb du côté de C dia) <text:span text:style-name="T16">(le sens n’est pas réglé mais la double-flèche suffit, l’utilisateur regardera lui-même le sens correct du changement)</text:span></text:p>
      <text:p text:style-name="P26">2/ Trouver un moyen de vérifier que les sets reliés sont les bons, et que les notes de changement sont correctes <text:soft-page-break/>(grosse vérification à faire dans la logique plus que le visuel, <text:span text:style-name="T13">en particulier pour les changements de cardinalités</text:span>)</text:p>
      <text:p text:style-name="P27">3/ Éventuellement modifier utility_functions.py (et par conséquent l’app et main.js) pour <text:span text:style-name="T12">utiliser les chiffres pour la logique et les noms pour le visuel</text:span></text:p>
      <text:p text:style-name="P33">4/ Harmoniser les noms de sets affichés dans les boutons Set/Transposition, dans la liste des Sets à partir des Subsets et dans le graphe</text:p>
      <text:p text:style-name="P13">5/ Ajouter des sons (gammes ou extraits de morceaux?) pour les modes</text:p>
      <text:p text:style-name="P31">6/ Ajouter les lettres devant les noms des modes</text:p>
      <text:p text:style-name="P32">7/ Ajouter un système permettant de choisir ses propres couleurs pour chaque Set (éviter d’imposer mon interprétation)</text:p>
      <text:p text:style-name="P28">8/ Il y a des cas où les routes vers les sets isolés changent à chaque essai (même nombre de notes qui changent, donc il faut les afficher toutes s’il y en a plusieurs)</text:p>
      <text:p text:style-name="P29">9/ Séparer les visuels de chaque onglet (exploration, analyse, composition). Sauvegarder les graphes de chaque onglet pour éviter d’avoir à les recréer à chaque fois qu’on change d’onglet</text:p>
      <text:p text:style-name="P30">10/ Ajouter un<text:span text:style-name="T14">e case</text:span> dans l’onglet exploration pour dire qu’un double clic sur un set le rend central</text:p>
      <text:p text:style-name="P14"/>
      <text:p text:style-name="P43">Pour avancer efficacement et éviter de s'emmêler les pinceaux, nous allons les traiter par blocs logiques. Voici comment nous pouvons les regrouper :</text:p>
      <text:h text:style-name="P24" text:outline-level="3">📦 <text:span text:style-name="T15">Bloc A : Précision Musicale &amp; Algorithmique (Points 1, 2, 3 &amp; 8)</text:span></text:h>
      <text:p text:style-name="P18">C'est le cœur du moteur (la logique pure dans tes fichiers Python).</text:p>
      <text:list xml:id="list3487039617" text:style-name="L19">
        <text:list-item>
          <text:p text:style-name="P40"><text:soft-page-break/><text:span text:style-name="T5">Point 3 (Chiffres vs Noms) :</text:span> C'est le point de départ idéal. On bascule toute la tuyauterie interne en <text:span text:style-name="T1">Pitch Class Integers</text:span> (0 à 11) pour sécuriser les calculs, et on ne convertit en lettres (C, D#, F...) qu'au moment de l'affichage.</text:p>
        </text:list-item>
        <text:list-item>
          <text:p text:style-name="P40"><text:span text:style-name="T5">Points 1 &amp; 2 (Sens des flèches &amp; Cardinalités) :</text:span> En passant aux chiffres, la détection des notes qui bougent entre deux sets de tailles différentes (ex: un set de 7 notes vers un set de 6 notes) devient mathématiquement infaillible. On pourra s'assurer que si $A \to B$ implique $B \flat \to B$, l'affichage ne montre pas $B \flat$ comme appartenant à $A$.</text:p>
        </text:list-item>
        <text:list-item>
          <text:p text:style-name="P40"><text:span text:style-name="T5">Point 8 (Routes multiples/Ex-æquo) :</text:span> Si deux chemins de secours vers un îlot isolé ont la même distance harmonique (ex: 2 notes qui changent dans les deux cas), l'algorithme doit renvoyer une liste de routes au lieu d'en choisir une arbitrairement, et on les affichera toutes en pointillés parallèles.</text:p>
        </text:list-item>
      </text:list>
      <text:h text:style-name="P24" text:outline-level="3">📦 <text:span text:style-name="T15">Bloc B : UI, Confort &amp; Personnalisation (Points 4, 6, 7, 9 &amp; 10)</text:span></text:h>
      <text:p text:style-name="P47"><text:span text:style-name="T2">C'est la consolidation de l'interface graphique (</text:span><text:span text:style-name="Source_20_Text"><text:span text:style-name="T2">main.js</text:span></text:span><text:span text:style-name="T2"> et tes fichiers HTML/CSS).</text:span></text:p>
      <text:list xml:id="list1316019640" text:style-name="L20">
        <text:list-item>
          <text:p text:style-name="P48"><text:span text:style-name="T3">Point 9 (Persistance des onglets) :</text:span><text:span text:style-name="T2"> Actuellement, basculer d'un onglet à l'autre détruit le réseau. On va modifier le JS pour créer </text:span><text:span text:style-name="T3">trois instances Vis.js distinctes</text:span><text:span text:style-name="T2"> (</text:span><text:span text:style-name="Source_20_Text"><text:span text:style-name="T2">networkExplore</text:span></text:span><text:span text:style-name="T2">, </text:span><text:span text:style-name="Source_20_Text"><text:span text:style-name="T2">networkAnalyze</text:span></text:span><text:span text:style-name="T2">, </text:span><text:span text:style-name="Source_20_Text"><text:span text:style-name="T2">networkCompose</text:span></text:span><text:span text:style-name="T2">) liées à des conteneurs cachés/affichés dynamiquement. Changer d'onglet ne fera plus perdre ton travail.</text:span></text:p>
        </text:list-item>
        <text:list-item>
          <text:p text:style-name="P48"><text:span text:style-name="T3">Point 7 (Sélecteur de couleurs) :</text:span><text:span text:style-name="T2"> On va ajouter un petit panneau de configuration (ou un bouton d'engrenage) permettant à l'utilisateur d'ouvrir un </text:span><text:span text:style-name="T4">Color Picker</text:span><text:span text:style-name="T2"> HTML pour modifier la couleur associée à "Diatonic", "Octatonic", etc., et mettre à jour le dictionnaire </text:span><text:span text:style-name="Source_20_Text"><text:span text:style-name="T2">groups</text:span></text:span><text:span text:style-name="T2"> en temps réel.</text:span></text:p>
        </text:list-item>
        <text:list-item>
          <text:p text:style-name="P41"><text:span text:style-name="T5">Points 4, 6 &amp; 10 (Harmonisation &amp; Raccourcis) :</text:span> Uniformiser les labels textuels (ex: ajouter les numéros Forte ou lettres de classification) et implémenter l'option <text:span text:style-name="T1">"Double-clic = Définir comme centre"</text:span> via une simple case à cocher (Checkbox) dans l'exploration.</text:p>
        </text:list-item>
      </text:list>
      <text:h text:style-name="P24" text:outline-level="3">📦 <text:span text:style-name="T15">Bloc C : Multimédia (Point 5)</text:span></text:h>
      <text:list xml:id="list3385583910" text:style-name="L21">
        <text:list-item>
          <text:p text:style-name="P42"><text:span text:style-name="T5">Point 5 (Sons) :</text:span> Utiliser l'API audio native du navigateur (Web Audio API) ou une bibliothèque ultra-légère pour jouer la collection de notes du Set (sous forme d'arpège ou d'accord) lorsqu'on clique dessus.</text:p>
        </text:list-item>
      </text:list>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1T14:33:54.032000000</meta:creation-date>
    <dc:date>2026-07-08T18:12:00.232000000</dc:date>
    <meta:editing-duration>PT17H27M34S</meta:editing-duration>
    <meta:editing-cycles>29</meta:editing-cycles>
    <meta:generator>LibreOffice/7.2.5.2$Windows_X86_64 LibreOffice_project/499f9727c189e6ef3471021d6132d4c694f357e5</meta:generator>
    <meta:document-statistic meta:table-count="0" meta:image-count="0" meta:object-count="0" meta:page-count="15" meta:paragraph-count="279" meta:word-count="4869" meta:character-count="32363" meta:non-whitespace-character-count="26792"/>
  </office:meta>
</office:document-meta>
</file>