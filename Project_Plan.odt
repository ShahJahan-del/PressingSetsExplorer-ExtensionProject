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0fd799" officeooo:paragraph-rsid="0011900d" style:font-size-asian="20pt" style:font-weight-asian="bold" style:font-size-complex="20pt" style:font-weight-complex="bold"/>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style:paragraph-properties fo:margin-top="0cm" fo:margin-bottom="0cm" style:contextual-spacing="false" fo:line-height="114%"/>
    </style:style>
    <style:style style:name="P16" style:family="paragraph" style:parent-style-name="Text_20_body">
      <style:paragraph-properties fo:margin-top="0cm" fo:margin-bottom="0.247cm" style:contextual-spacing="false" fo:line-height="114%"/>
      <style:text-properties style:font-name="Google Sans Text"/>
    </style:style>
    <style:style style:name="P17"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contextual-spacing="false" fo:text-indent="0cm" style:auto-text-indent="false"/>
    </style:style>
    <style:style style:name="P19" style:family="paragraph" style:parent-style-name="Heading_20_3">
      <style:paragraph-properties fo:margin-left="0cm" fo:margin-right="0cm" fo:margin-top="0.423cm" fo:margin-bottom="0cm" style:contextual-spacing="false" fo:text-indent="0cm" style:auto-text-indent="false"/>
    </style:style>
    <style:style style:name="P20"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1"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2" style:family="paragraph" style:parent-style-name="Standard">
      <style:paragraph-properties fo:text-align="start" style:justify-single-word="false"/>
      <style:text-properties fo:font-size="20pt" fo:font-weight="bold" officeooo:rsid="00157ff7" officeooo:paragraph-rsid="00157ff7"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20pt" fo:font-weight="bold" officeooo:rsid="0018902e" officeooo:paragraph-rsid="0018902e" style:font-size-asian="20pt" style:font-weight-asian="bold" style:font-size-complex="20pt" style:font-weight-complex="bold"/>
    </style:style>
    <style:style style:name="P24"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25" style:family="paragraph" style:parent-style-name="Standard">
      <style:paragraph-properties fo:text-align="start" style:justify-single-word="false"/>
      <style:text-properties fo:font-size="20pt" fo:font-weight="bold" officeooo:rsid="001a4c58" officeooo:paragraph-rsid="001a4c58" style:font-size-asian="20pt" style:font-weight-asian="bold" style:font-size-complex="20pt" style:font-weight-complex="bold"/>
    </style:style>
    <style:style style:name="P26" style:family="paragraph" style:parent-style-name="Standard">
      <style:paragraph-properties fo:text-align="start" style:justify-single-word="false"/>
      <style:text-properties fo:font-size="20pt" fo:font-weight="bold" officeooo:rsid="001a92e9" officeooo:paragraph-rsid="001a92e9" style:font-size-asian="20pt" style:font-weight-asian="bold" style:font-size-complex="20pt" style:font-weight-complex="bold"/>
    </style:style>
    <style:style style:name="P27"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28"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29"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0"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1"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2" style:family="paragraph" style:parent-style-name="Text_20_body" style:list-style-name="L2">
      <style:paragraph-properties fo:margin-top="0cm" fo:margin-bottom="0.247cm" style:contextual-spacing="false" fo:line-height="114%" fo:padding="0cm" fo:border="none"/>
    </style:style>
    <style:style style:name="P33" style:family="paragraph" style:parent-style-name="Text_20_body" style:list-style-name="L3">
      <style:paragraph-properties fo:margin-top="0cm" fo:margin-bottom="0.247cm" style:contextual-spacing="false" fo:line-height="114%" fo:padding="0cm" fo:border="none"/>
    </style:style>
    <style:style style:name="P34" style:family="paragraph" style:parent-style-name="Text_20_body" style:list-style-name="L5">
      <style:paragraph-properties fo:margin-top="0cm" fo:margin-bottom="0.247cm" style:contextual-spacing="false" fo:line-height="114%" fo:padding="0cm" fo:border="none"/>
    </style:style>
    <style:style style:name="P35"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37"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38"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39"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40" style:family="paragraph" style:parent-style-name="Text_20_body" style:list-style-name="L9"/>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1900d"/>
    </style:style>
    <style:style style:name="T13" style:family="text">
      <style:text-properties officeooo:rsid="0012458b"/>
    </style:style>
    <style:style style:name="T14" style:family="text">
      <style:text-properties officeooo:rsid="0016599f"/>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17"/>
      <text:p text:style-name="P17">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6">Voici l'inventaire complet des briques techniques, mathématiques et graphiques dont nous allons avoir besoin pour coder cet outil.</text:p>
      <text:h text:style-name="P1" text:outline-level="2">1. L'Infrastructure Technique (Le Moteur Graphique &amp; Web)</text:h>
      <text:p text:style-name="P16">Pour que cet outil soit agréable à utiliser, il lui faut une interface visuelle fluide avec deux zones : une zone de saisie (piano/boutons) et une zone d'affichage (le graphe).</text:p>
      <text:list xml:id="list2717712168" text:style-name="L1">
        <text:list-item>
          <text:p text:style-name="P27"><text:span text:style-name="T5">Le Framework principal :</text:span> <text:span text:style-name="T5">Python avec Dash (Plotly)</text:span> ou <text:span text:style-name="T5">Streamlit</text:span>.</text:p>
          <text:list>
            <text:list-item>
              <text:p text:style-name="P27"><text:span text:style-name="T1">Pourquoi ?</text:span> Ils permettent de coder une interface Web moderne entièrement en Python, sans avoir à manipuler du JavaScript/HTML/CSS complexe.</text:p>
            </text:list-item>
          </text:list>
        </text:list-item>
        <text:list-item>
          <text:p text:style-name="P27"><text:span text:style-name="T5">Le Moteur de Graphe Interactif :</text:span> <text:span text:style-name="T5">Pyvis</text:span> ou <text:span text:style-name="T5">Plotly Network Graphs</text:span>.</text:p>
          <text:list>
            <text:list-item>
              <text:p text:style-name="P27"><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27"><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6">C'est ici qu'on injecte la logique de Tymoczko pour relier les stations. Le code doit manipuler des objets mathématiques stricts :</text:p>
      <text:list xml:id="list842190009" text:style-name="L2">
        <text:list-item>
          <text:p text:style-name="P32"><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28"><text:span text:style-name="T5">La Matrice d'Adjacence (Calcul des lignes de métro) :</text:span> Un algorithme qui tourne en arrière-plan et qui calcule pour n'importe quel couple de Sets :</text:p>
          <text:list>
            <text:list-item>
              <text:p text:style-name="P28">Le nombre exact de <text:span text:style-name="T5">pivots</text:span> (intersections d'ensembles).</text:p>
            </text:list-item>
            <text:list-item>
              <text:p text:style-name="P28">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6">Ton application devra gérer deux modes de fonctionnement distincts :</text:p>
      <text:h text:style-name="P2" text:outline-level="3"><text:soft-page-break/>Mode A : "L'Analyseur de Partitions" (Mode statique)</text:h>
      <text:list xml:id="list750567370" text:style-name="L3">
        <text:list-item>
          <text:p text:style-name="P29"><text:span text:style-name="T5">Ce qu'il prend :</text:span> Ton fichier JSON de 159 lignes réelles (ou plus).</text:p>
        </text:list-item>
        <text:list-item>
          <text:p text:style-name="P33"><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1741354647" text:style-name="L4">
        <text:list-item>
          <text:p text:style-name="P30"><text:span text:style-name="T5">Ce qu'il prend :</text:span> Une sélection instantanée sur ton piano virtuel (ton Set de départ).</text:p>
        </text:list-item>
        <text:list-item>
          <text:p text:style-name="P30"><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6">Pour que le code sache identifier les "stations", il nous faut un dictionnaire géométrique étendu (bien plus complet que notre version précédente). Il contiendra la structure fondamentale de chaque couleur harmonique :</text:p>
      <text:p text:style-name="P16">Python</text:p>
      <text:p text:style-name="P15"><text:span text:style-name="Source_20_Text"><text:span text:style-name="T2">DICTIONNAIRE_DES_SETS = {</text:span></text:span></text:p>
      <text:p text:style-name="P15"><text:span text:style-name="Source_20_Text"><text:s text:c="4"/></text:span><text:span text:style-name="Source_20_Text"><text:span text:style-name="T2">"Diatonic": [0, 2, 4, 5, 7, 9, 11],</text:span></text:span></text:p>
      <text:p text:style-name="P15"><text:span text:style-name="Source_20_Text"><text:s text:c="4"/></text:span><text:span text:style-name="Source_20_Text"><text:span text:style-name="T2">"Acoustic": [0, 2, 4, 6, 7, 9, 10],</text:span></text:span></text:p>
      <text:p text:style-name="P15"><text:span text:style-name="Source_20_Text"><text:s text:c="4"/></text:span><text:span text:style-name="Source_20_Text"><text:span text:style-name="T2">"Whole Tone": [0, 2, 4, 6, 8, 10],</text:span></text:span></text:p>
      <text:p text:style-name="P15"><text:span text:style-name="Source_20_Text"><text:s text:c="4"/></text:span><text:span text:style-name="Source_20_Text"><text:span text:style-name="T2">"Octatonic": [0, 1, 3, 4, 6, 7, 9, 10],</text:span></text:span></text:p>
      <text:p text:style-name="P15"><text:span text:style-name="Source_20_Text"><text:s text:c="4"/></text:span><text:span text:style-name="Source_20_Text"><text:span text:style-name="T2">"Hexatonic": [0, 1, 4, 5, 8, 9],</text:span></text:span></text:p>
      <text:p text:style-name="P15"><text:span text:style-name="Source_20_Text"><text:s text:c="4"/></text:span><text:span text:style-name="Source_20_Text"><text:span text:style-name="T2">"Harmonic Minor": [0, 2, 3, 5, 7, 8, 11],</text:span></text:span></text:p>
      <text:p text:style-name="P15"><text:span text:style-name="Source_20_Text"><text:s text:c="4"/></text:span><text:span text:style-name="Source_20_Text"><text:span text:style-name="T2">"Harmonic Major": [0, 2, 4, 5, 7, 8, 11],</text:span></text:span></text:p>
      <text:p text:style-name="P15"><text:span text:style-name="Source_20_Text"><text:s text:c="4"/></text:span><text:span text:style-name="Source_20_Text"><text:span text:style-name="T2"># On pourra ajouter les modes de Messiaen ou les sous-ensembles pentatoniques</text:span></text:span></text:p>
      <text:p text:style-name="P15"><text:span text:style-name="Source_20_Text"><text:span text:style-name="T2">}</text:span></text:span></text:p>
      <text:h text:style-name="P1" text:outline-level="2">Feu de route : Par quoi on commence ?</text:h>
      <text:p text:style-name="P16">Pour ne pas s'éparpiller, je te suggère de construire l'outil en trois étapes simples :</text:p>
      <text:list xml:id="list2258434926" text:style-name="L5">
        <text:list-item>
          <text:p text:style-name="P31"><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34"><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1"><text:span text:style-name="T5">Étape 3 (L'Interface Web) :</text:span> Coder le piano visuel et l'associer au graphe pour que cliquer sur une touche du piano mette à jour le réseau en temps réel.</text:p>
        </text:list-item>
      </text:list>
      <text:p text:style-name="P16">Es-tu d'accord avec cet inventaire ? Si oui, on peut attaquer directement le code de l'<text:span text:style-name="T5">Étape 1</text:span> pour poser les fondations mathématiques de ton Explorer.</text:p>
      <text:p text:style-name="P8"/>
      <text:p text:style-name="P20"><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18">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2636839975" text:style-name="L6">
          <text:list-item>
            <text:p text:style-name="P35"><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35"><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18"><text:span text:style-name="T7">L'utilisateur choisit par exemple </text:span><text:span text:style-name="Source_20_Text"><text:span text:style-name="T7">Acoustic [C]</text:span></text:span><text:span text:style-name="T7">. L'interface doit afficher :</text:span></text:p>
        <text:list xml:id="list565884240" text:style-name="L7">
          <text:list-item>
            <text:p text:style-name="P36"><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37"><text:span text:style-name="T5">Les Voisins Directs (Distance 1) :</text:span> Tu filtres les nœuds connectés dans ton graphe complet à la couche 1.</text:p>
          </text:list-item>
          <text:list-item>
            <text:p text:style-name="P37"><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23086249" text:style-name="L8">
          <text:list-item>
            <text:p text:style-name="P38">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18"><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2307266459" text:style-name="L9">
        <text:list-item>
          <text:p text:style-name="P40"><text:soft-page-break/>Ton interface est un bête fichier <text:span text:style-name="Source_20_Text">index.html</text:span> avec ton CSS personnalisé.</text:p>
        </text:list-item>
        <text:list-item>
          <text:p text:style-name="P40">Quand l'utilisateur clique sur le clavier ou choisit "Diatonic [D]", du JavaScript (<text:span text:style-name="Source_20_Text">fetch</text:span>) envoie l'info à ton script Python.</text:p>
        </text:list-item>
        <text:list-item>
          <text:p text:style-name="P40">Python fait le calcul géométrique (voisins, couches, routes de secours) et renvoie le résultat au HTML qui met à jour l'affichage dynamiquement.</text:p>
        </text:list-item>
        <text:list-item>
          <text:p text:style-name="P40"><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4"><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1"><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18">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3560086701" text:style-name="L10">
          <text:list-item>
            <text:p text:style-name="P39">Dès que l'utilisateur clique sur une touche du piano, on capture l'ensemble des notes sélectionnées.</text:p>
          </text:list-item>
          <text:list-item>
            <text:p text:style-name="P39">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39">Si l'utilisateur vide le clavier, l'affichage rebascule sur le comportement par défaut (graphe centré).</text:p>
          </text:list-item>
        </text:list>
        <text:h text:style-name="P19" text:outline-level="3"><text:soft-page-break/><text:span text:style-name="T7">🛠️ Étape 1 : Le point d'accès API dans </text:span><text:span text:style-name="Source_20_Text"><text:span text:style-name="T7">app.py</text:span></text:span></text:h>
        <text:p text:style-name="P18"><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19"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18"><text:span text:style-name="T7">Recherche l'endroit idéal dans ton </text:span><text:span text:style-name="Source_20_Text"><text:span text:style-name="T6">index.html</text:span></text:span><text:span text:style-name="T7"> et insère ce bloc :</text:span></text:p>
        <text:h text:style-name="P19" text:outline-level="3"><text:span text:style-name="T7">⚡ Étape 3 : La logique globale dans </text:span><text:span text:style-name="Source_20_Text"><text:span text:style-name="T7">static/js/main.js</text:span></text:span></text:h>
        <text:p text:style-name="P18"><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18"><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4"><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4"><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4"><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4"><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4"><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545240057" text:style-name="L11">
        <text:list-item>
          <text:p text:style-name="P41">Prendre cette liste de sets saisis.</text:p>
        </text:list-item>
        <text:list-item>
          <text:p text:style-name="P41">Repérer s'ils sont connectés directement, ou calculer les "routes de secours" (les stations pivots manquantes) pour lier les blocs isolés (les fameux archipels).</text:p>
        </text:list-item>
        <text:list-item>
          <text:p text:style-name="P41"><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361944930" text:style-name="L12">
        <text:list-item>
          <text:p text:style-name="P42"><text:span text:style-name="T5">Le Front-end (HTML/UI) :</text:span> Ajouter un système d'onglets (Tabs) en haut de ta page pour basculer entre le mode "Exploration" et le mode "Analyse".</text:p>
        </text:list-item>
        <text:list-item>
          <text:p text:style-name="P42"><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42"><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304353432" text:style-name="L13">
          <text:list-item>
            <text:p text:style-name="P43">Prendre cette liste de sets saisis.</text:p>
          </text:list-item>
          <text:list-item>
            <text:p text:style-name="P43">Repérer s'ils sont connectés directement, ou calculer les "routes de secours" (les stations pivots manquantes) pour lier les blocs isolés (les fameux archipels).</text:p>
          </text:list-item>
          <text:list-item>
            <text:p text:style-name="P43"><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235339699" text:style-name="L14">
          <text:list-item>
            <text:p text:style-name="P44"><text:span text:style-name="T5">Le Front-end (HTML/UI) :</text:span> Ajouter un système d'onglets (Tabs) en haut de ta page pour basculer entre le mode "Exploration" et le mode "Analyse".</text:p>
          </text:list-item>
          <text:list-item>
            <text:p text:style-name="P44"><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44"><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0"/>
      <text:p text:style-name="P10"/>
      <text:p text:style-name="P10"/>
      <text:p text:style-name="P10"/>
      <text:p text:style-name="P10"/>
      <text:p text:style-name="P10"/>
      <text:p text:style-name="P10">Problèmes à régler :</text:p>
      <text:p text:style-name="P10">1/ Trouver un moyen d’afficher les notes changeantes « dans le bon sens » (C dia → F dia ne doit pas afficher Bb du côté de C dia)</text:p>
      <text:p text:style-name="P10">2/ Trouver un moyen de vérifier que les sets reliés sont les bons, et que les notes de changement sont correctes (grosse vérification à faire dans la logique plus que le visuel, <text:span text:style-name="T14">en particulier pour les changements de cardinalités</text:span>)</text:p>
      <text:p text:style-name="P13">3/ Éventuellement modifier utility_functions.py (et par conséquent l’app et main.js) pour <text:span text:style-name="T13">utiliser les chiffres pour la logique et les noms pour le visuel</text:span></text:p>
      <text:p text:style-name="P13"><text:span text:style-name="T12">4/ Harmoniser les noms de sets affichés dans les boutons Set/Transposition, dans la liste des Sets à partir des Subsets et dans le graphe</text:span> </text:p>
      <text:p text:style-name="P22">5/ Ajouter des sons (gammes ou extraits de morceaux?) pour les modes</text:p>
      <text:p text:style-name="P23">6/ Ajouter les lettres devant les noms des modes</text:p>
      <text:p text:style-name="P25">7/ Ajouter un système permettant de choisir ses propres couleurs pour chaque Set (éviter d’imposer mon interprétation)</text:p>
      <text:p text:style-name="P26"><text:soft-page-break/>8/ Il y a des cas où les routes vers les sets isolés changent à chaque essai (même nombre de notes qui changent, donc il faut les afficher toutes s’il y en a plusieu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6T19:48:29.618000000</dc:date>
    <meta:editing-duration>PT8H39M20S</meta:editing-duration>
    <meta:editing-cycles>16</meta:editing-cycles>
    <meta:generator>LibreOffice/7.2.5.2$Windows_X86_64 LibreOffice_project/499f9727c189e6ef3471021d6132d4c694f357e5</meta:generator>
    <meta:document-statistic meta:table-count="0" meta:image-count="0" meta:object-count="0" meta:page-count="13" meta:paragraph-count="246" meta:word-count="3929" meta:character-count="26398" meta:non-whitespace-character-count="21714"/>
  </office:meta>
</office:document-meta>
</file>