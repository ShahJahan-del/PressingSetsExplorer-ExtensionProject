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style:paragraph-properties fo:margin-top="0cm" fo:margin-bottom="0cm" style:contextual-spacing="false" fo:line-height="114%"/>
    </style:style>
    <style:style style:name="P11" style:family="paragraph" style:parent-style-name="Text_20_body">
      <style:paragraph-properties fo:margin-top="0cm" fo:margin-bottom="0.247cm" style:contextual-spacing="false" fo:line-height="114%"/>
      <style:text-properties style:font-name="Google Sans Text"/>
    </style:style>
    <style:style style:name="P12"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15" style:family="paragraph" style:parent-style-name="Heading_20_3">
      <style:paragraph-properties fo:margin-left="0cm" fo:margin-right="0cm" fo:margin-top="0.423cm" fo:margin-bottom="0cm" style:contextual-spacing="false" fo:text-indent="0cm" style:auto-text-indent="false"/>
    </style:style>
    <style:style style:name="P16"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17" style:family="paragraph" style:parent-style-name="Preformatted_20_Text">
      <style:paragraph-properties fo:margin-left="0cm" fo:margin-right="0cm" fo:margin-top="0cm" fo:margin-bottom="0cm" style:contextual-spacing="false" fo:text-indent="0cm" style:auto-text-indent="false"/>
    </style:style>
    <style:style style:name="P18" style:family="paragraph" style:parent-style-name="Preformatted_20_Text">
      <style:paragraph-properties fo:margin-left="0cm" fo:margin-right="0cm" fo:margin-top="0cm" fo:margin-bottom="0cm" style:contextual-spacing="false" fo:text-indent="0cm" style:auto-text-indent="false"/>
      <style:text-properties fo:color="#ff5a59" loext:opacity="100%"/>
    </style:style>
    <style:style style:name="P19" style:family="paragraph" style:parent-style-name="Preformatted_20_Text">
      <style:paragraph-properties fo:margin-top="0cm" fo:margin-bottom="0cm" style:contextual-spacing="false"/>
    </style:style>
    <style:style style:name="P20"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22"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23"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24"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25"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26"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27" style:family="paragraph" style:parent-style-name="Text_20_body" style:list-style-name="L2">
      <style:paragraph-properties fo:margin-top="0cm" fo:margin-bottom="0.247cm" style:contextual-spacing="false" fo:line-height="114%" fo:padding="0cm" fo:border="none"/>
    </style:style>
    <style:style style:name="P28" style:family="paragraph" style:parent-style-name="Text_20_body" style:list-style-name="L3">
      <style:paragraph-properties fo:margin-top="0cm" fo:margin-bottom="0.247cm" style:contextual-spacing="false" fo:line-height="114%" fo:padding="0cm" fo:border="none"/>
    </style:style>
    <style:style style:name="P29" style:family="paragraph" style:parent-style-name="Text_20_body" style:list-style-name="L5">
      <style:paragraph-properties fo:margin-top="0cm" fo:margin-bottom="0.247cm" style:contextual-spacing="false" fo:line-height="114%" fo:padding="0cm" fo:border="none"/>
    </style:style>
    <style:style style:name="P30"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1"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32"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33"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34"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3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36"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37" style:family="paragraph" style:parent-style-name="Text_20_body" style:list-style-name="L9"/>
    <style:style style:name="P38" style:family="paragraph" style:parent-style-name="Text_20_body">
      <style:paragraph-properties fo:margin-left="0cm" fo:margin-right="0cm" fo:margin-top="0cm" fo:margin-bottom="0cm" style:contextual-spacing="false" fo:text-indent="0cm" style:auto-text-indent="false"/>
    </style:style>
    <style:style style:name="P39" style:family="paragraph" style:parent-style-name="Text_20_body">
      <style:paragraph-properties fo:margin-left="0cm" fo:margin-right="0cm" fo:margin-top="0.282cm" fo:margin-bottom="0cm" style:contextual-spacing="false" fo:text-indent="0cm" style:auto-text-indent="false"/>
      <style:text-properties fo:background-color="#171717" loext:padding="0cm" loext:border="none"/>
    </style:style>
    <style:style style:name="P40"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fo:color="#60d673" loext:opacity="100%" fo:background-color="#171717" loext:char-shading-value="0" loext:padding="0cm" loext:border="none"/>
    </style:style>
    <style:style style:name="T13" style:family="text">
      <style:text-properties fo:background-color="#171717" loext:char-shading-value="0" loext:padding="0cm" loext:border="none"/>
    </style:style>
    <style:style style:name="T14" style:family="text">
      <style:text-properties fo:color="#969dff" loext:opacity="100%" fo:background-color="#171717" loext:char-shading-value="0" loext:padding="0cm" loext:border="none"/>
    </style:style>
    <style:style style:name="T15" style:family="text">
      <style:text-properties fo:color="#ffdb0f" loext:opacity="100%" fo:background-color="#171717" loext:char-shading-value="0" loext:padding="0cm" loext:border="none"/>
    </style:style>
    <style:style style:name="T16" style:family="text">
      <style:text-properties fo:color="#ff5a59" loext:opacity="100%" fo:background-color="#171717" loext:char-shading-value="0" loext:padding="0cm" loext:border="none"/>
    </style:style>
    <style:style style:name="T17" style:family="text">
      <style:text-properties fo:color="#808080" loext:opacity="100%" fo:background-color="#171717" loext:char-shading-value="0" loext:padding="0cm" loext:border="none"/>
    </style:style>
    <style:style style:name="T18" style:family="text">
      <style:text-properties fo:color="#ff96da" loext:opacity="100%" fo:background-color="#171717" loext:char-shading-value="0" loext:padding="0cm" loext:border="none"/>
    </style:style>
    <style:style style:name="T19" style:family="text">
      <style:text-properties fo:color="#4fa0ff" loext:opacity="100%" fo:background-color="#171717"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ugmented Pressing Sets Explorer – Plan</text:p>
      <text:p text:style-name="P12"/>
      <text:p text:style-name="P12">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11">Voici l'inventaire complet des briques techniques, mathématiques et graphiques dont nous allons avoir besoin pour coder cet outil.</text:p>
      <text:h text:style-name="P1" text:outline-level="2">1. L'Infrastructure Technique (Le Moteur Graphique &amp; Web)</text:h>
      <text:p text:style-name="P11">Pour que cet outil soit agréable à utiliser, il lui faut une interface visuelle fluide avec deux zones : une zone de saisie (piano/boutons) et une zone d'affichage (le graphe).</text:p>
      <text:list xml:id="list3455709960" text:style-name="L1">
        <text:list-item>
          <text:p text:style-name="P22"><text:span text:style-name="T5">Le Framework principal :</text:span> <text:span text:style-name="T5">Python avec Dash (Plotly)</text:span> ou <text:span text:style-name="T5">Streamlit</text:span>.</text:p>
          <text:list>
            <text:list-item>
              <text:p text:style-name="P22"><text:span text:style-name="T1">Pourquoi ?</text:span> Ils permettent de coder une interface Web moderne entièrement en Python, sans avoir à manipuler du JavaScript/HTML/CSS complexe.</text:p>
            </text:list-item>
          </text:list>
        </text:list-item>
        <text:list-item>
          <text:p text:style-name="P22"><text:span text:style-name="T5">Le Moteur de Graphe Interactif :</text:span> <text:span text:style-name="T5">Pyvis</text:span> ou <text:span text:style-name="T5">Plotly Network Graphs</text:span>.</text:p>
          <text:list>
            <text:list-item>
              <text:p text:style-name="P22"><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22"><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11">C'est ici qu'on injecte la logique de Tymoczko pour relier les stations. Le code doit manipuler des objets mathématiques stricts :</text:p>
      <text:list xml:id="list3115729161" text:style-name="L2">
        <text:list-item>
          <text:p text:style-name="P27"><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23"><text:span text:style-name="T5">La Matrice d'Adjacence (Calcul des lignes de métro) :</text:span> Un algorithme qui tourne en arrière-plan et qui calcule pour n'importe quel couple de Sets :</text:p>
          <text:list>
            <text:list-item>
              <text:p text:style-name="P23">Le nombre exact de <text:span text:style-name="T5">pivots</text:span> (intersections d'ensembles).</text:p>
            </text:list-item>
            <text:list-item>
              <text:p text:style-name="P23">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11">Ton application devra gérer deux modes de fonctionnement distincts :</text:p>
      <text:h text:style-name="P2" text:outline-level="3"><text:soft-page-break/>Mode A : "L'Analyseur de Partitions" (Mode statique)</text:h>
      <text:list xml:id="list3729966807" text:style-name="L3">
        <text:list-item>
          <text:p text:style-name="P24"><text:span text:style-name="T5">Ce qu'il prend :</text:span> Ton fichier JSON de 159 lignes réelles (ou plus).</text:p>
        </text:list-item>
        <text:list-item>
          <text:p text:style-name="P28"><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878360962" text:style-name="L4">
        <text:list-item>
          <text:p text:style-name="P25"><text:span text:style-name="T5">Ce qu'il prend :</text:span> Une sélection instantanée sur ton piano virtuel (ton Set de départ).</text:p>
        </text:list-item>
        <text:list-item>
          <text:p text:style-name="P25"><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11">Pour que le code sache identifier les "stations", il nous faut un dictionnaire géométrique étendu (bien plus complet que notre version précédente). Il contiendra la structure fondamentale de chaque couleur harmonique :</text:p>
      <text:p text:style-name="P11">Python</text:p>
      <text:p text:style-name="P10"><text:span text:style-name="Source_20_Text"><text:span text:style-name="T2">DICTIONNAIRE_DES_SETS = {</text:span></text:span></text:p>
      <text:p text:style-name="P10"><text:span text:style-name="Source_20_Text"><text:s text:c="4"/></text:span><text:span text:style-name="Source_20_Text"><text:span text:style-name="T2">"Diatonic": [0, 2, 4, 5, 7, 9, 11],</text:span></text:span></text:p>
      <text:p text:style-name="P10"><text:span text:style-name="Source_20_Text"><text:s text:c="4"/></text:span><text:span text:style-name="Source_20_Text"><text:span text:style-name="T2">"Acoustic": [0, 2, 4, 6, 7, 9, 10],</text:span></text:span></text:p>
      <text:p text:style-name="P10"><text:span text:style-name="Source_20_Text"><text:s text:c="4"/></text:span><text:span text:style-name="Source_20_Text"><text:span text:style-name="T2">"Whole Tone": [0, 2, 4, 6, 8, 10],</text:span></text:span></text:p>
      <text:p text:style-name="P10"><text:span text:style-name="Source_20_Text"><text:s text:c="4"/></text:span><text:span text:style-name="Source_20_Text"><text:span text:style-name="T2">"Octatonic": [0, 1, 3, 4, 6, 7, 9, 10],</text:span></text:span></text:p>
      <text:p text:style-name="P10"><text:span text:style-name="Source_20_Text"><text:s text:c="4"/></text:span><text:span text:style-name="Source_20_Text"><text:span text:style-name="T2">"Hexatonic": [0, 1, 4, 5, 8, 9],</text:span></text:span></text:p>
      <text:p text:style-name="P10"><text:span text:style-name="Source_20_Text"><text:s text:c="4"/></text:span><text:span text:style-name="Source_20_Text"><text:span text:style-name="T2">"Harmonic Minor": [0, 2, 3, 5, 7, 8, 11],</text:span></text:span></text:p>
      <text:p text:style-name="P10"><text:span text:style-name="Source_20_Text"><text:s text:c="4"/></text:span><text:span text:style-name="Source_20_Text"><text:span text:style-name="T2">"Harmonic Major": [0, 2, 4, 5, 7, 8, 11],</text:span></text:span></text:p>
      <text:p text:style-name="P10"><text:span text:style-name="Source_20_Text"><text:s text:c="4"/></text:span><text:span text:style-name="Source_20_Text"><text:span text:style-name="T2"># On pourra ajouter les modes de Messiaen ou les sous-ensembles pentatoniques</text:span></text:span></text:p>
      <text:p text:style-name="P10"><text:span text:style-name="Source_20_Text"><text:span text:style-name="T2">}</text:span></text:span></text:p>
      <text:h text:style-name="P1" text:outline-level="2">Feu de route : Par quoi on commence ?</text:h>
      <text:p text:style-name="P11">Pour ne pas s'éparpiller, je te suggère de construire l'outil en trois étapes simples :</text:p>
      <text:list xml:id="list577908529" text:style-name="L5">
        <text:list-item>
          <text:p text:style-name="P26"><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29"><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26"><text:span text:style-name="T5">Étape 3 (L'Interface Web) :</text:span> Coder le piano visuel et l'associer au graphe pour que cliquer sur une touche du piano mette à jour le réseau en temps réel.</text:p>
        </text:list-item>
      </text:list>
      <text:p text:style-name="P11">Es-tu d'accord avec cet inventaire ? Si oui, on peut attaquer directement le code de l'<text:span text:style-name="T5">Étape 1</text:span> pour poser les fondations mathématiques de ton Explorer.</text:p>
      <text:p text:style-name="P7"/>
      <text:p text:style-name="P14"><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13">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1128062328" text:style-name="L6">
          <text:list-item>
            <text:p text:style-name="P30"><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30"><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13"><text:span text:style-name="T7">L'utilisateur choisit par exemple </text:span><text:span text:style-name="Source_20_Text"><text:span text:style-name="T7">Acoustic [C]</text:span></text:span><text:span text:style-name="T7">. L'interface doit afficher :</text:span></text:p>
        <text:list xml:id="list3846721534" text:style-name="L7">
          <text:list-item>
            <text:p text:style-name="P31"><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33"><text:span text:style-name="T5">Les Voisins Directs (Distance 1) :</text:span> Tu filtres les nœuds connectés dans ton graphe complet à la couche 1.</text:p>
          </text:list-item>
          <text:list-item>
            <text:p text:style-name="P33"><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439989933" text:style-name="L8">
          <text:list-item>
            <text:p text:style-name="P34">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13"><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7"/>
      <text:h text:style-name="P6"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3224831553" text:style-name="L9">
        <text:list-item>
          <text:p text:style-name="P37"><text:soft-page-break/>Ton interface est un bête fichier <text:span text:style-name="Source_20_Text">index.html</text:span> avec ton CSS personnalisé.</text:p>
        </text:list-item>
        <text:list-item>
          <text:p text:style-name="P37">Quand l'utilisateur clique sur le clavier ou choisit "Diatonic [D]", du JavaScript (<text:span text:style-name="Source_20_Text">fetch</text:span>) envoie l'info à ton script Python.</text:p>
        </text:list-item>
        <text:list-item>
          <text:p text:style-name="P37">Python fait le calcul géométrique (voisins, couches, routes de secours) et renvoie le résultat au HTML qui met à jour l'affichage dynamiquement.</text:p>
        </text:list-item>
        <text:list-item>
          <text:p text:style-name="P37"><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9"><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7"/>
      <text:p text:style-name="P40"><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13">Ce sont deux évolutions majeures qui vont transformer l'application. On passe d'un simple visualiseur passif à un véritable <text:span text:style-name="T5">moteur d'exploration interactif</text:span>.</text:p>
        <text:p text:style-name="P32">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3747237988" text:style-name="L10">
          <text:list-item>
            <text:p text:style-name="P36">Dès que l'utilisateur clique sur une touche du piano, on capture l'ensemble des notes sélectionnées.</text:p>
          </text:list-item>
          <text:list-item>
            <text:p text:style-name="P36">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36">Si l'utilisateur vide le clavier, l'affichage rebascule sur le comportement par défaut (graphe centré).</text:p>
          </text:list-item>
        </text:list>
        <text:h text:style-name="P15" text:outline-level="3"><text:soft-page-break/><text:span text:style-name="T7">🛠️ Étape 1 : Le point d'accès API dans </text:span><text:span text:style-name="Source_20_Text"><text:span text:style-name="T7">app.py</text:span></text:span></text:h>
        <text:p text:style-name="P13"><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p text:style-name="P39">Python</text:p>
        <text:p text:style-name="P18"><text:span text:style-name="Source_20_Text"><text:span text:style-name="T13">@app.route(</text:span></text:span><text:span text:style-name="Source_20_Text"><text:span text:style-name="T12">'/api/identify'</text:span></text:span><text:span text:style-name="Source_20_Text"><text:span text:style-name="T13">, methods=[</text:span></text:span><text:span text:style-name="Source_20_Text"><text:span text:style-name="T12">'POST'</text:span></text:span><text:span text:style-name="Source_20_Text"><text:span text:style-name="T13">])</text:span></text:span></text:p>
        <text:p text:style-name="P19"><text:span text:style-name="Source_20_Text"><text:span text:style-name="T14">def</text:span></text:span><text:span text:style-name="Source_20_Text"><text:span text:style-name="T13"> </text:span></text:span><text:span text:style-name="Source_20_Text"><text:span text:style-name="T15">identify_sets</text:span></text:span><text:span text:style-name="Source_20_Text"><text:span text:style-name="T13">():</text:span></text:span></text:p>
        <text:p text:style-name="P19"><text:span text:style-name="Source_20_Text"><text:span text:style-name="T13"><text:s text:c="4"/></text:span></text:span><text:span text:style-name="Source_20_Text"><text:span text:style-name="T12">"""Recherche les sets parents dont les notes reçues sont un subset."""</text:span></text:span></text:p>
        <text:p text:style-name="P19"><text:span text:style-name="Source_20_Text"><text:span text:style-name="T13"><text:s text:c="4"/>data = request.get_json() </text:span></text:span><text:span text:style-name="Source_20_Text"><text:span text:style-name="T14">or</text:span></text:span><text:span text:style-name="Source_20_Text"><text:span text:style-name="T13"> {}</text:span></text:span></text:p>
        <text:p text:style-name="P19"><text:span text:style-name="Source_20_Text"><text:span text:style-name="T13"><text:s text:c="4"/>user_pitches = </text:span></text:span><text:span text:style-name="Source_20_Text"><text:span text:style-name="T16">set</text:span></text:span><text:span text:style-name="Source_20_Text"><text:span text:style-name="T13">(data.get(</text:span></text:span><text:span text:style-name="Source_20_Text"><text:span text:style-name="T12">'pitches'</text:span></text:span><text:span text:style-name="Source_20_Text"><text:span text:style-name="T13">, []))</text:span></text:span></text:p>
        <text:p text:style-name="P19"><text:span text:style-name="Source_20_Text"><text:span text:style-name="T13"><text:s text:c="4"/></text:span></text:span></text:p>
        <text:p text:style-name="P19"><text:span text:style-name="Source_20_Text"><text:span text:style-name="T13"><text:s text:c="4"/></text:span></text:span><text:span text:style-name="Source_20_Text"><text:span text:style-name="T14">if</text:span></text:span><text:span text:style-name="Source_20_Text"><text:span text:style-name="T13"> </text:span></text:span><text:span text:style-name="Source_20_Text"><text:span text:style-name="T14">not</text:span></text:span><text:span text:style-name="Source_20_Text"><text:span text:style-name="T13"> user_pitches:</text:span></text:span></text:p>
        <text:p text:style-name="P19"><text:span text:style-name="Source_20_Text"><text:span text:style-name="T13"><text:s text:c="8"/></text:span></text:span><text:span text:style-name="Source_20_Text"><text:span text:style-name="T14">return</text:span></text:span><text:span text:style-name="Source_20_Text"><text:span text:style-name="T13"> jsonify({</text:span></text:span><text:span text:style-name="Source_20_Text"><text:span text:style-name="T12">"matches"</text:span></text:span><text:span text:style-name="Source_20_Text"><text:span text:style-name="T13">: []})</text:span></text:span></text:p>
        <text:p text:style-name="P19"><text:span text:style-name="Source_20_Text"><text:span text:style-name="T13"><text:s text:c="8"/></text:span></text:span></text:p>
        <text:p text:style-name="P19"><text:span text:style-name="Source_20_Text"><text:span text:style-name="T13"><text:s text:c="4"/>matches = []</text:span></text:span></text:p>
        <text:p text:style-name="P19"><text:span text:style-name="Source_20_Text"><text:span text:style-name="T13"><text:s text:c="4"/></text:span></text:span></text:p>
        <text:p text:style-name="P19"><text:span text:style-name="Source_20_Text"><text:span text:style-name="T13"><text:s text:c="4"/></text:span></text:span><text:span text:style-name="Source_20_Text"><text:span text:style-name="T17"># On parcourt le dictionnaire global de toutes les stations (les 57 sets)</text:span></text:span></text:p>
        <text:p text:style-name="P19"><text:span text:style-name="Source_20_Text"><text:span text:style-name="T13"><text:s text:c="4"/></text:span></text:span><text:span text:style-name="Source_20_Text"><text:span text:style-name="T14">for</text:span></text:span><text:span text:style-name="Source_20_Text"><text:span text:style-name="T13"> station_name, station_pitches </text:span></text:span><text:span text:style-name="Source_20_Text"><text:span text:style-name="T14">in</text:span></text:span><text:span text:style-name="Source_20_Text"><text:span text:style-name="T13"> uf.all_stations.items():</text:span></text:span></text:p>
        <text:p text:style-name="P19"><text:span text:style-name="Source_20_Text"><text:span text:style-name="T13"><text:s text:c="8"/></text:span></text:span><text:span text:style-name="Source_20_Text"><text:span text:style-name="T17"># user_pitches est-il un sous-ensemble de la station ?</text:span></text:span></text:p>
        <text:p text:style-name="P19"><text:span text:style-name="Source_20_Text"><text:span text:style-name="T13"><text:s text:c="8"/></text:span></text:span><text:span text:style-name="Source_20_Text"><text:span text:style-name="T14">if</text:span></text:span><text:span text:style-name="Source_20_Text"><text:span text:style-name="T13"> user_pitches.issubset(station_pitches):</text:span></text:span></text:p>
        <text:p text:style-name="P19"><text:span text:style-name="Source_20_Text"><text:span text:style-name="T13"><text:s text:c="12"/></text:span></text:span><text:span text:style-name="Source_20_Text"><text:span text:style-name="T17"># Calcul des notes qui manquent pour compléter le set</text:span></text:span></text:p>
        <text:p text:style-name="P19"><text:span text:style-name="Source_20_Text"><text:span text:style-name="T13"><text:s text:c="12"/>missing_pitches = </text:span></text:span><text:span text:style-name="Source_20_Text"><text:span text:style-name="T16">sorted</text:span></text:span><text:span text:style-name="Source_20_Text"><text:span text:style-name="T13">(</text:span></text:span><text:span text:style-name="Source_20_Text"><text:span text:style-name="T16">list</text:span></text:span><text:span text:style-name="Source_20_Text"><text:span text:style-name="T13">(station_pitches - user_pitches))</text:span></text:span></text:p>
        <text:p text:style-name="P19"><text:span text:style-name="Source_20_Text"><text:span text:style-name="T13"><text:s text:c="12"/></text:span></text:span></text:p>
        <text:p text:style-name="P19"><text:span text:style-name="Source_20_Text"><text:span text:style-name="T13"><text:s text:c="12"/></text:span></text:span><text:span text:style-name="Source_20_Text"><text:span text:style-name="T17"># On sépare le nom de la famille et la racine pour le traitement JS</text:span></text:span></text:p>
        <text:p text:style-name="P19"><text:span text:style-name="Source_20_Text"><text:span text:style-name="T13"><text:s text:c="12"/>family = station_name.split(</text:span></text:span><text:span text:style-name="Source_20_Text"><text:span text:style-name="T12">" ["</text:span></text:span><text:span text:style-name="Source_20_Text"><text:span text:style-name="T13">)[</text:span></text:span><text:span text:style-name="Source_20_Text"><text:span text:style-name="T18">0</text:span></text:span><text:span text:style-name="Source_20_Text"><text:span text:style-name="T13">]</text:span></text:span></text:p>
        <text:p text:style-name="P19"><text:span text:style-name="Source_20_Text"><text:span text:style-name="T13"><text:s text:c="12"/>root = station_name.split(</text:span></text:span><text:span text:style-name="Source_20_Text"><text:span text:style-name="T12">"["</text:span></text:span><text:span text:style-name="Source_20_Text"><text:span text:style-name="T13">)[</text:span></text:span><text:span text:style-name="Source_20_Text"><text:span text:style-name="T18">1</text:span></text:span><text:span text:style-name="Source_20_Text"><text:span text:style-name="T13">].replace(</text:span></text:span><text:span text:style-name="Source_20_Text"><text:span text:style-name="T12">"]"</text:span></text:span><text:span text:style-name="Source_20_Text"><text:span text:style-name="T13">, </text:span></text:span><text:span text:style-name="Source_20_Text"><text:span text:style-name="T12">""</text:span></text:span><text:span text:style-name="Source_20_Text"><text:span text:style-name="T13">)</text:span></text:span></text:p>
        <text:p text:style-name="P19"><text:span text:style-name="Source_20_Text"><text:span text:style-name="T13"><text:s text:c="12"/></text:span></text:span></text:p>
        <text:p text:style-name="P19"><text:span text:style-name="Source_20_Text"><text:span text:style-name="T13"><text:s text:c="12"/>matches.append({</text:span></text:span></text:p>
        <text:p text:style-name="P19"><text:span text:style-name="Source_20_Text"><text:span text:style-name="T13"><text:s text:c="16"/></text:span></text:span><text:span text:style-name="Source_20_Text"><text:span text:style-name="T12">"station_name"</text:span></text:span><text:span text:style-name="Source_20_Text"><text:span text:style-name="T13">: station_name,</text:span></text:span></text:p>
        <text:p text:style-name="P19"><text:span text:style-name="Source_20_Text"><text:span text:style-name="T13"><text:s text:c="16"/></text:span></text:span><text:span text:style-name="Source_20_Text"><text:span text:style-name="T12">"family"</text:span></text:span><text:span text:style-name="Source_20_Text"><text:span text:style-name="T13">: family,</text:span></text:span></text:p>
        <text:p text:style-name="P19"><text:span text:style-name="Source_20_Text"><text:span text:style-name="T13"><text:s text:c="16"/></text:span></text:span><text:span text:style-name="Source_20_Text"><text:span text:style-name="T12">"root"</text:span></text:span><text:span text:style-name="Source_20_Text"><text:span text:style-name="T13">: root,</text:span></text:span></text:p>
        <text:p text:style-name="P19"><text:span text:style-name="Source_20_Text"><text:span text:style-name="T13"><text:s text:c="16"/></text:span></text:span><text:span text:style-name="Source_20_Text"><text:span text:style-name="T12">"missing"</text:span></text:span><text:span text:style-name="Source_20_Text"><text:span text:style-name="T13">: missing_pitches,</text:span></text:span></text:p>
        <text:p text:style-name="P19"><text:span text:style-name="Source_20_Text"><text:span text:style-name="T13"><text:s text:c="16"/></text:span></text:span><text:span text:style-name="Source_20_Text"><text:span text:style-name="T12">"missing_count"</text:span></text:span><text:span text:style-name="Source_20_Text"><text:span text:style-name="T13">: </text:span></text:span><text:span text:style-name="Source_20_Text"><text:span text:style-name="T16">len</text:span></text:span><text:span text:style-name="Source_20_Text"><text:span text:style-name="T13">(missing_pitches)</text:span></text:span></text:p>
        <text:p text:style-name="P19"><text:span text:style-name="Source_20_Text"><text:span text:style-name="T13"><text:s text:c="12"/>})</text:span></text:span></text:p>
        <text:p text:style-name="P19"><text:span text:style-name="Source_20_Text"><text:span text:style-name="T13"><text:s text:c="12"/></text:span></text:span></text:p>
        <text:p text:style-name="P19"><text:span text:style-name="Source_20_Text"><text:span text:style-name="T13"><text:s text:c="4"/></text:span></text:span><text:span text:style-name="Source_20_Text"><text:span text:style-name="T17"># On trie les résultats pour afficher en premier les sets les plus proches d'être complétés</text:span></text:span></text:p>
        <text:p text:style-name="P19"><text:span text:style-name="Source_20_Text"><text:span text:style-name="T13"><text:s text:c="4"/>matches = </text:span></text:span><text:span text:style-name="Source_20_Text"><text:span text:style-name="T16">sorted</text:span></text:span><text:span text:style-name="Source_20_Text"><text:span text:style-name="T13">(matches, key=</text:span></text:span><text:span text:style-name="Source_20_Text"><text:span text:style-name="T14">lambda</text:span></text:span><text:span text:style-name="Source_20_Text"><text:span text:style-name="T13"> x: x[</text:span></text:span><text:span text:style-name="Source_20_Text"><text:span text:style-name="T12">'missing_count'</text:span></text:span><text:span text:style-name="Source_20_Text"><text:span text:style-name="T13">])</text:span></text:span></text:p>
        <text:p text:style-name="P19"><text:span text:style-name="Source_20_Text"><text:span text:style-name="T13"><text:s text:c="4"/></text:span></text:span></text:p>
        <text:p text:style-name="P19"><text:span text:style-name="Source_20_Text"><text:span text:style-name="T13"><text:s text:c="4"/></text:span></text:span><text:span text:style-name="Source_20_Text"><text:span text:style-name="T14">return</text:span></text:span><text:span text:style-name="Source_20_Text"><text:span text:style-name="T13"> jsonify({</text:span></text:span><text:span text:style-name="Source_20_Text"><text:span text:style-name="T12">"matches"</text:span></text:span><text:span text:style-name="Source_20_Text"><text:span text:style-name="T13">: matches})</text:span></text:span></text:p>
        <text:h text:style-name="P15"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13"><text:span text:style-name="T7">Recherche l'endroit idéal dans ton </text:span><text:span text:style-name="Source_20_Text"><text:span text:style-name="T6">index.html</text:span></text:span><text:span text:style-name="T7"> et insère ce bloc :</text:span></text:p>
        <text:p text:style-name="P39">HTML</text:p>
        <text:p text:style-name="P17"><text:span text:style-name="Source_20_Text"><text:span text:style-name="T13">&lt;</text:span></text:span><text:span text:style-name="Source_20_Text"><text:span text:style-name="T19">div</text:span></text:span><text:span text:style-name="Source_20_Text"><text:span text:style-name="T13"> </text:span></text:span><text:span text:style-name="Source_20_Text"><text:span text:style-name="T18">id</text:span></text:span><text:span text:style-name="Source_20_Text"><text:span text:style-name="T13">=</text:span></text:span><text:span text:style-name="Source_20_Text"><text:span text:style-name="T12">"keyboard-matches-container"</text:span></text:span><text:span text:style-name="Source_20_Text"><text:span text:style-name="T13"> </text:span></text:span><text:span text:style-name="Source_20_Text"><text:span text:style-name="T18">style</text:span></text:span><text:span text:style-name="Source_20_Text"><text:span text:style-name="T13">=</text:span></text:span><text:span text:style-name="Source_20_Text"><text:span text:style-name="T12">"margin-top: 20px; display: none;"</text:span></text:span><text:span text:style-name="Source_20_Text"><text:span text:style-name="T13">&gt;</text:span></text:span></text:p>
        <text:p text:style-name="P19"><text:span text:style-name="Source_20_Text"><text:span text:style-name="T13"><text:s text:c="4"/>&lt;</text:span></text:span><text:span text:style-name="Source_20_Text"><text:span text:style-name="T19">h3</text:span></text:span><text:span text:style-name="Source_20_Text"><text:span text:style-name="T13"> </text:span></text:span><text:span text:style-name="Source_20_Text"><text:span text:style-name="T18">style</text:span></text:span><text:span text:style-name="Source_20_Text"><text:span text:style-name="T13">=</text:span></text:span><text:span text:style-name="Source_20_Text"><text:span text:style-name="T12">"color: #ffffff; font-family: 'Segoe UI', sans-serif; margin-bottom: 10px;"</text:span></text:span><text:span text:style-name="Source_20_Text"><text:span text:style-name="T13">&gt;</text:span></text:span></text:p>
        <text:p text:style-name="P19"><text:span text:style-name="Source_20_Text"><text:span text:style-name="T13"><text:s text:c="8"/>Collections associées (&lt;</text:span></text:span><text:span text:style-name="Source_20_Text"><text:span text:style-name="T19">span</text:span></text:span><text:span text:style-name="Source_20_Text"><text:span text:style-name="T13"> </text:span></text:span><text:span text:style-name="Source_20_Text"><text:span text:style-name="T18">id</text:span></text:span><text:span text:style-name="Source_20_Text"><text:span text:style-name="T13">=</text:span></text:span><text:span text:style-name="Source_20_Text"><text:span text:style-name="T12">"match-count"</text:span></text:span><text:span text:style-name="Source_20_Text"><text:span text:style-name="T13">&gt;0&lt;/</text:span></text:span><text:span text:style-name="Source_20_Text"><text:span text:style-name="T19">span</text:span></text:span><text:span text:style-name="Source_20_Text"><text:span text:style-name="T13">&gt;) :</text:span></text:span></text:p>
        <text:p text:style-name="P19"><text:span text:style-name="Source_20_Text"><text:span text:style-name="T13"><text:s text:c="4"/>&lt;/</text:span></text:span><text:span text:style-name="Source_20_Text"><text:span text:style-name="T19">h3</text:span></text:span><text:span text:style-name="Source_20_Text"><text:span text:style-name="T13">&gt;</text:span></text:span></text:p>
        <text:p text:style-name="P19"><text:span text:style-name="Source_20_Text"><text:span text:style-name="T13"><text:s text:c="4"/>&lt;</text:span></text:span><text:span text:style-name="Source_20_Text"><text:span text:style-name="T19">ul</text:span></text:span><text:span text:style-name="Source_20_Text"><text:span text:style-name="T13"> </text:span></text:span><text:span text:style-name="Source_20_Text"><text:span text:style-name="T18">id</text:span></text:span><text:span text:style-name="Source_20_Text"><text:span text:style-name="T13">=</text:span></text:span><text:span text:style-name="Source_20_Text"><text:span text:style-name="T12">"matches-list"</text:span></text:span><text:span text:style-name="Source_20_Text"><text:span text:style-name="T13"> </text:span></text:span><text:span text:style-name="Source_20_Text"><text:span text:style-name="T18">style</text:span></text:span><text:span text:style-name="Source_20_Text"><text:span text:style-name="T13">=</text:span></text:span><text:span text:style-name="Source_20_Text"><text:span text:style-name="T12">"list-style: none; padding: 0; max-height: 250px; overflow-y: auto;"</text:span></text:span><text:span text:style-name="Source_20_Text"><text:span text:style-name="T13">&gt;</text:span></text:span></text:p>
        <text:p text:style-name="P19"><text:span text:style-name="Source_20_Text"><text:span text:style-name="T13"><text:s text:c="8"/>&lt;/</text:span></text:span><text:span text:style-name="Source_20_Text"><text:span text:style-name="T19">ul</text:span></text:span><text:span text:style-name="Source_20_Text"><text:span text:style-name="T13">&gt;</text:span></text:span></text:p>
        <text:p text:style-name="P19"><text:span text:style-name="Source_20_Text"><text:span text:style-name="T13">&lt;/</text:span></text:span><text:span text:style-name="Source_20_Text"><text:span text:style-name="T19">div</text:span></text:span><text:span text:style-name="Source_20_Text"><text:span text:style-name="T13">&gt;</text:span></text:span></text:p>
        <text:h text:style-name="P15" text:outline-level="3"><text:soft-page-break/><text:span text:style-name="T7">⚡ Étape 3 : La logique globale dans </text:span><text:span text:style-name="Source_20_Text"><text:span text:style-name="T7">static/js/main.js</text:span></text:span></text:h>
        <text:p text:style-name="P13"><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p text:style-name="P39">JavaScript</text:p>
        <text:p text:style-name="P17"><text:span text:style-name="Source_20_Text"><text:span text:style-name="T16">document</text:span></text:span><text:span text:style-name="Source_20_Text"><text:span text:style-name="T13">.addEventListener(</text:span></text:span><text:span text:style-name="Source_20_Text"><text:span text:style-name="T12">'DOMContentLoaded'</text:span></text:span><text:span text:style-name="Source_20_Text"><text:span text:style-name="T13">, () =&gt; {</text:span></text:span></text:p>
        <text:p text:style-name="P19"><text:span text:style-name="Source_20_Text"><text:span text:style-name="T13"><text:s text:c="4"/></text:span></text:span><text:span text:style-name="Source_20_Text"><text:span text:style-name="T14">const</text:span></text:span><text:span text:style-name="Source_20_Text"><text:span text:style-name="T13"> setTypeSelect = </text:span></text:span><text:span text:style-name="Source_20_Text"><text:span text:style-name="T16">document</text:span></text:span><text:span text:style-name="Source_20_Text"><text:span text:style-name="T13">.getElementById(</text:span></text:span><text:span text:style-name="Source_20_Text"><text:span text:style-name="T12">'set-type-select'</text:span></text:span><text:span text:style-name="Source_20_Text"><text:span text:style-name="T13">);</text:span></text:span></text:p>
        <text:p text:style-name="P19"><text:span text:style-name="Source_20_Text"><text:span text:style-name="T13"><text:s text:c="4"/></text:span></text:span><text:span text:style-name="Source_20_Text"><text:span text:style-name="T14">const</text:span></text:span><text:span text:style-name="Source_20_Text"><text:span text:style-name="T13"> rootSelect = </text:span></text:span><text:span text:style-name="Source_20_Text"><text:span text:style-name="T16">document</text:span></text:span><text:span text:style-name="Source_20_Text"><text:span text:style-name="T13">.getElementById(</text:span></text:span><text:span text:style-name="Source_20_Text"><text:span text:style-name="T12">'root-select'</text:span></text:span><text:span text:style-name="Source_20_Text"><text:span text:style-name="T13">);</text:span></text:span></text:p>
        <text:p text:style-name="P19"><text:span text:style-name="Source_20_Text"><text:span text:style-name="T13"><text:s text:c="4"/></text:span></text:span><text:span text:style-name="Source_20_Text"><text:span text:style-name="T14">const</text:span></text:span><text:span text:style-name="Source_20_Text"><text:span text:style-name="T13"> distanceSelect = </text:span></text:span><text:span text:style-name="Source_20_Text"><text:span text:style-name="T16">document</text:span></text:span><text:span text:style-name="Source_20_Text"><text:span text:style-name="T13">.getElementById(</text:span></text:span><text:span text:style-name="Source_20_Text"><text:span text:style-name="T12">'distance-select'</text:span></text:span><text:span text:style-name="Source_20_Text"><text:span text:style-name="T13">);</text:span></text:span></text:p>
        <text:p text:style-name="P19"><text:span text:style-name="Source_20_Text"><text:span text:style-name="T13"><text:s text:c="4"/></text:span></text:span><text:span text:style-name="Source_20_Text"><text:span text:style-name="T14">const</text:span></text:span><text:span text:style-name="Source_20_Text"><text:span text:style-name="T13"> matchesContainer = </text:span></text:span><text:span text:style-name="Source_20_Text"><text:span text:style-name="T16">document</text:span></text:span><text:span text:style-name="Source_20_Text"><text:span text:style-name="T13">.getElementById(</text:span></text:span><text:span text:style-name="Source_20_Text"><text:span text:style-name="T12">'keyboard-matches-container'</text:span></text:span><text:span text:style-name="Source_20_Text"><text:span text:style-name="T13">);</text:span></text:span></text:p>
        <text:p text:style-name="P19"><text:span text:style-name="Source_20_Text"><text:span text:style-name="T13"><text:s text:c="4"/></text:span></text:span><text:span text:style-name="Source_20_Text"><text:span text:style-name="T14">const</text:span></text:span><text:span text:style-name="Source_20_Text"><text:span text:style-name="T13"> matchesList = </text:span></text:span><text:span text:style-name="Source_20_Text"><text:span text:style-name="T16">document</text:span></text:span><text:span text:style-name="Source_20_Text"><text:span text:style-name="T13">.getElementById(</text:span></text:span><text:span text:style-name="Source_20_Text"><text:span text:style-name="T12">'matches-list'</text:span></text:span><text:span text:style-name="Source_20_Text"><text:span text:style-name="T13">);</text:span></text:span></text:p>
        <text:p text:style-name="P19"><text:span text:style-name="Source_20_Text"><text:span text:style-name="T13"><text:s text:c="4"/></text:span></text:span><text:span text:style-name="Source_20_Text"><text:span text:style-name="T14">const</text:span></text:span><text:span text:style-name="Source_20_Text"><text:span text:style-name="T13"> matchCountSpan = </text:span></text:span><text:span text:style-name="Source_20_Text"><text:span text:style-name="T16">document</text:span></text:span><text:span text:style-name="Source_20_Text"><text:span text:style-name="T13">.getElementById(</text:span></text:span><text:span text:style-name="Source_20_Text"><text:span text:style-name="T12">'match-count'</text:span></text:span><text:span text:style-name="Source_20_Text"><text:span text:style-name="T13">);</text:span></text:span></text:p>
        <text:p text:style-name="P19"><text:span text:style-name="Source_20_Text"><text:span text:style-name="T13"><text:s text:c="4"/></text:span></text:span><text:span text:style-name="Source_20_Text"><text:span text:style-name="T14">let</text:span></text:span><text:span text:style-name="Source_20_Text"><text:span text:style-name="T13"> network = </text:span></text:span><text:span text:style-name="Source_20_Text"><text:span text:style-name="T18">null</text:span></text:span><text:span text:style-name="Source_20_Text"><text:span text:style-name="T13">;</text:span></text:span></text:p>
        <text:p text:style-name="P19"/>
        <text:p text:style-name="P19"><text:span text:style-name="Source_20_Text"><text:span text:style-name="T13"><text:s text:c="4"/></text:span></text:span><text:span text:style-name="Source_20_Text"><text:span text:style-name="T17">// --- LOGIQUE SÉLECTEURS CLASSIQUES ---</text:span></text:span></text:p>
        <text:p text:style-name="P19"><text:span text:style-name="Source_20_Text"><text:span text:style-name="T13"><text:s text:c="4"/>setTypeSelect.addEventListener(</text:span></text:span><text:span text:style-name="Source_20_Text"><text:span text:style-name="T12">'change'</text:span></text:span><text:span text:style-name="Source_20_Text"><text:span text:style-name="T13">, () =&gt; {</text:span></text:span></text:p>
        <text:p text:style-name="P19"><text:span text:style-name="Source_20_Text"><text:span text:style-name="T13"><text:s text:c="8"/>rootSelect.disabled = </text:span></text:span><text:span text:style-name="Source_20_Text"><text:span text:style-name="T18">false</text:span></text:span><text:span text:style-name="Source_20_Text"><text:span text:style-name="T13">;</text:span></text:span></text:p>
        <text:p text:style-name="P19"><text:span text:style-name="Source_20_Text"><text:span text:style-name="T13"><text:s text:c="8"/>triggerSearch();</text:span></text:span></text:p>
        <text:p text:style-name="P19"><text:span text:style-name="Source_20_Text"><text:span text:style-name="T13"><text:s text:c="4"/>});</text:span></text:span></text:p>
        <text:p text:style-name="P19"><text:span text:style-name="Source_20_Text"><text:span text:style-name="T13"><text:s text:c="4"/>rootSelect.addEventListener(</text:span></text:span><text:span text:style-name="Source_20_Text"><text:span text:style-name="T12">'change'</text:span></text:span><text:span text:style-name="Source_20_Text"><text:span text:style-name="T13">, triggerSearch);</text:span></text:span></text:p>
        <text:p text:style-name="P19"><text:span text:style-name="Source_20_Text"><text:span text:style-name="T13"><text:s text:c="4"/>distanceSelect.addEventListener(</text:span></text:span><text:span text:style-name="Source_20_Text"><text:span text:style-name="T12">'change'</text:span></text:span><text:span text:style-name="Source_20_Text"><text:span text:style-name="T13">, triggerSearch);</text:span></text:span></text:p>
        <text:p text:style-name="P19"/>
        <text:p text:style-name="P19"><text:span text:style-name="Source_20_Text"><text:span text:style-name="T13"><text:s text:c="4"/></text:span></text:span><text:span text:style-name="Source_20_Text"><text:span text:style-name="T14">function</text:span></text:span><text:span text:style-name="Source_20_Text"><text:span text:style-name="T13"> </text:span></text:span><text:span text:style-name="Source_20_Text"><text:span text:style-name="T15">triggerSearch</text:span></text:span><text:span text:style-name="Source_20_Text"><text:span text:style-name="T13">() {</text:span></text:span></text:p>
        <text:p text:style-name="P19"><text:span text:style-name="Source_20_Text"><text:span text:style-name="T13"><text:s text:c="8"/></text:span></text:span><text:span text:style-name="Source_20_Text"><text:span text:style-name="T14">const</text:span></text:span><text:span text:style-name="Source_20_Text"><text:span text:style-name="T13"> type = setTypeSelect.value;</text:span></text:span></text:p>
        <text:p text:style-name="P19"><text:span text:style-name="Source_20_Text"><text:span text:style-name="T13"><text:s text:c="8"/></text:span></text:span><text:span text:style-name="Source_20_Text"><text:span text:style-name="T14">const</text:span></text:span><text:span text:style-name="Source_20_Text"><text:span text:style-name="T13"> root = rootSelect.value;</text:span></text:span></text:p>
        <text:p text:style-name="P19"><text:span text:style-name="Source_20_Text"><text:span text:style-name="T13"><text:s text:c="8"/></text:span></text:span><text:span text:style-name="Source_20_Text"><text:span text:style-name="T14">if</text:span></text:span><text:span text:style-name="Source_20_Text"><text:span text:style-name="T13"> (type &amp;&amp; root) {</text:span></text:span></text:p>
        <text:p text:style-name="P19"><text:span text:style-name="Source_20_Text"><text:span text:style-name="T13"><text:s text:c="12"/>updateExploration(type, root, distanceSelect.value);</text:span></text:span></text:p>
        <text:p text:style-name="P19"><text:span text:style-name="Source_20_Text"><text:span text:style-name="T13"><text:s text:c="8"/>}</text:span></text:span></text:p>
        <text:p text:style-name="P19"><text:span text:style-name="Source_20_Text"><text:span text:style-name="T13"><text:s text:c="4"/>}</text:span></text:span></text:p>
        <text:p text:style-name="P19"/>
        <text:p text:style-name="P19"><text:span text:style-name="Source_20_Text"><text:span text:style-name="T13"><text:s text:c="4"/></text:span></text:span><text:span text:style-name="Source_20_Text"><text:span text:style-name="T17">// --- LOGIQUE CLAVIER INTERACTIF (Saisie utilisateur) ---</text:span></text:span></text:p>
        <text:p text:style-name="P19"><text:span text:style-name="Source_20_Text"><text:span text:style-name="T13"><text:s text:c="4"/></text:span></text:span><text:span text:style-name="Source_20_Text"><text:span text:style-name="T16">document</text:span></text:span><text:span text:style-name="Source_20_Text"><text:span text:style-name="T13">.querySelectorAll(</text:span></text:span><text:span text:style-name="Source_20_Text"><text:span text:style-name="T12">'.key'</text:span></text:span><text:span text:style-name="Source_20_Text"><text:span text:style-name="T13">).forEach(key =&gt; {</text:span></text:span></text:p>
        <text:p text:style-name="P19"><text:span text:style-name="Source_20_Text"><text:span text:style-name="T13"><text:s text:c="8"/>key.addEventListener(</text:span></text:span><text:span text:style-name="Source_20_Text"><text:span text:style-name="T12">'click'</text:span></text:span><text:span text:style-name="Source_20_Text"><text:span text:style-name="T13">, () =&gt; {</text:span></text:span></text:p>
        <text:p text:style-name="P19"><text:span text:style-name="Source_20_Text"><text:span text:style-name="T13"><text:s text:c="12"/></text:span></text:span><text:span text:style-name="Source_20_Text"><text:span text:style-name="T17">// Bascule l'état de la touche au clic (allumé/éteint)</text:span></text:span></text:p>
        <text:p text:style-name="P19"><text:span text:style-name="Source_20_Text"><text:span text:style-name="T13"><text:s text:c="12"/>key.classList.toggle(</text:span></text:span><text:span text:style-name="Source_20_Text"><text:span text:style-name="T12">'active'</text:span></text:span><text:span text:style-name="Source_20_Text"><text:span text:style-name="T13">);</text:span></text:span></text:p>
        <text:p text:style-name="P19"><text:span text:style-name="Source_20_Text"><text:span text:style-name="T13"><text:s text:c="12"/></text:span></text:span></text:p>
        <text:p text:style-name="P19"><text:span text:style-name="Source_20_Text"><text:span text:style-name="T13"><text:s text:c="12"/></text:span></text:span><text:span text:style-name="Source_20_Text"><text:span text:style-name="T17">// On récupère toutes les notes actuellement actives sur le piano</text:span></text:span></text:p>
        <text:p text:style-name="P19"><text:span text:style-name="Source_20_Text"><text:span text:style-name="T13"><text:s text:c="12"/></text:span></text:span><text:span text:style-name="Source_20_Text"><text:span text:style-name="T14">const</text:span></text:span><text:span text:style-name="Source_20_Text"><text:span text:style-name="T13"> activeKeys = </text:span></text:span><text:span text:style-name="Source_20_Text"><text:span text:style-name="T16">Array</text:span></text:span><text:span text:style-name="Source_20_Text"><text:span text:style-name="T13">.from(</text:span></text:span><text:span text:style-name="Source_20_Text"><text:span text:style-name="T16">document</text:span></text:span><text:span text:style-name="Source_20_Text"><text:span text:style-name="T13">.querySelectorAll(</text:span></text:span><text:span text:style-name="Source_20_Text"><text:span text:style-name="T12">'.key.active'</text:span></text:span><text:span text:style-name="Source_20_Text"><text:span text:style-name="T13">))</text:span></text:span></text:p>
        <text:p text:style-name="P19"><text:span text:style-name="Source_20_Text"><text:span text:style-name="T13"><text:s text:c="35"/>.map(k =&gt; k.getAttribute(</text:span></text:span><text:span text:style-name="Source_20_Text"><text:span text:style-name="T12">'data-note'</text:span></text:span><text:span text:style-name="Source_20_Text"><text:span text:style-name="T13">));</text:span></text:span></text:p>
        <text:p text:style-name="P19"><text:span text:style-name="Source_20_Text"><text:span text:style-name="T13"><text:s text:c="12"/></text:span></text:span></text:p>
        <text:p text:style-name="P19"><text:span text:style-name="Source_20_Text"><text:span text:style-name="T13"><text:s text:c="12"/></text:span></text:span><text:span text:style-name="Source_20_Text"><text:span text:style-name="T14">if</text:span></text:span><text:span text:style-name="Source_20_Text"><text:span text:style-name="T13"> (activeKeys.length &gt; </text:span></text:span><text:span text:style-name="Source_20_Text"><text:span text:style-name="T18">0</text:span></text:span><text:span text:style-name="Source_20_Text"><text:span text:style-name="T13">) {</text:span></text:span></text:p>
        <text:p text:style-name="P19"><text:span text:style-name="Source_20_Text"><text:span text:style-name="T13"><text:s text:c="16"/></text:span></text:span><text:span text:style-name="Source_20_Text"><text:span text:style-name="T17">// Mode saisie manuelle : On grise les menus déroulants pour ne pas perturber</text:span></text:span></text:p>
        <text:p text:style-name="P19"><text:span text:style-name="Source_20_Text"><text:span text:style-name="T13"><text:s text:c="16"/>setTypeSelect.value = </text:span></text:span><text:span text:style-name="Source_20_Text"><text:span text:style-name="T12">""</text:span></text:span><text:span text:style-name="Source_20_Text"><text:span text:style-name="T13">;</text:span></text:span></text:p>
        <text:p text:style-name="P19"><text:span text:style-name="Source_20_Text"><text:span text:style-name="T13"><text:s text:c="16"/>rootSelect.value = </text:span></text:span><text:span text:style-name="Source_20_Text"><text:span text:style-name="T12">""</text:span></text:span><text:span text:style-name="Source_20_Text"><text:span text:style-name="T13">;</text:span></text:span></text:p>
        <text:p text:style-name="P19"><text:span text:style-name="Source_20_Text"><text:span text:style-name="T13"><text:s text:c="16"/></text:span></text:span></text:p>
        <text:p text:style-name="P19"><text:span text:style-name="Source_20_Text"><text:span text:style-name="T13"><text:s text:c="16"/></text:span></text:span><text:span text:style-name="Source_20_Text"><text:span text:style-name="T17">// On interroge l'API pour trouver les sets parents</text:span></text:span></text:p>
        <text:p text:style-name="P19"><text:span text:style-name="Source_20_Text"><text:span text:style-name="T13"><text:s text:c="16"/>fetch(</text:span></text:span><text:span text:style-name="Source_20_Text"><text:span text:style-name="T12">'/api/identify'</text:span></text:span><text:span text:style-name="Source_20_Text"><text:span text:style-name="T13">, {</text:span></text:span></text:p>
        <text:p text:style-name="P19"><text:span text:style-name="Source_20_Text"><text:span text:style-name="T13"><text:s text:c="20"/></text:span></text:span><text:span text:style-name="Source_20_Text"><text:span text:style-name="T18">method</text:span></text:span><text:span text:style-name="Source_20_Text"><text:span text:style-name="T13">: </text:span></text:span><text:span text:style-name="Source_20_Text"><text:span text:style-name="T12">'POST'</text:span></text:span><text:span text:style-name="Source_20_Text"><text:span text:style-name="T13">,</text:span></text:span></text:p>
        <text:p text:style-name="P19"><text:span text:style-name="Source_20_Text"><text:span text:style-name="T13"><text:s text:c="20"/></text:span></text:span><text:span text:style-name="Source_20_Text"><text:span text:style-name="T18">headers</text:span></text:span><text:span text:style-name="Source_20_Text"><text:span text:style-name="T13">: { </text:span></text:span><text:span text:style-name="Source_20_Text"><text:span text:style-name="T12">'Content-Type'</text:span></text:span><text:span text:style-name="Source_20_Text"><text:span text:style-name="T13">: </text:span></text:span><text:span text:style-name="Source_20_Text"><text:span text:style-name="T12">'application/json'</text:span></text:span><text:span text:style-name="Source_20_Text"><text:span text:style-name="T13"> },</text:span></text:span></text:p>
        <text:p text:style-name="P19"><text:span text:style-name="Source_20_Text"><text:span text:style-name="T13"><text:s text:c="20"/></text:span></text:span><text:span text:style-name="Source_20_Text"><text:span text:style-name="T18">body</text:span></text:span><text:span text:style-name="Source_20_Text"><text:span text:style-name="T13">: </text:span></text:span><text:span text:style-name="Source_20_Text"><text:span text:style-name="T16">JSON</text:span></text:span><text:span text:style-name="Source_20_Text"><text:span text:style-name="T13">.stringify({ </text:span></text:span><text:span text:style-name="Source_20_Text"><text:span text:style-name="T18">pitches</text:span></text:span><text:span text:style-name="Source_20_Text"><text:span text:style-name="T13">: activeKeys })</text:span></text:span></text:p>
        <text:p text:style-name="P19"><text:span text:style-name="Source_20_Text"><text:span text:style-name="T13"><text:s text:c="16"/>})</text:span></text:span></text:p>
        <text:p text:style-name="P19"><text:span text:style-name="Source_20_Text"><text:span text:style-name="T13"><text:s text:c="16"/>.then(res =&gt; res.json())</text:span></text:span></text:p>
        <text:p text:style-name="P19"><text:span text:style-name="Source_20_Text"><text:span text:style-name="T13"><text:s text:c="16"/>.then(data =&gt; {</text:span></text:span></text:p>
        <text:p text:style-name="P19"><text:span text:style-name="Source_20_Text"><text:span text:style-name="T13"><text:s text:c="20"/>displayKeyboardMatches(data.matches);</text:span></text:span></text:p>
        <text:p text:style-name="P19"><text:span text:style-name="Source_20_Text"><text:span text:style-name="T13"><text:s text:c="16"/>});</text:span></text:span></text:p>
        <text:p text:style-name="P19"><text:span text:style-name="Source_20_Text"><text:span text:style-name="T13"><text:s text:c="12"/>} </text:span></text:span><text:span text:style-name="Source_20_Text"><text:span text:style-name="T14">else</text:span></text:span><text:span text:style-name="Source_20_Text"><text:span text:style-name="T13"> {</text:span></text:span></text:p>
        <text:p text:style-name="P19"><text:span text:style-name="Source_20_Text"><text:span text:style-name="T13"><text:s text:c="16"/></text:span></text:span><text:span text:style-name="Source_20_Text"><text:span text:style-name="T17">// Si le piano est entièrement vidé, on cache les résultats</text:span></text:span></text:p>
        <text:p text:style-name="P19"><text:span text:style-name="Source_20_Text"><text:span text:style-name="T13"><text:s text:c="16"/>matchesContainer.style.display = </text:span></text:span><text:span text:style-name="Source_20_Text"><text:span text:style-name="T12">'none'</text:span></text:span><text:span text:style-name="Source_20_Text"><text:span text:style-name="T13">;</text:span></text:span></text:p>
        <text:p text:style-name="P19"><text:soft-page-break/><text:span text:style-name="Source_20_Text"><text:span text:style-name="T13"><text:s text:c="16"/>matchesList.innerHTML = </text:span></text:span><text:span text:style-name="Source_20_Text"><text:span text:style-name="T12">''</text:span></text:span><text:span text:style-name="Source_20_Text"><text:span text:style-name="T13">;</text:span></text:span></text:p>
        <text:p text:style-name="P19"><text:span text:style-name="Source_20_Text"><text:span text:style-name="T13"><text:s text:c="12"/>}</text:span></text:span></text:p>
        <text:p text:style-name="P19"><text:span text:style-name="Source_20_Text"><text:span text:style-name="T13"><text:s text:c="8"/>});</text:span></text:span></text:p>
        <text:p text:style-name="P19"><text:span text:style-name="Source_20_Text"><text:span text:style-name="T13"><text:s text:c="4"/>});</text:span></text:span></text:p>
        <text:p text:style-name="P19"/>
        <text:p text:style-name="P19"><text:span text:style-name="Source_20_Text"><text:span text:style-name="T13"><text:s text:c="4"/></text:span></text:span><text:span text:style-name="Source_20_Text"><text:span text:style-name="T14">function</text:span></text:span><text:span text:style-name="Source_20_Text"><text:span text:style-name="T13"> </text:span></text:span><text:span text:style-name="Source_20_Text"><text:span text:style-name="T15">displayKeyboardMatches</text:span></text:span><text:span text:style-name="Source_20_Text"><text:span text:style-name="T13">(matches) {</text:span></text:span></text:p>
        <text:p text:style-name="P19"><text:span text:style-name="Source_20_Text"><text:span text:style-name="T13"><text:s text:c="8"/>matchesList.innerHTML = </text:span></text:span><text:span text:style-name="Source_20_Text"><text:span text:style-name="T12">''</text:span></text:span><text:span text:style-name="Source_20_Text"><text:span text:style-name="T13">;</text:span></text:span></text:p>
        <text:p text:style-name="P19"><text:span text:style-name="Source_20_Text"><text:span text:style-name="T13"><text:s text:c="8"/></text:span></text:span><text:span text:style-name="Source_20_Text"><text:span text:style-name="T14">if</text:span></text:span><text:span text:style-name="Source_20_Text"><text:span text:style-name="T13"> (matches.length === </text:span></text:span><text:span text:style-name="Source_20_Text"><text:span text:style-name="T18">0</text:span></text:span><text:span text:style-name="Source_20_Text"><text:span text:style-name="T13">) {</text:span></text:span></text:p>
        <text:p text:style-name="P19"><text:span text:style-name="Source_20_Text"><text:span text:style-name="T13"><text:s text:c="12"/>matchesList.innerHTML = </text:span></text:span><text:span text:style-name="Source_20_Text"><text:span text:style-name="T12">'&lt;li style="color: #94a3b8; padding: 5px;"&gt;Aucune collection parente correspondante.&lt;/li&gt;'</text:span></text:span><text:span text:style-name="Source_20_Text"><text:span text:style-name="T13">;</text:span></text:span></text:p>
        <text:p text:style-name="P19"><text:span text:style-name="Source_20_Text"><text:span text:style-name="T13"><text:s text:c="12"/>matchCountSpan.innerText = </text:span></text:span><text:span text:style-name="Source_20_Text"><text:span text:style-name="T12">"0"</text:span></text:span><text:span text:style-name="Source_20_Text"><text:span text:style-name="T13">;</text:span></text:span></text:p>
        <text:p text:style-name="P19"><text:span text:style-name="Source_20_Text"><text:span text:style-name="T13"><text:s text:c="12"/>matchesContainer.style.display = </text:span></text:span><text:span text:style-name="Source_20_Text"><text:span text:style-name="T12">'block'</text:span></text:span><text:span text:style-name="Source_20_Text"><text:span text:style-name="T13">;</text:span></text:span></text:p>
        <text:p text:style-name="P19"><text:span text:style-name="Source_20_Text"><text:span text:style-name="T13"><text:s text:c="12"/></text:span></text:span><text:span text:style-name="Source_20_Text"><text:span text:style-name="T14">return</text:span></text:span><text:span text:style-name="Source_20_Text"><text:span text:style-name="T13">;</text:span></text:span></text:p>
        <text:p text:style-name="P19"><text:span text:style-name="Source_20_Text"><text:span text:style-name="T13"><text:s text:c="8"/>}</text:span></text:span></text:p>
        <text:p text:style-name="P19"/>
        <text:p text:style-name="P19"><text:span text:style-name="Source_20_Text"><text:span text:style-name="T13"><text:s text:c="8"/>matchCountSpan.innerText = matches.length;</text:span></text:span></text:p>
        <text:p text:style-name="P19"><text:span text:style-name="Source_20_Text"><text:span text:style-name="T13"><text:s text:c="8"/></text:span></text:span></text:p>
        <text:p text:style-name="P19"><text:span text:style-name="Source_20_Text"><text:span text:style-name="T13"><text:s text:c="8"/>matches.forEach(m =&gt; {</text:span></text:span></text:p>
        <text:p text:style-name="P19"><text:span text:style-name="Source_20_Text"><text:span text:style-name="T13"><text:s text:c="12"/></text:span></text:span><text:span text:style-name="Source_20_Text"><text:span text:style-name="T14">const</text:span></text:span><text:span text:style-name="Source_20_Text"><text:span text:style-name="T13"> li = </text:span></text:span><text:span text:style-name="Source_20_Text"><text:span text:style-name="T16">document</text:span></text:span><text:span text:style-name="Source_20_Text"><text:span text:style-name="T13">.createElement(</text:span></text:span><text:span text:style-name="Source_20_Text"><text:span text:style-name="T12">'li'</text:span></text:span><text:span text:style-name="Source_20_Text"><text:span text:style-name="T13">);</text:span></text:span></text:p>
        <text:p text:style-name="P19"><text:span text:style-name="Source_20_Text"><text:span text:style-name="T13"><text:s text:c="12"/>li.style.display = </text:span></text:span><text:span text:style-name="Source_20_Text"><text:span text:style-name="T12">'flex'</text:span></text:span><text:span text:style-name="Source_20_Text"><text:span text:style-name="T13">;</text:span></text:span></text:p>
        <text:p text:style-name="P19"><text:span text:style-name="Source_20_Text"><text:span text:style-name="T13"><text:s text:c="12"/>li.style.alignItems = </text:span></text:span><text:span text:style-name="Source_20_Text"><text:span text:style-name="T12">'center'</text:span></text:span><text:span text:style-name="Source_20_Text"><text:span text:style-name="T13">;</text:span></text:span></text:p>
        <text:p text:style-name="P19"><text:span text:style-name="Source_20_Text"><text:span text:style-name="T13"><text:s text:c="12"/>li.style.marginBottom = </text:span></text:span><text:span text:style-name="Source_20_Text"><text:span text:style-name="T12">'8px'</text:span></text:span><text:span text:style-name="Source_20_Text"><text:span text:style-name="T13">;</text:span></text:span></text:p>
        <text:p text:style-name="P19"><text:span text:style-name="Source_20_Text"><text:span text:style-name="T13"><text:s text:c="12"/>li.style.fontFamily = </text:span></text:span><text:span text:style-name="Source_20_Text"><text:span text:style-name="T12">'Segoe UI, sans-serif'</text:span></text:span><text:span text:style-name="Source_20_Text"><text:span text:style-name="T13">;</text:span></text:span></text:p>
        <text:p text:style-name="P19"><text:span text:style-name="Source_20_Text"><text:span text:style-name="T13"><text:s text:c="12"/>li.style.color = </text:span></text:span><text:span text:style-name="Source_20_Text"><text:span text:style-name="T12">'#94a3b8'</text:span></text:span><text:span text:style-name="Source_20_Text"><text:span text:style-name="T13">;</text:span></text:span></text:p>
        <text:p text:style-name="P19"/>
        <text:p text:style-name="P19"><text:span text:style-name="Source_20_Text"><text:span text:style-name="T13"><text:s text:c="12"/></text:span></text:span><text:span text:style-name="Source_20_Text"><text:span text:style-name="T17">// Formatage des notes manquantes</text:span></text:span></text:p>
        <text:p text:style-name="P19"><text:span text:style-name="Source_20_Text"><text:span text:style-name="T13"><text:s text:c="12"/></text:span></text:span><text:span text:style-name="Source_20_Text"><text:span text:style-name="T14">const</text:span></text:span><text:span text:style-name="Source_20_Text"><text:span text:style-name="T13"> missingText = m.missing.length &gt; </text:span></text:span><text:span text:style-name="Source_20_Text"><text:span text:style-name="T18">0</text:span></text:span><text:span text:style-name="Source_20_Text"><text:span text:style-name="T13"> ? </text:span></text:span><text:span text:style-name="Source_20_Text"><text:span text:style-name="T12">`— missing ${m.missing.join(', ')}`</text:span></text:span><text:span text:style-name="Source_20_Text"><text:span text:style-name="T13"> : </text:span></text:span><text:span text:style-name="Source_20_Text"><text:span text:style-name="T12">'— Complet !'</text:span></text:span><text:span text:style-name="Source_20_Text"><text:span text:style-name="T13">;</text:span></text:span></text:p>
        <text:p text:style-name="P19"/>
        <text:p text:style-name="P19"><text:span text:style-name="Source_20_Text"><text:span text:style-name="T13"><text:s text:c="12"/>li.innerHTML = </text:span></text:span><text:span text:style-name="Source_20_Text"><text:span text:style-name="T12">`</text:span></text:span></text:p>
        <text:p text:style-name="P19"><text:span text:style-name="Source_20_Text"><text:span text:style-name="T12"><text:s text:c="16"/>&lt;span style="margin-right: 10px;"&gt;• Subset of&lt;/span&gt;</text:span></text:span></text:p>
        <text:p text:style-name="P19"><text:span text:style-name="Source_20_Text"><text:span text:style-name="T12"><text:s text:c="16"/>&lt;button class="match-btn" data-family="${m.family}" data-root="${m.root}" style="</text:span></text:span></text:p>
        <text:p text:style-name="P19"><text:span text:style-name="Source_20_Text"><text:span text:style-name="T12"><text:s text:c="20"/>background-color: #84cc16; </text:span></text:span></text:p>
        <text:p text:style-name="P19"><text:span text:style-name="Source_20_Text"><text:span text:style-name="T12"><text:s text:c="20"/>color: #ffffff; </text:span></text:span></text:p>
        <text:p text:style-name="P19"><text:span text:style-name="Source_20_Text"><text:span text:style-name="T12"><text:s text:c="20"/>border: none; </text:span></text:span></text:p>
        <text:p text:style-name="P19"><text:span text:style-name="Source_20_Text"><text:span text:style-name="T12"><text:s text:c="20"/>padding: 4px 10px; </text:span></text:span></text:p>
        <text:p text:style-name="P19"><text:span text:style-name="Source_20_Text"><text:span text:style-name="T12"><text:s text:c="20"/>border-radius: 4px; </text:span></text:span></text:p>
        <text:p text:style-name="P19"><text:span text:style-name="Source_20_Text"><text:span text:style-name="T12"><text:s text:c="20"/>font-weight: bold; </text:span></text:span></text:p>
        <text:p text:style-name="P19"><text:span text:style-name="Source_20_Text"><text:span text:style-name="T12"><text:s text:c="20"/>cursor: pointer;</text:span></text:span></text:p>
        <text:p text:style-name="P19"><text:span text:style-name="Source_20_Text"><text:span text:style-name="T12"><text:s text:c="20"/>font-size: 13px;</text:span></text:span></text:p>
        <text:p text:style-name="P19"><text:span text:style-name="Source_20_Text"><text:span text:style-name="T12"><text:s text:c="20"/>transition: background 0.2s;"&gt;</text:span></text:span></text:p>
        <text:p text:style-name="P19"><text:span text:style-name="Source_20_Text"><text:span text:style-name="T12"><text:s text:c="20"/>${m.station_name}</text:span></text:span></text:p>
        <text:p text:style-name="P19"><text:span text:style-name="Source_20_Text"><text:span text:style-name="T12"><text:s text:c="16"/>&lt;/button&gt;</text:span></text:span></text:p>
        <text:p text:style-name="P19"><text:span text:style-name="Source_20_Text"><text:span text:style-name="T12"><text:s text:c="16"/>&lt;span style="margin-left: 10px; font-size: 13px; color: #64748b;"&gt;${missingText}&lt;/span&gt;</text:span></text:span></text:p>
        <text:p text:style-name="P19"><text:span text:style-name="Source_20_Text"><text:span text:style-name="T12"><text:s text:c="12"/>`</text:span></text:span><text:span text:style-name="Source_20_Text"><text:span text:style-name="T13">;</text:span></text:span></text:p>
        <text:p text:style-name="P19"><text:span text:style-name="Source_20_Text"><text:span text:style-name="T13"><text:s text:c="12"/>matchesList.appendChild(li);</text:span></text:span></text:p>
        <text:p text:style-name="P19"><text:span text:style-name="Source_20_Text"><text:span text:style-name="T13"><text:s text:c="8"/>});</text:span></text:span></text:p>
        <text:p text:style-name="P19"/>
        <text:p text:style-name="P19"><text:span text:style-name="Source_20_Text"><text:span text:style-name="T13"><text:s text:c="8"/></text:span></text:span><text:span text:style-name="Source_20_Text"><text:span text:style-name="T17">// Rendre les boutons cliquables : si on clique sur un set suggéré, cela charge son graphe !</text:span></text:span></text:p>
        <text:p text:style-name="P19"><text:span text:style-name="Source_20_Text"><text:span text:style-name="T13"><text:s text:c="8"/></text:span></text:span><text:span text:style-name="Source_20_Text"><text:span text:style-name="T16">document</text:span></text:span><text:span text:style-name="Source_20_Text"><text:span text:style-name="T13">.querySelectorAll(</text:span></text:span><text:span text:style-name="Source_20_Text"><text:span text:style-name="T12">'.match-btn'</text:span></text:span><text:span text:style-name="Source_20_Text"><text:span text:style-name="T13">).forEach(btn =&gt; {</text:span></text:span></text:p>
        <text:p text:style-name="P19"><text:span text:style-name="Source_20_Text"><text:span text:style-name="T13"><text:s text:c="12"/>btn.addEventListener(</text:span></text:span><text:span text:style-name="Source_20_Text"><text:span text:style-name="T12">'click'</text:span></text:span><text:span text:style-name="Source_20_Text"><text:span text:style-name="T13">, (e) =&gt; {</text:span></text:span></text:p>
        <text:p text:style-name="P19"><text:span text:style-name="Source_20_Text"><text:span text:style-name="T13"><text:s text:c="16"/></text:span></text:span><text:span text:style-name="Source_20_Text"><text:span text:style-name="T14">const</text:span></text:span><text:span text:style-name="Source_20_Text"><text:span text:style-name="T13"> family = btn.getAttribute(</text:span></text:span><text:span text:style-name="Source_20_Text"><text:span text:style-name="T12">'data-family'</text:span></text:span><text:span text:style-name="Source_20_Text"><text:span text:style-name="T13">);</text:span></text:span></text:p>
        <text:p text:style-name="P19"><text:span text:style-name="Source_20_Text"><text:span text:style-name="T13"><text:s text:c="16"/></text:span></text:span><text:span text:style-name="Source_20_Text"><text:span text:style-name="T14">const</text:span></text:span><text:span text:style-name="Source_20_Text"><text:span text:style-name="T13"> root = btn.getAttribute(</text:span></text:span><text:span text:style-name="Source_20_Text"><text:span text:style-name="T12">'data-root'</text:span></text:span><text:span text:style-name="Source_20_Text"><text:span text:style-name="T13">);</text:span></text:span></text:p>
        <text:p text:style-name="P19"><text:span text:style-name="Source_20_Text"><text:span text:style-name="T13"><text:s text:c="16"/></text:span></text:span></text:p>
        <text:p text:style-name="P19"><text:span text:style-name="Source_20_Text"><text:span text:style-name="T13"><text:s text:c="16"/>setTypeSelect.value = family;</text:span></text:span></text:p>
        <text:p text:style-name="P19"><text:span text:style-name="Source_20_Text"><text:span text:style-name="T13"><text:s text:c="16"/>rootSelect.value = root;</text:span></text:span></text:p>
        <text:p text:style-name="P19"><text:span text:style-name="Source_20_Text"><text:span text:style-name="T13"><text:s text:c="16"/>matchesContainer.style.display = </text:span></text:span><text:span text:style-name="Source_20_Text"><text:span text:style-name="T12">'none'</text:span></text:span><text:span text:style-name="Source_20_Text"><text:span text:style-name="T13">; </text:span></text:span><text:span text:style-name="Source_20_Text"><text:span text:style-name="T17">// On replie la recherche clavier</text:span></text:span></text:p>
        <text:p text:style-name="P19"><text:span text:style-name="Source_20_Text"><text:span text:style-name="T13"><text:s text:c="16"/></text:span></text:span></text:p>
        <text:p text:style-name="P19"><text:span text:style-name="Source_20_Text"><text:span text:style-name="T13"><text:s text:c="16"/>updateExploration(family, root, distanceSelect.value);</text:span></text:span></text:p>
        <text:p text:style-name="P19"><text:span text:style-name="Source_20_Text"><text:span text:style-name="T13"><text:s text:c="12"/>});</text:span></text:span></text:p>
        <text:p text:style-name="P19"><text:soft-page-break/><text:span text:style-name="Source_20_Text"><text:span text:style-name="T13"><text:s text:c="8"/>});</text:span></text:span></text:p>
        <text:p text:style-name="P19"/>
        <text:p text:style-name="P19"><text:span text:style-name="Source_20_Text"><text:span text:style-name="T13"><text:s text:c="8"/>matchesContainer.style.display = </text:span></text:span><text:span text:style-name="Source_20_Text"><text:span text:style-name="T12">'block'</text:span></text:span><text:span text:style-name="Source_20_Text"><text:span text:style-name="T13">;</text:span></text:span></text:p>
        <text:p text:style-name="P19"><text:span text:style-name="Source_20_Text"><text:span text:style-name="T13"><text:s text:c="4"/>}</text:span></text:span></text:p>
        <text:p text:style-name="P19"/>
        <text:p text:style-name="P19"><text:span text:style-name="Source_20_Text"><text:span text:style-name="T13"><text:s text:c="4"/></text:span></text:span><text:span text:style-name="Source_20_Text"><text:span text:style-name="T17">// --- MOTEUR DE RENDU DU GRAPHE (VERSION STABLE HOVER CENTRAL) ---</text:span></text:span></text:p>
        <text:p text:style-name="P19"><text:span text:style-name="Source_20_Text"><text:span text:style-name="T13"><text:s text:c="4"/></text:span></text:span><text:span text:style-name="Source_20_Text"><text:span text:style-name="T14">async</text:span></text:span><text:span text:style-name="Source_20_Text"><text:span text:style-name="T13"> </text:span></text:span><text:span text:style-name="Source_20_Text"><text:span text:style-name="T14">function</text:span></text:span><text:span text:style-name="Source_20_Text"><text:span text:style-name="T13"> </text:span></text:span><text:span text:style-name="Source_20_Text"><text:span text:style-name="T15">updateExploration</text:span></text:span><text:span text:style-name="Source_20_Text"><text:span text:style-name="T13">(type, root, distance) {</text:span></text:span></text:p>
        <text:p text:style-name="P19"><text:span text:style-name="Source_20_Text"><text:span text:style-name="T13"><text:s text:c="8"/></text:span></text:span><text:span text:style-name="Source_20_Text"><text:span text:style-name="T14">const</text:span></text:span><text:span text:style-name="Source_20_Text"><text:span text:style-name="T13"> response = </text:span></text:span><text:span text:style-name="Source_20_Text"><text:span text:style-name="T14">await</text:span></text:span><text:span text:style-name="Source_20_Text"><text:span text:style-name="T13"> fetch(</text:span></text:span><text:span text:style-name="Source_20_Text"><text:span text:style-name="T12">`/api/explore?type=${</text:span></text:span><text:span text:style-name="Source_20_Text"><text:span text:style-name="T16">encodeURIComponent</text:span></text:span><text:span text:style-name="Source_20_Text"><text:span text:style-name="T12">(type)}&amp;root=${</text:span></text:span><text:span text:style-name="Source_20_Text"><text:span text:style-name="T16">encodeURIComponent</text:span></text:span><text:span text:style-name="Source_20_Text"><text:span text:style-name="T12">(root)}&amp;distance=${distance}`</text:span></text:span><text:span text:style-name="Source_20_Text"><text:span text:style-name="T13">);</text:span></text:span></text:p>
        <text:p text:style-name="P19"><text:span text:style-name="Source_20_Text"><text:span text:style-name="T13"><text:s text:c="8"/></text:span></text:span><text:span text:style-name="Source_20_Text"><text:span text:style-name="T14">const</text:span></text:span><text:span text:style-name="Source_20_Text"><text:span text:style-name="T13"> data = </text:span></text:span><text:span text:style-name="Source_20_Text"><text:span text:style-name="T14">await</text:span></text:span><text:span text:style-name="Source_20_Text"><text:span text:style-name="T13"> response.json();</text:span></text:span></text:p>
        <text:p text:style-name="P19"/>
        <text:p text:style-name="P19"><text:span text:style-name="Source_20_Text"><text:span text:style-name="T13"><text:s text:c="8"/></text:span></text:span><text:span text:style-name="Source_20_Text"><text:span text:style-name="T14">if</text:span></text:span><text:span text:style-name="Source_20_Text"><text:span text:style-name="T13"> (data.error) {</text:span></text:span></text:p>
        <text:p text:style-name="P19"><text:span text:style-name="Source_20_Text"><text:span text:style-name="T13"><text:s text:c="12"/>alert(data.error);</text:span></text:span></text:p>
        <text:p text:style-name="P19"><text:span text:style-name="Source_20_Text"><text:span text:style-name="T13"><text:s text:c="12"/></text:span></text:span><text:span text:style-name="Source_20_Text"><text:span text:style-name="T14">return</text:span></text:span><text:span text:style-name="Source_20_Text"><text:span text:style-name="T13">;</text:span></text:span></text:p>
        <text:p text:style-name="P19"><text:span text:style-name="Source_20_Text"><text:span text:style-name="T13"><text:s text:c="8"/>}</text:span></text:span></text:p>
        <text:p text:style-name="P19"/>
        <text:p text:style-name="P19"><text:span text:style-name="Source_20_Text"><text:span text:style-name="T13"><text:s text:c="8"/></text:span></text:span><text:span text:style-name="Source_20_Text"><text:span text:style-name="T17">// Allumage automatique du piano d'après le set chargé</text:span></text:span></text:p>
        <text:p text:style-name="P19"><text:span text:style-name="Source_20_Text"><text:span text:style-name="T13"><text:s text:c="8"/></text:span></text:span><text:span text:style-name="Source_20_Text"><text:span text:style-name="T16">document</text:span></text:span><text:span text:style-name="Source_20_Text"><text:span text:style-name="T13">.querySelectorAll(</text:span></text:span><text:span text:style-name="Source_20_Text"><text:span text:style-name="T12">'.key'</text:span></text:span><text:span text:style-name="Source_20_Text"><text:span text:style-name="T13">).forEach(key =&gt; key.classList.remove(</text:span></text:span><text:span text:style-name="Source_20_Text"><text:span text:style-name="T12">'active'</text:span></text:span><text:span text:style-name="Source_20_Text"><text:span text:style-name="T13">));</text:span></text:span></text:p>
        <text:p text:style-name="P19"><text:span text:style-name="Source_20_Text"><text:span text:style-name="T13"><text:s text:c="8"/>data.pitches.forEach(pitch =&gt; {</text:span></text:span></text:p>
        <text:p text:style-name="P19"><text:span text:style-name="Source_20_Text"><text:span text:style-name="T13"><text:s text:c="12"/></text:span></text:span><text:span text:style-name="Source_20_Text"><text:span text:style-name="T14">const</text:span></text:span><text:span text:style-name="Source_20_Text"><text:span text:style-name="T13"> key = </text:span></text:span><text:span text:style-name="Source_20_Text"><text:span text:style-name="T16">document</text:span></text:span><text:span text:style-name="Source_20_Text"><text:span text:style-name="T13">.querySelector(</text:span></text:span><text:span text:style-name="Source_20_Text"><text:span text:style-name="T12">`.key[data-note="${pitch}"]`</text:span></text:span><text:span text:style-name="Source_20_Text"><text:span text:style-name="T13">);</text:span></text:span></text:p>
        <text:p text:style-name="P19"><text:span text:style-name="Source_20_Text"><text:span text:style-name="T13"><text:s text:c="12"/></text:span></text:span><text:span text:style-name="Source_20_Text"><text:span text:style-name="T14">if</text:span></text:span><text:span text:style-name="Source_20_Text"><text:span text:style-name="T13"> (key) key.classList.add(</text:span></text:span><text:span text:style-name="Source_20_Text"><text:span text:style-name="T12">'active'</text:span></text:span><text:span text:style-name="Source_20_Text"><text:span text:style-name="T13">);</text:span></text:span></text:p>
        <text:p text:style-name="P19"><text:span text:style-name="Source_20_Text"><text:span text:style-name="T13"><text:s text:c="8"/>});</text:span></text:span></text:p>
        <text:p text:style-name="P19"/>
        <text:p text:style-name="P19"><text:span text:style-name="Source_20_Text"><text:span text:style-name="T13"><text:s text:c="8"/></text:span></text:span><text:span text:style-name="Source_20_Text"><text:span text:style-name="T14">const</text:span></text:span><text:span text:style-name="Source_20_Text"><text:span text:style-name="T13"> container = </text:span></text:span><text:span text:style-name="Source_20_Text"><text:span text:style-name="T16">document</text:span></text:span><text:span text:style-name="Source_20_Text"><text:span text:style-name="T13">.getElementById(</text:span></text:span><text:span text:style-name="Source_20_Text"><text:span text:style-name="T12">'network-container'</text:span></text:span><text:span text:style-name="Source_20_Text"><text:span text:style-name="T13">);</text:span></text:span></text:p>
        <text:p text:style-name="P19"><text:span text:style-name="Source_20_Text"><text:span text:style-name="T13"><text:s text:c="8"/></text:span></text:span><text:span text:style-name="Source_20_Text"><text:span text:style-name="T14">const</text:span></text:span><text:span text:style-name="Source_20_Text"><text:span text:style-name="T13"> graphData = {</text:span></text:span></text:p>
        <text:p text:style-name="P19"><text:span text:style-name="Source_20_Text"><text:span text:style-name="T13"><text:s text:c="12"/></text:span></text:span><text:span text:style-name="Source_20_Text"><text:span text:style-name="T18">nodes</text:span></text:span><text:span text:style-name="Source_20_Text"><text:span text:style-name="T13">: </text:span></text:span><text:span text:style-name="Source_20_Text"><text:span text:style-name="T14">new</text:span></text:span><text:span text:style-name="Source_20_Text"><text:span text:style-name="T13"> vis.DataSet(data.nodes),</text:span></text:span></text:p>
        <text:p text:style-name="P19"><text:span text:style-name="Source_20_Text"><text:span text:style-name="T13"><text:s text:c="12"/></text:span></text:span><text:span text:style-name="Source_20_Text"><text:span text:style-name="T18">edges</text:span></text:span><text:span text:style-name="Source_20_Text"><text:span text:style-name="T13">: </text:span></text:span><text:span text:style-name="Source_20_Text"><text:span text:style-name="T14">new</text:span></text:span><text:span text:style-name="Source_20_Text"><text:span text:style-name="T13"> vis.DataSet(data.edges)</text:span></text:span></text:p>
        <text:p text:style-name="P19"><text:span text:style-name="Source_20_Text"><text:span text:style-name="T13"><text:s text:c="8"/>};</text:span></text:span></text:p>
        <text:p text:style-name="P19"/>
        <text:p text:style-name="P19"><text:span text:style-name="Source_20_Text"><text:span text:style-name="T13"><text:s text:c="8"/></text:span></text:span><text:span text:style-name="Source_20_Text"><text:span text:style-name="T14">const</text:span></text:span><text:span text:style-name="Source_20_Text"><text:span text:style-name="T13"> options = {</text:span></text:span></text:p>
        <text:p text:style-name="P19"><text:span text:style-name="Source_20_Text"><text:span text:style-name="T13"><text:s text:c="12"/></text:span></text:span><text:span text:style-name="Source_20_Text"><text:span text:style-name="T18">nodes</text:span></text:span><text:span text:style-name="Source_20_Text"><text:span text:style-name="T13">: {</text:span></text:span></text:p>
        <text:p text:style-name="P19"><text:span text:style-name="Source_20_Text"><text:span text:style-name="T13"><text:s text:c="16"/></text:span></text:span><text:span text:style-name="Source_20_Text"><text:span text:style-name="T18">shape</text:span></text:span><text:span text:style-name="Source_20_Text"><text:span text:style-name="T13">: </text:span></text:span><text:span text:style-name="Source_20_Text"><text:span text:style-name="T12">'dot'</text:span></text:span><text:span text:style-name="Source_20_Text"><text:span text:style-name="T13">,</text:span></text:span></text:p>
        <text:p text:style-name="P19"><text:span text:style-name="Source_20_Text"><text:span text:style-name="T13"><text:s text:c="16"/></text:span></text:span><text:span text:style-name="Source_20_Text"><text:span text:style-name="T18">font</text:span></text:span><text:span text:style-name="Source_20_Text"><text:span text:style-name="T13">: { </text:span></text:span><text:span text:style-name="Source_20_Text"><text:span text:style-name="T18">color</text:span></text:span><text:span text:style-name="Source_20_Text"><text:span text:style-name="T13">: </text:span></text:span><text:span text:style-name="Source_20_Text"><text:span text:style-name="T12">'#ffffff'</text:span></text:span><text:span text:style-name="Source_20_Text"><text:span text:style-name="T13">, </text:span></text:span><text:span text:style-name="Source_20_Text"><text:span text:style-name="T18">size</text:span></text:span><text:span text:style-name="Source_20_Text"><text:span text:style-name="T13">: </text:span></text:span><text:span text:style-name="Source_20_Text"><text:span text:style-name="T18">13</text:span></text:span><text:span text:style-name="Source_20_Text"><text:span text:style-name="T13">, </text:span></text:span><text:span text:style-name="Source_20_Text"><text:span text:style-name="T18">face</text:span></text:span><text:span text:style-name="Source_20_Text"><text:span text:style-name="T13">: </text:span></text:span><text:span text:style-name="Source_20_Text"><text:span text:style-name="T12">'Segoe UI'</text:span></text:span><text:span text:style-name="Source_20_Text"><text:span text:style-name="T13"> },</text:span></text:span></text:p>
        <text:p text:style-name="P19"><text:span text:style-name="Source_20_Text"><text:span text:style-name="T13"><text:s text:c="16"/></text:span></text:span><text:span text:style-name="Source_20_Text"><text:span text:style-name="T18">shadow</text:span></text:span><text:span text:style-name="Source_20_Text"><text:span text:style-name="T13">: { </text:span></text:span><text:span text:style-name="Source_20_Text"><text:span text:style-name="T18">enabled</text:span></text:span><text:span text:style-name="Source_20_Text"><text:span text:style-name="T13">: </text:span></text:span><text:span text:style-name="Source_20_Text"><text:span text:style-name="T18">true</text:span></text:span><text:span text:style-name="Source_20_Text"><text:span text:style-name="T13">, </text:span></text:span><text:span text:style-name="Source_20_Text"><text:span text:style-name="T18">color</text:span></text:span><text:span text:style-name="Source_20_Text"><text:span text:style-name="T13">: </text:span></text:span><text:span text:style-name="Source_20_Text"><text:span text:style-name="T12">'rgba(0,0,0,0.3)'</text:span></text:span><text:span text:style-name="Source_20_Text"><text:span text:style-name="T13">, </text:span></text:span><text:span text:style-name="Source_20_Text"><text:span text:style-name="T18">size</text:span></text:span><text:span text:style-name="Source_20_Text"><text:span text:style-name="T13">: </text:span></text:span><text:span text:style-name="Source_20_Text"><text:span text:style-name="T18">5</text:span></text:span><text:span text:style-name="Source_20_Text"><text:span text:style-name="T13"> }</text:span></text:span></text:p>
        <text:p text:style-name="P19"><text:span text:style-name="Source_20_Text"><text:span text:style-name="T13"><text:s text:c="12"/>},</text:span></text:span></text:p>
        <text:p text:style-name="P19"><text:span text:style-name="Source_20_Text"><text:span text:style-name="T13"><text:s text:c="12"/></text:span></text:span><text:span text:style-name="Source_20_Text"><text:span text:style-name="T18">edges</text:span></text:span><text:span text:style-name="Source_20_Text"><text:span text:style-name="T13">: {</text:span></text:span></text:p>
        <text:p text:style-name="P19"><text:span text:style-name="Source_20_Text"><text:span text:style-name="T13"><text:s text:c="16"/></text:span></text:span><text:span text:style-name="Source_20_Text"><text:span text:style-name="T18">color</text:span></text:span><text:span text:style-name="Source_20_Text"><text:span text:style-name="T13">: { </text:span></text:span><text:span text:style-name="Source_20_Text"><text:span text:style-name="T18">color</text:span></text:span><text:span text:style-name="Source_20_Text"><text:span text:style-name="T13">: </text:span></text:span><text:span text:style-name="Source_20_Text"><text:span text:style-name="T12">'#475569'</text:span></text:span><text:span text:style-name="Source_20_Text"><text:span text:style-name="T13">, </text:span></text:span><text:span text:style-name="Source_20_Text"><text:span text:style-name="T18">highlight</text:span></text:span><text:span text:style-name="Source_20_Text"><text:span text:style-name="T13">: </text:span></text:span><text:span text:style-name="Source_20_Text"><text:span text:style-name="T12">'#4ea8de'</text:span></text:span><text:span text:style-name="Source_20_Text"><text:span text:style-name="T13">, </text:span></text:span><text:span text:style-name="Source_20_Text"><text:span text:style-name="T18">hover</text:span></text:span><text:span text:style-name="Source_20_Text"><text:span text:style-name="T13">: </text:span></text:span><text:span text:style-name="Source_20_Text"><text:span text:style-name="T12">'#4ea8de'</text:span></text:span><text:span text:style-name="Source_20_Text"><text:span text:style-name="T13"> },</text:span></text:span></text:p>
        <text:p text:style-name="P19"><text:span text:style-name="Source_20_Text"><text:span text:style-name="T13"><text:s text:c="16"/></text:span></text:span><text:span text:style-name="Source_20_Text"><text:span text:style-name="T18">smooth</text:span></text:span><text:span text:style-name="Source_20_Text"><text:span text:style-name="T13">: { </text:span></text:span><text:span text:style-name="Source_20_Text"><text:span text:style-name="T18">type</text:span></text:span><text:span text:style-name="Source_20_Text"><text:span text:style-name="T13">: </text:span></text:span><text:span text:style-name="Source_20_Text"><text:span text:style-name="T12">'continuous'</text:span></text:span><text:span text:style-name="Source_20_Text"><text:span text:style-name="T13">, </text:span></text:span><text:span text:style-name="Source_20_Text"><text:span text:style-name="T18">roundness</text:span></text:span><text:span text:style-name="Source_20_Text"><text:span text:style-name="T13">: </text:span></text:span><text:span text:style-name="Source_20_Text"><text:span text:style-name="T18">0.4</text:span></text:span><text:span text:style-name="Source_20_Text"><text:span text:style-name="T13"> },</text:span></text:span></text:p>
        <text:p text:style-name="P19"><text:span text:style-name="Source_20_Text"><text:span text:style-name="T13"><text:s text:c="16"/></text:span></text:span><text:span text:style-name="Source_20_Text"><text:span text:style-name="T18">width</text:span></text:span><text:span text:style-name="Source_20_Text"><text:span text:style-name="T13">: </text:span></text:span><text:span text:style-name="Source_20_Text"><text:span text:style-name="T18">2</text:span></text:span><text:span text:style-name="Source_20_Text"><text:span text:style-name="T13">,</text:span></text:span></text:p>
        <text:p text:style-name="P19"><text:span text:style-name="Source_20_Text"><text:span text:style-name="T13"><text:s text:c="16"/></text:span></text:span><text:span text:style-name="Source_20_Text"><text:span text:style-name="T18">hoverWidth</text:span></text:span><text:span text:style-name="Source_20_Text"><text:span text:style-name="T13">: </text:span></text:span><text:span text:style-name="Source_20_Text"><text:span text:style-name="T18">3</text:span></text:span><text:span text:style-name="Source_20_Text"><text:span text:style-name="T13">,</text:span></text:span></text:p>
        <text:p text:style-name="P19"><text:span text:style-name="Source_20_Text"><text:span text:style-name="T13"><text:s text:c="16"/></text:span></text:span><text:span text:style-name="Source_20_Text"><text:span text:style-name="T18">font</text:span></text:span><text:span text:style-name="Source_20_Text"><text:span text:style-name="T13">: { </text:span></text:span><text:span text:style-name="Source_20_Text"><text:span text:style-name="T18">color</text:span></text:span><text:span text:style-name="Source_20_Text"><text:span text:style-name="T13">: </text:span></text:span><text:span text:style-name="Source_20_Text"><text:span text:style-name="T12">'#56cfe1'</text:span></text:span><text:span text:style-name="Source_20_Text"><text:span text:style-name="T13">, </text:span></text:span><text:span text:style-name="Source_20_Text"><text:span text:style-name="T18">size</text:span></text:span><text:span text:style-name="Source_20_Text"><text:span text:style-name="T13">: </text:span></text:span><text:span text:style-name="Source_20_Text"><text:span text:style-name="T18">11</text:span></text:span><text:span text:style-name="Source_20_Text"><text:span text:style-name="T13">, </text:span></text:span><text:span text:style-name="Source_20_Text"><text:span text:style-name="T18">background</text:span></text:span><text:span text:style-name="Source_20_Text"><text:span text:style-name="T13">: </text:span></text:span><text:span text:style-name="Source_20_Text"><text:span text:style-name="T12">'#12161a'</text:span></text:span><text:span text:style-name="Source_20_Text"><text:span text:style-name="T13">, </text:span></text:span><text:span text:style-name="Source_20_Text"><text:span text:style-name="T18">face</text:span></text:span><text:span text:style-name="Source_20_Text"><text:span text:style-name="T13">: </text:span></text:span><text:span text:style-name="Source_20_Text"><text:span text:style-name="T12">'Segoe UI'</text:span></text:span><text:span text:style-name="Source_20_Text"><text:span text:style-name="T13">, </text:span></text:span><text:span text:style-name="Source_20_Text"><text:span text:style-name="T18">align</text:span></text:span><text:span text:style-name="Source_20_Text"><text:span text:style-name="T13">: </text:span></text:span><text:span text:style-name="Source_20_Text"><text:span text:style-name="T12">'middle'</text:span></text:span><text:span text:style-name="Source_20_Text"><text:span text:style-name="T13"> }</text:span></text:span></text:p>
        <text:p text:style-name="P19"><text:span text:style-name="Source_20_Text"><text:span text:style-name="T13"><text:s text:c="12"/>},</text:span></text:span></text:p>
        <text:p text:style-name="P19"><text:span text:style-name="Source_20_Text"><text:span text:style-name="T13"><text:s text:c="12"/></text:span></text:span><text:span text:style-name="Source_20_Text"><text:span text:style-name="T18">groups</text:span></text:span><text:span text:style-name="Source_20_Text"><text:span text:style-name="T13">: {</text:span></text:span></text:p>
        <text:p text:style-name="P19"><text:span text:style-name="Source_20_Text"><text:span text:style-name="T13"><text:s text:c="16"/></text:span></text:span><text:span text:style-name="Source_20_Text"><text:span text:style-name="T12">"Diatonic"</text:span></text:span><text:span text:style-name="Source_20_Text"><text:span text:style-name="T13">: { </text:span></text:span><text:span text:style-name="Source_20_Text"><text:span text:style-name="T18">color</text:span></text:span><text:span text:style-name="Source_20_Text"><text:span text:style-name="T13">: { </text:span></text:span><text:span text:style-name="Source_20_Text"><text:span text:style-name="T18">background</text:span></text:span><text:span text:style-name="Source_20_Text"><text:span text:style-name="T13">: </text:span></text:span><text:span text:style-name="Source_20_Text"><text:span text:style-name="T12">'#1d4ed8'</text:span></text:span><text:span text:style-name="Source_20_Text"><text:span text:style-name="T13">, </text:span></text:span><text:span text:style-name="Source_20_Text"><text:span text:style-name="T18">border</text:span></text:span><text:span text:style-name="Source_20_Text"><text:span text:style-name="T13">: </text:span></text:span><text:span text:style-name="Source_20_Text"><text:span text:style-name="T12">'#3b82f6'</text:span></text:span><text:span text:style-name="Source_20_Text"><text:span text:style-name="T13"> } },</text:span></text:span></text:p>
        <text:p text:style-name="P19"><text:span text:style-name="Source_20_Text"><text:span text:style-name="T13"><text:s text:c="16"/></text:span></text:span><text:span text:style-name="Source_20_Text"><text:span text:style-name="T12">"Acoustic"</text:span></text:span><text:span text:style-name="Source_20_Text"><text:span text:style-name="T13">: { </text:span></text:span><text:span text:style-name="Source_20_Text"><text:span text:style-name="T18">color</text:span></text:span><text:span text:style-name="Source_20_Text"><text:span text:style-name="T13">: { </text:span></text:span><text:span text:style-name="Source_20_Text"><text:span text:style-name="T18">background</text:span></text:span><text:span text:style-name="Source_20_Text"><text:span text:style-name="T13">: </text:span></text:span><text:span text:style-name="Source_20_Text"><text:span text:style-name="T12">'#0d9488'</text:span></text:span><text:span text:style-name="Source_20_Text"><text:span text:style-name="T13">, </text:span></text:span><text:span text:style-name="Source_20_Text"><text:span text:style-name="T18">border</text:span></text:span><text:span text:style-name="Source_20_Text"><text:span text:style-name="T13">: </text:span></text:span><text:span text:style-name="Source_20_Text"><text:span text:style-name="T12">'#14b8a6'</text:span></text:span><text:span text:style-name="Source_20_Text"><text:span text:style-name="T13"> } },</text:span></text:span></text:p>
        <text:p text:style-name="P19"><text:span text:style-name="Source_20_Text"><text:span text:style-name="T13"><text:s text:c="16"/></text:span></text:span><text:span text:style-name="Source_20_Text"><text:span text:style-name="T12">"Octatonic"</text:span></text:span><text:span text:style-name="Source_20_Text"><text:span text:style-name="T13">: { </text:span></text:span><text:span text:style-name="Source_20_Text"><text:span text:style-name="T18">color</text:span></text:span><text:span text:style-name="Source_20_Text"><text:span text:style-name="T13">: { </text:span></text:span><text:span text:style-name="Source_20_Text"><text:span text:style-name="T18">background</text:span></text:span><text:span text:style-name="Source_20_Text"><text:span text:style-name="T13">: </text:span></text:span><text:span text:style-name="Source_20_Text"><text:span text:style-name="T12">'#b91c1c'</text:span></text:span><text:span text:style-name="Source_20_Text"><text:span text:style-name="T13">, </text:span></text:span><text:span text:style-name="Source_20_Text"><text:span text:style-name="T18">border</text:span></text:span><text:span text:style-name="Source_20_Text"><text:span text:style-name="T13">: </text:span></text:span><text:span text:style-name="Source_20_Text"><text:span text:style-name="T12">'#ef4444'</text:span></text:span><text:span text:style-name="Source_20_Text"><text:span text:style-name="T13"> } },</text:span></text:span></text:p>
        <text:p text:style-name="P19"><text:span text:style-name="Source_20_Text"><text:span text:style-name="T13"><text:s text:c="16"/></text:span></text:span><text:span text:style-name="Source_20_Text"><text:span text:style-name="T12">"Whole Tone"</text:span></text:span><text:span text:style-name="Source_20_Text"><text:span text:style-name="T13">: { </text:span></text:span><text:span text:style-name="Source_20_Text"><text:span text:style-name="T18">color</text:span></text:span><text:span text:style-name="Source_20_Text"><text:span text:style-name="T13">: { </text:span></text:span><text:span text:style-name="Source_20_Text"><text:span text:style-name="T18">background</text:span></text:span><text:span text:style-name="Source_20_Text"><text:span text:style-name="T13">: </text:span></text:span><text:span text:style-name="Source_20_Text"><text:span text:style-name="T12">'#6d28d9'</text:span></text:span><text:span text:style-name="Source_20_Text"><text:span text:style-name="T13">, </text:span></text:span><text:span text:style-name="Source_20_Text"><text:span text:style-name="T18">border</text:span></text:span><text:span text:style-name="Source_20_Text"><text:span text:style-name="T13">: </text:span></text:span><text:span text:style-name="Source_20_Text"><text:span text:style-name="T12">'#8b5cf6'</text:span></text:span><text:span text:style-name="Source_20_Text"><text:span text:style-name="T13"> } },</text:span></text:span></text:p>
        <text:p text:style-name="P19"><text:span text:style-name="Source_20_Text"><text:span text:style-name="T13"><text:s text:c="16"/></text:span></text:span><text:span text:style-name="Source_20_Text"><text:span text:style-name="T12">"Hexatonic"</text:span></text:span><text:span text:style-name="Source_20_Text"><text:span text:style-name="T13">: { </text:span></text:span><text:span text:style-name="Source_20_Text"><text:span text:style-name="T18">color</text:span></text:span><text:span text:style-name="Source_20_Text"><text:span text:style-name="T13">: { </text:span></text:span><text:span text:style-name="Source_20_Text"><text:span text:style-name="T18">background</text:span></text:span><text:span text:style-name="Source_20_Text"><text:span text:style-name="T13">: </text:span></text:span><text:span text:style-name="Source_20_Text"><text:span text:style-name="T12">'#be185d'</text:span></text:span><text:span text:style-name="Source_20_Text"><text:span text:style-name="T13">, </text:span></text:span><text:span text:style-name="Source_20_Text"><text:span text:style-name="T18">border</text:span></text:span><text:span text:style-name="Source_20_Text"><text:span text:style-name="T13">: </text:span></text:span><text:span text:style-name="Source_20_Text"><text:span text:style-name="T12">'#ec4899'</text:span></text:span><text:span text:style-name="Source_20_Text"><text:span text:style-name="T13"> } },</text:span></text:span></text:p>
        <text:p text:style-name="P19"><text:span text:style-name="Source_20_Text"><text:span text:style-name="T13"><text:s text:c="16"/></text:span></text:span><text:span text:style-name="Source_20_Text"><text:span text:style-name="T12">"Harmonic Minor"</text:span></text:span><text:span text:style-name="Source_20_Text"><text:span text:style-name="T13">: { </text:span></text:span><text:span text:style-name="Source_20_Text"><text:span text:style-name="T18">color</text:span></text:span><text:span text:style-name="Source_20_Text"><text:span text:style-name="T13">: { </text:span></text:span><text:span text:style-name="Source_20_Text"><text:span text:style-name="T18">background</text:span></text:span><text:span text:style-name="Source_20_Text"><text:span text:style-name="T13">: </text:span></text:span><text:span text:style-name="Source_20_Text"><text:span text:style-name="T12">'#c2410c'</text:span></text:span><text:span text:style-name="Source_20_Text"><text:span text:style-name="T13">, </text:span></text:span><text:span text:style-name="Source_20_Text"><text:span text:style-name="T18">border</text:span></text:span><text:span text:style-name="Source_20_Text"><text:span text:style-name="T13">: </text:span></text:span><text:span text:style-name="Source_20_Text"><text:span text:style-name="T12">'#f97316'</text:span></text:span><text:span text:style-name="Source_20_Text"><text:span text:style-name="T13"> } },</text:span></text:span></text:p>
        <text:p text:style-name="P19"><text:span text:style-name="Source_20_Text"><text:span text:style-name="T13"><text:s text:c="16"/></text:span></text:span><text:span text:style-name="Source_20_Text"><text:span text:style-name="T12">"Harmonic Major"</text:span></text:span><text:span text:style-name="Source_20_Text"><text:span text:style-name="T13">: { </text:span></text:span><text:span text:style-name="Source_20_Text"><text:span text:style-name="T18">color</text:span></text:span><text:span text:style-name="Source_20_Text"><text:span text:style-name="T13">: { </text:span></text:span><text:span text:style-name="Source_20_Text"><text:span text:style-name="T18">background</text:span></text:span><text:span text:style-name="Source_20_Text"><text:span text:style-name="T13">: </text:span></text:span><text:span text:style-name="Source_20_Text"><text:span text:style-name="T12">'#a16207'</text:span></text:span><text:span text:style-name="Source_20_Text"><text:span text:style-name="T13">, </text:span></text:span><text:span text:style-name="Source_20_Text"><text:span text:style-name="T18">border</text:span></text:span><text:span text:style-name="Source_20_Text"><text:span text:style-name="T13">: </text:span></text:span><text:span text:style-name="Source_20_Text"><text:span text:style-name="T12">'#eab308'</text:span></text:span><text:span text:style-name="Source_20_Text"><text:span text:style-name="T13"> } }</text:span></text:span></text:p>
        <text:p text:style-name="P19"><text:span text:style-name="Source_20_Text"><text:span text:style-name="T13"><text:s text:c="12"/>},</text:span></text:span></text:p>
        <text:p text:style-name="P19"><text:span text:style-name="Source_20_Text"><text:span text:style-name="T13"><text:s text:c="12"/></text:span></text:span><text:span text:style-name="Source_20_Text"><text:span text:style-name="T18">physics</text:span></text:span><text:span text:style-name="Source_20_Text"><text:span text:style-name="T13">: {</text:span></text:span></text:p>
        <text:p text:style-name="P19"><text:span text:style-name="Source_20_Text"><text:span text:style-name="T13"><text:s text:c="16"/></text:span></text:span><text:span text:style-name="Source_20_Text"><text:span text:style-name="T18">solver</text:span></text:span><text:span text:style-name="Source_20_Text"><text:span text:style-name="T13">: </text:span></text:span><text:span text:style-name="Source_20_Text"><text:span text:style-name="T12">'forceAtlas2Based'</text:span></text:span><text:span text:style-name="Source_20_Text"><text:span text:style-name="T13">,</text:span></text:span></text:p>
        <text:p text:style-name="P19"><text:soft-page-break/><text:span text:style-name="Source_20_Text"><text:span text:style-name="T13"><text:s text:c="16"/></text:span></text:span><text:span text:style-name="Source_20_Text"><text:span text:style-name="T18">forceAtlas2Based</text:span></text:span><text:span text:style-name="Source_20_Text"><text:span text:style-name="T13">: { </text:span></text:span><text:span text:style-name="Source_20_Text"><text:span text:style-name="T18">gravitationalConstant</text:span></text:span><text:span text:style-name="Source_20_Text"><text:span text:style-name="T13">: -</text:span></text:span><text:span text:style-name="Source_20_Text"><text:span text:style-name="T18">150</text:span></text:span><text:span text:style-name="Source_20_Text"><text:span text:style-name="T13">, </text:span></text:span><text:span text:style-name="Source_20_Text"><text:span text:style-name="T18">centralGravity</text:span></text:span><text:span text:style-name="Source_20_Text"><text:span text:style-name="T13">: </text:span></text:span><text:span text:style-name="Source_20_Text"><text:span text:style-name="T18">0.02</text:span></text:span><text:span text:style-name="Source_20_Text"><text:span text:style-name="T13">, </text:span></text:span><text:span text:style-name="Source_20_Text"><text:span text:style-name="T18">springLength</text:span></text:span><text:span text:style-name="Source_20_Text"><text:span text:style-name="T13">: </text:span></text:span><text:span text:style-name="Source_20_Text"><text:span text:style-name="T18">100</text:span></text:span><text:span text:style-name="Source_20_Text"><text:span text:style-name="T13">, </text:span></text:span><text:span text:style-name="Source_20_Text"><text:span text:style-name="T18">springConstant</text:span></text:span><text:span text:style-name="Source_20_Text"><text:span text:style-name="T13">: </text:span></text:span><text:span text:style-name="Source_20_Text"><text:span text:style-name="T18">0.08</text:span></text:span><text:span text:style-name="Source_20_Text"><text:span text:style-name="T13"> },</text:span></text:span></text:p>
        <text:p text:style-name="P19"><text:span text:style-name="Source_20_Text"><text:span text:style-name="T13"><text:s text:c="16"/></text:span></text:span><text:span text:style-name="Source_20_Text"><text:span text:style-name="T18">stabilization</text:span></text:span><text:span text:style-name="Source_20_Text"><text:span text:style-name="T13">: { </text:span></text:span><text:span text:style-name="Source_20_Text"><text:span text:style-name="T18">iterations</text:span></text:span><text:span text:style-name="Source_20_Text"><text:span text:style-name="T13">: </text:span></text:span><text:span text:style-name="Source_20_Text"><text:span text:style-name="T18">150</text:span></text:span><text:span text:style-name="Source_20_Text"><text:span text:style-name="T13"> }</text:span></text:span></text:p>
        <text:p text:style-name="P19"><text:span text:style-name="Source_20_Text"><text:span text:style-name="T13"><text:s text:c="12"/>},</text:span></text:span></text:p>
        <text:p text:style-name="P19"><text:span text:style-name="Source_20_Text"><text:span text:style-name="T13"><text:s text:c="12"/></text:span></text:span><text:span text:style-name="Source_20_Text"><text:span text:style-name="T18">interaction</text:span></text:span><text:span text:style-name="Source_20_Text"><text:span text:style-name="T13">: { </text:span></text:span><text:span text:style-name="Source_20_Text"><text:span text:style-name="T18">hover</text:span></text:span><text:span text:style-name="Source_20_Text"><text:span text:style-name="T13">: </text:span></text:span><text:span text:style-name="Source_20_Text"><text:span text:style-name="T18">true</text:span></text:span><text:span text:style-name="Source_20_Text"><text:span text:style-name="T13"> }</text:span></text:span></text:p>
        <text:p text:style-name="P19"><text:span text:style-name="Source_20_Text"><text:span text:style-name="T13"><text:s text:c="8"/>};</text:span></text:span></text:p>
        <text:p text:style-name="P19"/>
        <text:p text:style-name="P19"><text:span text:style-name="Source_20_Text"><text:span text:style-name="T13"><text:s text:c="8"/></text:span></text:span><text:span text:style-name="Source_20_Text"><text:span text:style-name="T14">if</text:span></text:span><text:span text:style-name="Source_20_Text"><text:span text:style-name="T13"> (network !== </text:span></text:span><text:span text:style-name="Source_20_Text"><text:span text:style-name="T18">null</text:span></text:span><text:span text:style-name="Source_20_Text"><text:span text:style-name="T13">) { network.destroy(); }</text:span></text:span></text:p>
        <text:p text:style-name="P19"><text:span text:style-name="Source_20_Text"><text:span text:style-name="T13"><text:s text:c="8"/>network = </text:span></text:span><text:span text:style-name="Source_20_Text"><text:span text:style-name="T14">new</text:span></text:span><text:span text:style-name="Source_20_Text"><text:span text:style-name="T13"> vis.Network(container, graphData, options);</text:span></text:span></text:p>
        <text:p text:style-name="P19"/>
        <text:p text:style-name="P19"><text:span text:style-name="Source_20_Text"><text:span text:style-name="T13"><text:s text:c="8"/>network.on(</text:span></text:span><text:span text:style-name="Source_20_Text"><text:span text:style-name="T12">"hoverEdge"</text:span></text:span><text:span text:style-name="Source_20_Text"><text:span text:style-name="T13">, </text:span></text:span><text:span text:style-name="Source_20_Text"><text:span text:style-name="T14">function</text:span></text:span><text:span text:style-name="Source_20_Text"><text:span text:style-name="T13"> (params) {</text:span></text:span></text:p>
        <text:p text:style-name="P19"><text:span text:style-name="Source_20_Text"><text:span text:style-name="T13"><text:s text:c="12"/></text:span></text:span><text:span text:style-name="Source_20_Text"><text:span text:style-name="T14">const</text:span></text:span><text:span text:style-name="Source_20_Text"><text:span text:style-name="T13"> edgeId = params.edge;</text:span></text:span></text:p>
        <text:p text:style-name="P19"><text:span text:style-name="Source_20_Text"><text:span text:style-name="T13"><text:s text:c="12"/></text:span></text:span><text:span text:style-name="Source_20_Text"><text:span text:style-name="T14">const</text:span></text:span><text:span text:style-name="Source_20_Text"><text:span text:style-name="T13"> edgeData = graphData.edges.get(edgeId);</text:span></text:span></text:p>
        <text:p text:style-name="P19"><text:span text:style-name="Source_20_Text"><text:span text:style-name="T13"><text:s text:c="12"/></text:span></text:span><text:span text:style-name="Source_20_Text"><text:span text:style-name="T14">if</text:span></text:span><text:span text:style-name="Source_20_Text"><text:span text:style-name="T13"> (edgeData &amp;&amp; edgeData.textFull) {</text:span></text:span></text:p>
        <text:p text:style-name="P19"><text:span text:style-name="Source_20_Text"><text:span text:style-name="T13"><text:s text:c="16"/>graphData.edges.update({ </text:span></text:span><text:span text:style-name="Source_20_Text"><text:span text:style-name="T18">id</text:span></text:span><text:span text:style-name="Source_20_Text"><text:span text:style-name="T13">: edgeId, </text:span></text:span><text:span text:style-name="Source_20_Text"><text:span text:style-name="T18">label</text:span></text:span><text:span text:style-name="Source_20_Text"><text:span text:style-name="T13">: edgeData.textFull });</text:span></text:span></text:p>
        <text:p text:style-name="P19"><text:span text:style-name="Source_20_Text"><text:span text:style-name="T13"><text:s text:c="12"/>}</text:span></text:span></text:p>
        <text:p text:style-name="P19"><text:span text:style-name="Source_20_Text"><text:span text:style-name="T13"><text:s text:c="8"/>});</text:span></text:span></text:p>
        <text:p text:style-name="P19"/>
        <text:p text:style-name="P19"><text:span text:style-name="Source_20_Text"><text:span text:style-name="T13"><text:s text:c="8"/>network.on(</text:span></text:span><text:span text:style-name="Source_20_Text"><text:span text:style-name="T12">"blurEdge"</text:span></text:span><text:span text:style-name="Source_20_Text"><text:span text:style-name="T13">, </text:span></text:span><text:span text:style-name="Source_20_Text"><text:span text:style-name="T14">function</text:span></text:span><text:span text:style-name="Source_20_Text"><text:span text:style-name="T13"> (params) {</text:span></text:span></text:p>
        <text:p text:style-name="P19"><text:span text:style-name="Source_20_Text"><text:span text:style-name="T13"><text:s text:c="12"/></text:span></text:span><text:span text:style-name="Source_20_Text"><text:span text:style-name="T14">const</text:span></text:span><text:span text:style-name="Source_20_Text"><text:span text:style-name="T13"> edgeId = params.edge;</text:span></text:span></text:p>
        <text:p text:style-name="P19"><text:span text:style-name="Source_20_Text"><text:span text:style-name="T13"><text:s text:c="12"/>graphData.edges.update({ </text:span></text:span><text:span text:style-name="Source_20_Text"><text:span text:style-name="T18">id</text:span></text:span><text:span text:style-name="Source_20_Text"><text:span text:style-name="T13">: edgeId, </text:span></text:span><text:span text:style-name="Source_20_Text"><text:span text:style-name="T18">label</text:span></text:span><text:span text:style-name="Source_20_Text"><text:span text:style-name="T13">: </text:span></text:span><text:span text:style-name="Source_20_Text"><text:span text:style-name="T12">""</text:span></text:span><text:span text:style-name="Source_20_Text"><text:span text:style-name="T13"> });</text:span></text:span></text:p>
        <text:p text:style-name="P19"><text:span text:style-name="Source_20_Text"><text:span text:style-name="T13"><text:s text:c="8"/>});</text:span></text:span></text:p>
        <text:p text:style-name="P19"/>
        <text:p text:style-name="P19"><text:span text:style-name="Source_20_Text"><text:span text:style-name="T13"><text:s text:c="8"/>network.on(</text:span></text:span><text:span text:style-name="Source_20_Text"><text:span text:style-name="T12">"doubleClick"</text:span></text:span><text:span text:style-name="Source_20_Text"><text:span text:style-name="T13">, </text:span></text:span><text:span text:style-name="Source_20_Text"><text:span text:style-name="T14">function</text:span></text:span><text:span text:style-name="Source_20_Text"><text:span text:style-name="T13"> (params) {</text:span></text:span></text:p>
        <text:p text:style-name="P19"><text:span text:style-name="Source_20_Text"><text:span text:style-name="T13"><text:s text:c="12"/></text:span></text:span><text:span text:style-name="Source_20_Text"><text:span text:style-name="T14">if</text:span></text:span><text:span text:style-name="Source_20_Text"><text:span text:style-name="T13"> (params.nodes.length &gt; </text:span></text:span><text:span text:style-name="Source_20_Text"><text:span text:style-name="T18">0</text:span></text:span><text:span text:style-name="Source_20_Text"><text:span text:style-name="T13">) {</text:span></text:span></text:p>
        <text:p text:style-name="P19"><text:span text:style-name="Source_20_Text"><text:span text:style-name="T13"><text:s text:c="16"/></text:span></text:span><text:span text:style-name="Source_20_Text"><text:span text:style-name="T14">const</text:span></text:span><text:span text:style-name="Source_20_Text"><text:span text:style-name="T13"> clickedNode = params.nodes[</text:span></text:span><text:span text:style-name="Source_20_Text"><text:span text:style-name="T18">0</text:span></text:span><text:span text:style-name="Source_20_Text"><text:span text:style-name="T13">];</text:span></text:span></text:p>
        <text:p text:style-name="P19"><text:span text:style-name="Source_20_Text"><text:span text:style-name="T13"><text:s text:c="16"/></text:span></text:span><text:span text:style-name="Source_20_Text"><text:span text:style-name="T14">const</text:span></text:span><text:span text:style-name="Source_20_Text"><text:span text:style-name="T13"> match = clickedNode.match(</text:span></text:span><text:span text:style-name="Source_20_Text"><text:span text:style-name="T16">/^([a-zA-Z\s]+)\s\[([A-G#b]+)\]$/</text:span></text:span><text:span text:style-name="Source_20_Text"><text:span text:style-name="T13">);</text:span></text:span></text:p>
        <text:p text:style-name="P19"><text:span text:style-name="Source_20_Text"><text:span text:style-name="T13"><text:s text:c="16"/></text:span></text:span><text:span text:style-name="Source_20_Text"><text:span text:style-name="T14">if</text:span></text:span><text:span text:style-name="Source_20_Text"><text:span text:style-name="T13"> (match) {</text:span></text:span></text:p>
        <text:p text:style-name="P19"><text:span text:style-name="Source_20_Text"><text:span text:style-name="T13"><text:s text:c="20"/>setTypeSelect.value = match[</text:span></text:span><text:span text:style-name="Source_20_Text"><text:span text:style-name="T18">1</text:span></text:span><text:span text:style-name="Source_20_Text"><text:span text:style-name="T13">];</text:span></text:span></text:p>
        <text:p text:style-name="P19"><text:span text:style-name="Source_20_Text"><text:span text:style-name="T13"><text:s text:c="20"/>rootSelect.value = match[</text:span></text:span><text:span text:style-name="Source_20_Text"><text:span text:style-name="T18">2</text:span></text:span><text:span text:style-name="Source_20_Text"><text:span text:style-name="T13">];</text:span></text:span></text:p>
        <text:p text:style-name="P19"><text:span text:style-name="Source_20_Text"><text:span text:style-name="T13"><text:s text:c="20"/>updateExploration(match[</text:span></text:span><text:span text:style-name="Source_20_Text"><text:span text:style-name="T18">1</text:span></text:span><text:span text:style-name="Source_20_Text"><text:span text:style-name="T13">], match[</text:span></text:span><text:span text:style-name="Source_20_Text"><text:span text:style-name="T18">2</text:span></text:span><text:span text:style-name="Source_20_Text"><text:span text:style-name="T13">], distanceSelect.value);</text:span></text:span></text:p>
        <text:p text:style-name="P19"><text:span text:style-name="Source_20_Text"><text:span text:style-name="T13"><text:s text:c="16"/>}</text:span></text:span></text:p>
        <text:p text:style-name="P19"><text:span text:style-name="Source_20_Text"><text:span text:style-name="T13"><text:s text:c="12"/>}</text:span></text:span></text:p>
        <text:p text:style-name="P19"><text:span text:style-name="Source_20_Text"><text:span text:style-name="T13"><text:s text:c="8"/>});</text:span></text:span></text:p>
        <text:p text:style-name="P19"><text:span text:style-name="Source_20_Text"><text:span text:style-name="T13"><text:s text:c="4"/>}</text:span></text:span></text:p>
        <text:p text:style-name="P19"><text:span text:style-name="Source_20_Text"><text:span text:style-name="T13">});</text:span></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13"><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21"/>
      <text:p text:style-name="P21"/>
      <text:p text:style-name="P21"/>
      <text:p text:style-name="P21"/>
      <text:p text:style-name="P21"/>
      <text:p text:style-name="P21"/>
      <text:p text:style-name="P21"><text:soft-page-break/></text:p>
      <text:p text:style-name="P21"/>
      <text:p text:style-name="P21">Problèmes à régler :</text:p>
      <text:p text:style-name="P21">1/ Trouver un moyen d’afficher les notes changeantes « dans le bon sens » (C dia → F dia ne doit pas afficher Bb du côté de C dia)</text:p>
      <text:p text:style-name="P21">2/ Trouver un moyen de vérifier que les sets reliés sont les bons, et que les notes de changement sont correctes (grosse vérification à faire dans la logique plus que le visu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2T19:32:37.299000000</dc:date>
    <meta:editing-duration>PT4H47M30S</meta:editing-duration>
    <meta:editing-cycles>5</meta:editing-cycles>
    <meta:generator>LibreOffice/7.2.5.2$Windows_X86_64 LibreOffice_project/499f9727c189e6ef3471021d6132d4c694f357e5</meta:generator>
    <meta:document-statistic meta:table-count="0" meta:image-count="0" meta:object-count="0" meta:page-count="12" meta:paragraph-count="341" meta:word-count="3307" meta:character-count="25095" meta:non-whitespace-character-count="19557"/>
  </office:meta>
</office:document-meta>
</file>